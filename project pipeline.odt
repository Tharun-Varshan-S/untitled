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8583in" table:align="left"/>
    </style:style>
    <style:style style:name="Table1.A" style:family="table-column">
      <style:table-column-properties style:column-width="1.9306in"/>
    </style:style>
    <style:style style:name="Table1.B" style:family="table-column">
      <style:table-column-properties style:column-width="1.9278in"/>
    </style:style>
    <style:style style:name="Table1.A1" style:family="table-cell">
      <style:table-cell-properties style:vertical-align="middle" fo:padding="0.0194in" fo:border="none"/>
    </style:style>
    <style:style style:name="Table2" style:family="table">
      <style:table-properties style:width="4.6229in" table:align="left"/>
    </style:style>
    <style:style style:name="Table2.A" style:family="table-column">
      <style:table-column-properties style:column-width="2.0833in"/>
    </style:style>
    <style:style style:name="Table2.B" style:family="table-column">
      <style:table-column-properties style:column-width="2.5396in"/>
    </style:style>
    <style:style style:name="Table2.A1" style:family="table-cell">
      <style:table-cell-properties style:vertical-align="middle" fo:padding="0.0194in" fo:border="none"/>
    </style:style>
    <style:style style:name="Table3" style:family="table">
      <style:table-properties style:width="3.5257in" table:align="left"/>
    </style:style>
    <style:style style:name="Table3.A" style:family="table-column">
      <style:table-column-properties style:column-width="1.5236in"/>
    </style:style>
    <style:style style:name="Table3.B" style:family="table-column">
      <style:table-column-properties style:column-width="2.0021in"/>
    </style:style>
    <style:style style:name="Table3.A1" style:family="table-cell">
      <style:table-cell-properties style:vertical-align="middle" fo:padding="0.0194in" fo:border="none"/>
    </style:style>
    <style:style style:name="Table4" style:family="table">
      <style:table-properties style:width="5.3396in" table:align="left"/>
    </style:style>
    <style:style style:name="Table4.A" style:family="table-column">
      <style:table-column-properties style:column-width="2.1292in"/>
    </style:style>
    <style:style style:name="Table4.B" style:family="table-column">
      <style:table-column-properties style:column-width="3.2104in"/>
    </style:style>
    <style:style style:name="Table4.A1" style:family="table-cell">
      <style:table-cell-properties style:vertical-align="middle" fo:padding="0.0194in" fo:border="none"/>
    </style:style>
    <style:style style:name="Table5" style:family="table">
      <style:table-properties style:width="2.2493in" table:align="left"/>
    </style:style>
    <style:style style:name="Table5.A" style:family="table-column">
      <style:table-column-properties style:column-width="0.8063in"/>
    </style:style>
    <style:style style:name="Table5.B" style:family="table-column">
      <style:table-column-properties style:column-width="1.4431in"/>
    </style:style>
    <style:style style:name="Table5.A1" style:family="table-cell">
      <style:table-cell-properties style:vertical-align="middle" fo:padding="0.0194in" fo:border="none"/>
    </style:style>
    <style:style style:name="Table6" style:family="table">
      <style:table-properties style:width="3.7986in" table:align="left"/>
    </style:style>
    <style:style style:name="Table6.A" style:family="table-column">
      <style:table-column-properties style:column-width="1.4632in"/>
    </style:style>
    <style:style style:name="Table6.B" style:family="table-column">
      <style:table-column-properties style:column-width="2.3354in"/>
    </style:style>
    <style:style style:name="Table6.A1" style:family="table-cell">
      <style:table-cell-properties style:vertical-align="middle" fo:padding="0.0194in" fo:border="none"/>
    </style:style>
    <style:style style:name="Table7" style:family="table">
      <style:table-properties style:width="3.7618in" table:align="left"/>
    </style:style>
    <style:style style:name="Table7.A" style:family="table-column">
      <style:table-column-properties style:column-width="1.7965in"/>
    </style:style>
    <style:style style:name="Table7.B" style:family="table-column">
      <style:table-column-properties style:column-width="1.9653in"/>
    </style:style>
    <style:style style:name="Table7.A1" style:family="table-cell">
      <style:table-cell-properties style:vertical-align="middle" fo:padding="0.0194in" fo:border="none"/>
    </style:style>
    <style:style style:name="Table8" style:family="table">
      <style:table-properties style:width="3.3792in" table:align="left"/>
    </style:style>
    <style:style style:name="Table8.A" style:family="table-column">
      <style:table-column-properties style:column-width="1.5563in"/>
    </style:style>
    <style:style style:name="Table8.B" style:family="table-column">
      <style:table-column-properties style:column-width="1.8229in"/>
    </style:style>
    <style:style style:name="Table8.A1" style:family="table-cell">
      <style:table-cell-properties style:vertical-align="middle" fo:padding="0.0194in" fo:border="none"/>
    </style:style>
    <style:style style:name="Table9" style:family="table">
      <style:table-properties style:width="4.4243in" table:align="left"/>
    </style:style>
    <style:style style:name="Table9.A" style:family="table-column">
      <style:table-column-properties style:column-width="1.459in"/>
    </style:style>
    <style:style style:name="Table9.B" style:family="table-column">
      <style:table-column-properties style:column-width="2.9653in"/>
    </style:style>
    <style:style style:name="Table9.A1" style:family="table-cell">
      <style:table-cell-properties style:vertical-align="middle" fo:padding="0.0194in" fo:border="none"/>
    </style:style>
    <style:style style:name="Table10" style:family="table">
      <style:table-properties style:width="3.5903in" table:align="left"/>
    </style:style>
    <style:style style:name="Table10.A" style:family="table-column">
      <style:table-column-properties style:column-width="1.5139in"/>
    </style:style>
    <style:style style:name="Table10.B" style:family="table-column">
      <style:table-column-properties style:column-width="2.0764in"/>
    </style:style>
    <style:style style:name="Table10.A1" style:family="table-cell">
      <style:table-cell-properties style:vertical-align="middle" fo:padding="0.0194in" fo:border="none"/>
    </style:style>
    <style:style style:name="Table11" style:family="table">
      <style:table-properties style:width="3.6326in" table:align="left"/>
    </style:style>
    <style:style style:name="Table11.A" style:family="table-column">
      <style:table-column-properties style:column-width="1.45in"/>
    </style:style>
    <style:style style:name="Table11.B" style:family="table-column">
      <style:table-column-properties style:column-width="2.1826in"/>
    </style:style>
    <style:style style:name="Table11.A1" style:family="table-cell">
      <style:table-cell-properties style:vertical-align="middle" fo:padding="0.0194in" fo:border="none"/>
    </style:style>
    <style:style style:name="Table12" style:family="table">
      <style:table-properties style:width="4.3875in" table:align="left"/>
    </style:style>
    <style:style style:name="Table12.A" style:family="table-column">
      <style:table-column-properties style:column-width="1.5972in"/>
    </style:style>
    <style:style style:name="Table12.B" style:family="table-column">
      <style:table-column-properties style:column-width="2.7903in"/>
    </style:style>
    <style:style style:name="Table12.A1" style:family="table-cell">
      <style:table-cell-properties style:vertical-align="middle" fo:padding="0.0194in" fo:border="none"/>
    </style:style>
    <style:style style:name="Table13" style:family="table">
      <style:table-properties style:width="4.3819in" table:align="left"/>
    </style:style>
    <style:style style:name="Table13.A" style:family="table-column">
      <style:table-column-properties style:column-width="2.0833in"/>
    </style:style>
    <style:style style:name="Table13.B" style:family="table-column">
      <style:table-column-properties style:column-width="2.2986in"/>
    </style:style>
    <style:style style:name="Table13.A1" style:family="table-cell">
      <style:table-cell-properties style:vertical-align="middle" fo:padding="0.0194in" fo:border="none"/>
    </style:style>
    <style:style style:name="Table14" style:family="table">
      <style:table-properties style:width="3.0958in" table:align="left"/>
    </style:style>
    <style:style style:name="Table14.A" style:family="table-column">
      <style:table-column-properties style:column-width="0.8153in"/>
    </style:style>
    <style:style style:name="Table14.B" style:family="table-column">
      <style:table-column-properties style:column-width="2.2806in"/>
    </style:style>
    <style:style style:name="Table14.A1" style:family="table-cell">
      <style:table-cell-properties style:vertical-align="middle" fo:padding="0.0194in" fo:border="none"/>
    </style:style>
    <style:style style:name="Table15" style:family="table">
      <style:table-properties style:width="3.4333in" table:align="left"/>
    </style:style>
    <style:style style:name="Table15.A" style:family="table-column">
      <style:table-column-properties style:column-width="1.5326in"/>
    </style:style>
    <style:style style:name="Table15.B" style:family="table-column">
      <style:table-column-properties style:column-width="1.9007in"/>
    </style:style>
    <style:style style:name="Table15.A1" style:family="table-cell">
      <style:table-cell-properties style:vertical-align="middle" fo:padding="0.0194in" fo:border="none"/>
    </style:style>
    <style:style style:name="Table16" style:family="table">
      <style:table-properties style:width="4.7521in" table:align="left"/>
    </style:style>
    <style:style style:name="Table16.A" style:family="table-column">
      <style:table-column-properties style:column-width="1.7965in"/>
    </style:style>
    <style:style style:name="Table16.B" style:family="table-column">
      <style:table-column-properties style:column-width="2.9556in"/>
    </style:style>
    <style:style style:name="Table16.A1" style:family="table-cell">
      <style:table-cell-properties style:vertical-align="middle" fo:padding="0.0194in" fo:border="none"/>
    </style:style>
    <style:style style:name="Table17" style:family="table">
      <style:table-properties style:width="2.3771in" table:align="left"/>
    </style:style>
    <style:style style:name="Table17.A" style:family="table-column">
      <style:table-column-properties style:column-width="0.9403in"/>
    </style:style>
    <style:style style:name="Table17.B" style:family="table-column">
      <style:table-column-properties style:column-width="1.4368in"/>
    </style:style>
    <style:style style:name="Table17.A1" style:family="table-cell">
      <style:table-cell-properties style:vertical-align="middle" fo:padding="0.0194in" fo:border="none"/>
    </style:style>
    <style:style style:name="Table18" style:family="table">
      <style:table-properties style:width="4.2722in" table:align="left"/>
    </style:style>
    <style:style style:name="Table18.A" style:family="table-column">
      <style:table-column-properties style:column-width="1.6347in"/>
    </style:style>
    <style:style style:name="Table18.B" style:family="table-column">
      <style:table-column-properties style:column-width="2.6375in"/>
    </style:style>
    <style:style style:name="Table18.A1" style:family="table-cell">
      <style:table-cell-properties style:vertical-align="middle" fo:padding="0.0194in" fo:border="none"/>
    </style:style>
    <style:style style:name="Table19" style:family="table">
      <style:table-properties style:width="4.35in" table:align="left"/>
    </style:style>
    <style:style style:name="Table19.A" style:family="table-column">
      <style:table-column-properties style:column-width="1.6299in"/>
    </style:style>
    <style:style style:name="Table19.B" style:family="table-column">
      <style:table-column-properties style:column-width="2.7201in"/>
    </style:style>
    <style:style style:name="Table19.A1" style:family="table-cell">
      <style:table-cell-properties style:vertical-align="middle" fo:padding="0.0194in" fo:border="none"/>
    </style:style>
    <style:style style:name="Table20" style:family="table">
      <style:table-properties style:width="2.9924in" table:align="left"/>
    </style:style>
    <style:style style:name="Table20.A" style:family="table-column">
      <style:table-column-properties style:column-width="1.1618in"/>
    </style:style>
    <style:style style:name="Table20.B" style:family="table-column">
      <style:table-column-properties style:column-width="1.8306in"/>
    </style:style>
    <style:style style:name="Table20.A1" style:family="table-cell">
      <style:table-cell-properties style:vertical-align="middle" fo:padding="0.0194in" fo:border="none"/>
    </style:style>
    <style:style style:name="Table21" style:family="table">
      <style:table-properties style:width="3.5396in" table:align="left"/>
    </style:style>
    <style:style style:name="Table21.A" style:family="table-column">
      <style:table-column-properties style:column-width="1.5326in"/>
    </style:style>
    <style:style style:name="Table21.B" style:family="table-column">
      <style:table-column-properties style:column-width="2.0069in"/>
    </style:style>
    <style:style style:name="Table21.A1" style:family="table-cell">
      <style:table-cell-properties style:vertical-align="middle" fo:padding="0.0194in" fo:border="none"/>
    </style:style>
    <style:style style:name="Table22" style:family="table">
      <style:table-properties style:width="4.466in" table:align="left"/>
    </style:style>
    <style:style style:name="Table22.A" style:family="table-column">
      <style:table-column-properties style:column-width="2.0375in"/>
    </style:style>
    <style:style style:name="Table22.B" style:family="table-column">
      <style:table-column-properties style:column-width="2.4285in"/>
    </style:style>
    <style:style style:name="Table22.A1" style:family="table-cell">
      <style:table-cell-properties style:vertical-align="middle" fo:padding="0.0194in" fo:border="none"/>
    </style:style>
    <style:style style:name="Table23" style:family="table">
      <style:table-properties style:width="3.8028in" table:align="left"/>
    </style:style>
    <style:style style:name="Table23.A" style:family="table-column">
      <style:table-column-properties style:column-width="1.8063in"/>
    </style:style>
    <style:style style:name="Table23.B" style:family="table-column">
      <style:table-column-properties style:column-width="1.9965in"/>
    </style:style>
    <style:style style:name="Table23.A1" style:family="table-cell">
      <style:table-cell-properties style:vertical-align="middle" fo:padding="0.0194in" fo:border="none"/>
    </style:style>
    <style:style style:name="Table24" style:family="table">
      <style:table-properties style:width="4.4465in" table:align="left"/>
    </style:style>
    <style:style style:name="Table24.A" style:family="table-column">
      <style:table-column-properties style:column-width="1.7222in"/>
    </style:style>
    <style:style style:name="Table24.B" style:family="table-column">
      <style:table-column-properties style:column-width="2.7243in"/>
    </style:style>
    <style:style style:name="Table24.A1" style:family="table-cell">
      <style:table-cell-properties style:vertical-align="middle" fo:padding="0.0194in" fo:border="none"/>
    </style:style>
    <style:style style:name="Table25" style:family="table">
      <style:table-properties style:width="4.5903in" table:align="left"/>
    </style:style>
    <style:style style:name="Table25.A" style:family="table-column">
      <style:table-column-properties style:column-width="0.4729in"/>
    </style:style>
    <style:style style:name="Table25.B" style:family="table-column">
      <style:table-column-properties style:column-width="4.1174in"/>
    </style:style>
    <style:style style:name="Table25.A1" style:family="table-cell">
      <style:table-cell-properties style:vertical-align="middle" fo:padding="0.0194in" fo:border="none"/>
    </style:style>
    <style:style style:name="Table26" style:family="table">
      <style:table-properties style:width="6.6931in" table:align="left"/>
    </style:style>
    <style:style style:name="Table26.A" style:family="table-column">
      <style:table-column-properties style:column-width="1.4875in"/>
    </style:style>
    <style:style style:name="Table26.B" style:family="table-column">
      <style:table-column-properties style:column-width="2.8931in"/>
    </style:style>
    <style:style style:name="Table26.C" style:family="table-column">
      <style:table-column-properties style:column-width="2.3125in"/>
    </style:style>
    <style:style style:name="Table26.A1" style:family="table-cell">
      <style:table-cell-properties style:vertical-align="middle" fo:padding="0.0194in" fo:border="none"/>
    </style:style>
    <style:style style:name="Table27" style:family="table">
      <style:table-properties style:width="4.9174in" table:align="left"/>
    </style:style>
    <style:style style:name="Table27.A" style:family="table-column">
      <style:table-column-properties style:column-width="0.8931in"/>
    </style:style>
    <style:style style:name="Table27.B" style:family="table-column">
      <style:table-column-properties style:column-width="2.2674in"/>
    </style:style>
    <style:style style:name="Table27.C" style:family="table-column">
      <style:table-column-properties style:column-width="1.7569in"/>
    </style:style>
    <style:style style:name="Table27.A1" style:family="table-cell">
      <style:table-cell-properties style:vertical-align="middle" fo:padding="0.0194in" fo:border="none"/>
    </style:style>
    <style:style style:name="Table28" style:family="table">
      <style:table-properties style:width="3.1132in" table:align="left"/>
    </style:style>
    <style:style style:name="Table28.A" style:family="table-column">
      <style:table-column-properties style:column-width="0.8931in"/>
    </style:style>
    <style:style style:name="Table28.B" style:family="table-column">
      <style:table-column-properties style:column-width="1.5639in"/>
    </style:style>
    <style:style style:name="Table28.C" style:family="table-column">
      <style:table-column-properties style:column-width="0.6563in"/>
    </style:style>
    <style:style style:name="Table28.A1" style:family="table-cell">
      <style:table-cell-properties style:vertical-align="middle" fo:padding="0.0194in" fo:border="none"/>
    </style:style>
    <style:style style:name="Table29" style:family="table">
      <style:table-properties style:width="6.3549in" table:align="left"/>
    </style:style>
    <style:style style:name="Table29.A" style:family="table-column">
      <style:table-column-properties style:column-width="1.1444in"/>
    </style:style>
    <style:style style:name="Table29.B" style:family="table-column">
      <style:table-column-properties style:column-width="3.4625in"/>
    </style:style>
    <style:style style:name="Table29.C" style:family="table-column">
      <style:table-column-properties style:column-width="1.7479in"/>
    </style:style>
    <style:style style:name="Table29.A1" style:family="table-cell">
      <style:table-cell-properties style:vertical-align="middle" fo:padding="0.0194in" fo:border="none"/>
    </style:style>
    <style:style style:name="Table30" style:family="table">
      <style:table-properties style:width="5.5278in" table:align="left"/>
    </style:style>
    <style:style style:name="Table30.A" style:family="table-column">
      <style:table-column-properties style:column-width="1.6806in"/>
    </style:style>
    <style:style style:name="Table30.B" style:family="table-column">
      <style:table-column-properties style:column-width="1.5257in"/>
    </style:style>
    <style:style style:name="Table30.C" style:family="table-column">
      <style:table-column-properties style:column-width="2.3215in"/>
    </style:style>
    <style:style style:name="Table30.A1" style:family="table-cell">
      <style:table-cell-properties style:vertical-align="middle" fo:padding="0.0194in" fo:border="none"/>
    </style:style>
    <style:style style:name="Table31" style:family="table">
      <style:table-properties style:width="3.0215in" table:align="left"/>
    </style:style>
    <style:style style:name="Table31.A" style:family="table-column">
      <style:table-column-properties style:column-width="0.5979in"/>
    </style:style>
    <style:style style:name="Table31.B" style:family="table-column">
      <style:table-column-properties style:column-width="2.4236in"/>
    </style:style>
    <style:style style:name="Table3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9"/>
    <style:style style:name="P64" style:family="paragraph" style:parent-style-name="Text_20_body" style:list-style-name="L70"/>
    <style:style style:name="P65" style:family="paragraph" style:parent-style-name="Text_20_body" style:list-style-name="L71"/>
    <style:style style:name="T1" style:family="text">
      <style:text-properties style:text-underline-style="solid" style:text-underline-type="double" style:text-underline-width="auto" style:text-underline-color="font-colo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lent. We'll make this a **professional planning document**, not an unnecessarily long one. The goal is **quality over page count**, similar to your MCP document.</text:p>
      <text:p text:style-name="Text_20_body">---</text:p>
      <text:p text:style-name="Text_20_body"># SEARCH SYSTEM</text:p>
      <text:p text:style-name="Text_20_body"># System Workflow Deep Dive</text:p>
      <text:p text:style-name="Text_20_body">## Internal Execution Pipeline &amp; Runtime Processing</text:p>
      <text:p text:style-name="Text_20_body">**Document Version:** 1.0</text:p>
      <text:p text:style-name="Text_20_body">**Document Type:** System Workflow Deep Dive (Planning)</text:p>
      <text:p text:style-name="Text_20_body">**Project Type:** Full Stack Search &amp; Analytics Platform</text:p>
      <text:p text:style-name="Text_20_body">---</text:p>
      <text:p text:style-name="Text_20_body">## Technology Stack</text:p>
      <text:p text:style-name="Text_20_body">### Frontend</text:p>
      <text:p text:style-name="Text_20_body">* Next.js (App Router)</text:p>
      <text:p text:style-name="Text_20_body">* React</text:p>
      <text:p text:style-name="Text_20_body">* TypeScript</text:p>
      <text:p text:style-name="Text_20_body">* Tailwind CSS</text:p>
      <text:p text:style-name="Text_20_body">* Zustand</text:p>
      <text:p text:style-name="Text_20_body">* TanStack Query</text:p>
      <text:p text:style-name="Text_20_body">* Recharts</text:p>
      <text:p text:style-name="Text_20_body">### Backend</text:p>
      <text:p text:style-name="Text_20_body">* Node.js</text:p>
      <text:p text:style-name="Text_20_body">* Express.js</text:p>
      <text:p text:style-name="Text_20_body">* TypeScript</text:p>
      <text:p text:style-name="Text_20_body">* JWT Authentication</text:p>
      <text:p text:style-name="Text_20_body">* Mongoose</text:p>
      <text:p text:style-name="Text_20_body">### Database</text:p>
      <text:p text:style-name="Text_20_body">* MongoDB</text:p>
      <text:p text:style-name="Text_20_body">### DevOps</text:p>
      <text:p text:style-name="Text_20_body">* Docker</text:p>
      <text:p text:style-name="Text_20_body">* GitHub Actions</text:p>
      <text:p text:style-name="Text_20_body">* AWS</text:p>
      <text:p text:style-name="Text_20_body">---</text:p>
      <text:p text:style-name="Text_20_body"><text:soft-page-break/>## Purpose</text:p>
      <text:p text:style-name="Text_20_body">This document defines the planned execution workflow of the Search System. It describes how the application processes requests, manages application state, executes business logic, interacts with the database, and renders responses to users.</text:p>
      <text:p text:style-name="Text_20_body">Unlike the Architecture document, which focuses on structural design, this document focuses on **runtime execution** and the interaction between the major processing stages of the system.</text:p>
      <text:p text:style-name="Text_20_body">The workflow described here serves as the reference model for implementation, validation, testing, and future enhancements.</text:p>
      <text:p text:style-name="Text_20_body">---</text:p>
      <text:p text:style-name="Text_20_body"># Version History</text:p>
      <text:p text:style-name="Text_20_body">| Version | Date | Author | Description |</text:p>
      <text:p text:style-name="Text_20_body">| ------- | --------- | ------------ | ---------------------------------- |</text:p>
      <text:p text:style-name="Text_20_body">| 1.0 | July 2026 | Project Team | Initial workflow planning document |</text:p>
      <text:p text:style-name="Text_20_body">---</text:p>
      <text:p text:style-name="Text_20_body"># Table of Contents</text:p>
      <text:p text:style-name="Text_20_body">```text</text:p>
      <text:p text:style-name="Text_20_body">1. Pipeline Overview</text:p>
      <text:p text:style-name="Text_20_body">2. Stage 1</text:p>
      <text:p text:style-name="Text_20_body">Application Bootstrap</text:p>
      <text:p text:style-name="Text_20_body">3. Stage 2</text:p>
      <text:p text:style-name="Text_20_body">Authentication &amp; Session Manager</text:p>
      <text:p text:style-name="Text_20_body">4. Stage 3</text:p>
      <text:p text:style-name="Text_20_body">Application State Engine</text:p>
      <text:p text:style-name="Text_20_body">5. Stage 4</text:p>
      <text:p text:style-name="Text_20_body">Request &amp; Module Orchestrator</text:p>
      <text:p text:style-name="Text_20_body">6. Stage 5</text:p>
      <text:p text:style-name="Text_20_body">Business Processing Engine</text:p>
      <text:p text:style-name="Text_20_body">7. Stage 6</text:p>
      <text:p text:style-name="Text_20_body">Data Access Engine</text:p>
      <text:p text:style-name="Text_20_body">8. Stage 7</text:p>
      <text:p text:style-name="Text_20_body">Response Processing Engine</text:p>
      <text:p text:style-name="Text_20_body">9. Stage 8</text:p>
      <text:p text:style-name="Text_20_body">UI Rendering Engine</text:p>
      <text:p text:style-name="Text_20_body"><text:soft-page-break/>10. Stage 9</text:p>
      <text:p text:style-name="Text_20_body">Continuous Interaction Engine</text:p>
      <text:p text:style-name="Text_20_body">11. End-to-End Execution Trace</text:p>
      <text:p text:style-name="Text_20_body">12. Technology Summary</text:p>
      <text:p text:style-name="Text_20_body">13. Future Evolution</text:p>
      <text:p text:style-name="Text_20_body">```</text:p>
      <text:p text:style-name="Text_20_body">---</text:p>
      <text:p text:style-name="Text_20_body"># 1. Pipeline Overview</text:p>
      <text:p text:style-name="Text_20_body">## Overview</text:p>
      <text:p text:style-name="Text_20_body">The Search System follows a **nine-stage execution pipeline**.</text:p>
      <text:p text:style-name="Text_20_body">Each stage performs a specific responsibility and passes its output to the next stage. This approach separates concerns, simplifies maintenance, and enables the application to scale without tightly coupling unrelated modules.</text:p>
      <text:p text:style-name="Text_20_body">The pipeline represents the planned runtime behavior of the system and acts as the blueprint for implementation.</text:p>
      <text:p text:style-name="Text_20_body">---</text:p>
      <text:p text:style-name="Text_20_body">## Complete Execution Pipeline</text:p>
      <text:p text:style-name="Text_20_body">```text</text:p>
      <text:p text:style-name="Text_20_body">User</text:p>
      <text:p text:style-name="Text_20_body">│</text:p>
      <text:p text:style-name="Text_20_body">▼</text:p>
      <text:p text:style-name="Text_20_body">──────────────────────────────────</text:p>
      <text:p text:style-name="Text_20_body">Stage 1</text:p>
      <text:p text:style-name="Text_20_body">Application Bootstrap</text:p>
      <text:p text:style-name="Text_20_body">──────────────────────────────────</text:p>
      <text:p text:style-name="Text_20_body">│</text:p>
      <text:p text:style-name="Text_20_body">▼</text:p>
      <text:p text:style-name="Text_20_body">──────────────────────────────────</text:p>
      <text:p text:style-name="Text_20_body">Stage 2</text:p>
      <text:p text:style-name="Text_20_body">Authentication &amp;</text:p>
      <text:p text:style-name="Text_20_body">Session Manager</text:p>
      <text:p text:style-name="Text_20_body">──────────────────────────────────</text:p>
      <text:p text:style-name="Text_20_body">│</text:p>
      <text:p text:style-name="Text_20_body"><text:soft-page-break/>▼</text:p>
      <text:p text:style-name="Text_20_body">──────────────────────────────────</text:p>
      <text:p text:style-name="Text_20_body">Stage 3</text:p>
      <text:p text:style-name="Text_20_body">Application State Engine</text:p>
      <text:p text:style-name="Text_20_body">──────────────────────────────────</text:p>
      <text:p text:style-name="Text_20_body">│</text:p>
      <text:p text:style-name="Text_20_body">▼</text:p>
      <text:p text:style-name="Text_20_body">──────────────────────────────────</text:p>
      <text:p text:style-name="Text_20_body">Stage 4</text:p>
      <text:p text:style-name="Text_20_body">Request &amp;</text:p>
      <text:p text:style-name="Text_20_body">Module Orchestrator</text:p>
      <text:p text:style-name="Text_20_body">──────────────────────────────────</text:p>
      <text:p text:style-name="Text_20_body">│</text:p>
      <text:p text:style-name="Text_20_body">▼</text:p>
      <text:p text:style-name="Text_20_body">──────────────────────────────────</text:p>
      <text:p text:style-name="Text_20_body">Stage 5</text:p>
      <text:p text:style-name="Text_20_body">Business Processing Engine</text:p>
      <text:p text:style-name="Text_20_body">──────────────────────────────────</text:p>
      <text:p text:style-name="Text_20_body">│</text:p>
      <text:p text:style-name="Text_20_body">▼</text:p>
      <text:p text:style-name="Text_20_body">──────────────────────────────────</text:p>
      <text:p text:style-name="Text_20_body">Stage 6</text:p>
      <text:p text:style-name="Text_20_body">Data Access Engine</text:p>
      <text:p text:style-name="Text_20_body">──────────────────────────────────</text:p>
      <text:p text:style-name="Text_20_body">│</text:p>
      <text:p text:style-name="Text_20_body">▼</text:p>
      <text:p text:style-name="Text_20_body">──────────────────────────────────</text:p>
      <text:p text:style-name="Text_20_body">Stage 7</text:p>
      <text:p text:style-name="Text_20_body">Response Processing Engine</text:p>
      <text:p text:style-name="Text_20_body">──────────────────────────────────</text:p>
      <text:p text:style-name="Text_20_body">│</text:p>
      <text:p text:style-name="Text_20_body">▼</text:p>
      <text:p text:style-name="Text_20_body"><text:soft-page-break/>──────────────────────────────────</text:p>
      <text:p text:style-name="Text_20_body">Stage 8</text:p>
      <text:p text:style-name="Text_20_body">UI Rendering Engine</text:p>
      <text:p text:style-name="Text_20_body">──────────────────────────────────</text:p>
      <text:p text:style-name="Text_20_body">│</text:p>
      <text:p text:style-name="Text_20_body">▼</text:p>
      <text:p text:style-name="Text_20_body">──────────────────────────────────</text:p>
      <text:p text:style-name="Text_20_body">Stage 9</text:p>
      <text:p text:style-name="Text_20_body">Continuous Interaction Engine</text:p>
      <text:p text:style-name="Text_20_body">──────────────────────────────────</text:p>
      <text:p text:style-name="Text_20_body">```</text:p>
      <text:p text:style-name="Text_20_body">---</text:p>
      <text:p text:style-name="Text_20_body">## Pipeline Stage Summary</text:p>
      <text:p text:style-name="Text_20_body">| Stage | Name | Primary Responsibility | Core Technologies |</text:p>
      <text:p text:style-name="Text_20_body">| ----- | -------------------------------- | ------------------------------------ | ------------------------------ |</text:p>
      <text:p text:style-name="Text_20_body">| 1 | Application Bootstrap | Initialize the application runtime | Browser, Next.js, React |</text:p>
      <text:p text:style-name="Text_20_body">| 2 | Authentication &amp; Session Manager | Verify users and manage sessions | JWT, Express, MongoDB |</text:p>
      <text:p text:style-name="Text_20_body">| 3 | Application State Engine | Manage client and server state | Zustand, TanStack Query |</text:p>
      <text:p text:style-name="Text_20_body">| 4 | Request &amp; Module Orchestrator | Resolve routes and dispatch requests | Next.js Router, Express Router |</text:p>
      <text:p text:style-name="Text_20_body">| 5 | Business Processing Engine | Execute application features | Controllers, Services |</text:p>
      <text:p text:style-name="Text_20_body">| 6 | Data Access Engine | Interact with persistent storage | Mongoose, MongoDB |</text:p>
      <text:p text:style-name="Text_20_body">| 7 | Response Processing Engine | Format and return responses | Express, JSON |</text:p>
      <text:p text:style-name="Text_20_body">| 8 | UI Rendering Engine | Update the user interface | React, Recharts |</text:p>
      <text:p text:style-name="Text_20_body">| 9 | Continuous Interaction Engine | Handle ongoing user actions | React Events, Next.js |</text:p>
      <text:p text:style-name="Text_20_body">---</text:p>
      <text:p text:style-name="Text_20_body">## Pipeline Design Principles</text:p>
      <text:p text:style-name="Text_20_body">The execution pipeline is based on the following principles:</text:p>
      <text:p text:style-name="Text_20_body">* **Single Responsibility:** Each stage performs one clearly defined task.</text:p>
      <text:p text:style-name="Text_20_body">* **Forward Data Flow:** Requests move sequentially through the pipeline without bypassing stages.</text:p>
      <text:p text:style-name="Text_20_body"><text:soft-page-break/>* **Loose Coupling:** Stages communicate through well-defined interfaces, reducing dependencies.</text:p>
      <text:p text:style-name="Text_20_body">* **Scalability:** New business modules can be introduced without redesigning the pipeline.</text:p>
      <text:p text:style-name="Text_20_body">* **Maintainability:** Separating responsibilities simplifies debugging, testing, and future enhancements.</text:p>
      <text:p text:style-name="Text_20_body">---</text:p>
      <text:p text:style-name="Text_20_body">## Planned Business Modules</text:p>
      <text:p text:style-name="Text_20_body">The **Business Processing Engine** hosts the core application features.</text:p>
      <text:p text:style-name="Text_20_body">```text</text:p>
      <text:p text:style-name="Text_20_body">Business Processing Engine</text:p>
      <text:p text:style-name="Text_20_body">│</text:p>
      <text:p text:style-name="Text_20_body">├── Authentication</text:p>
      <text:p text:style-name="Text_20_body">├── Search</text:p>
      <text:p text:style-name="Text_20_body">├── Dashboard</text:p>
      <text:p text:style-name="Text_20_body">├── Analytics</text:p>
      <text:p text:style-name="Text_20_body">├── Projects</text:p>
      <text:p text:style-name="Text_20_body">├── User Profile</text:p>
      <text:p text:style-name="Text_20_body">├── Settings</text:p>
      <text:p text:style-name="Text_20_body">└── Notifications (Future)</text:p>
      <text:p text:style-name="Text_20_body">```</text:p>
      <text:p text:style-name="Text_20_body">Each module contains its own controllers, services, validation logic, and business rules while sharing the common execution pipeline.</text:p>
      <text:p text:style-name="Text_20_body">---</text:p>
      <text:p text:style-name="Text_20_body">## Request Flow Overview</text:p>
      <text:p text:style-name="Text_20_body">A typical request travels through the system as follows:</text:p>
      <text:p text:style-name="Text_20_body">```text</text:p>
      <text:p text:style-name="Text_20_body">User Action</text:p>
      <text:p text:style-name="Text_20_body">│</text:p>
      <text:p text:style-name="Text_20_body">▼</text:p>
      <text:p text:style-name="Text_20_body">Application Bootstrap</text:p>
      <text:p text:style-name="Text_20_body">│</text:p>
      <text:p text:style-name="Text_20_body">▼</text:p>
      <text:p text:style-name="Text_20_body">Authentication Check</text:p>
      <text:p text:style-name="Text_20_body"><text:soft-page-break/>│</text:p>
      <text:p text:style-name="Text_20_body">▼</text:p>
      <text:p text:style-name="Text_20_body">State Initialization</text:p>
      <text:p text:style-name="Text_20_body">│</text:p>
      <text:p text:style-name="Text_20_body">▼</text:p>
      <text:p text:style-name="Text_20_body">Route Resolution</text:p>
      <text:p text:style-name="Text_20_body">│</text:p>
      <text:p text:style-name="Text_20_body">▼</text:p>
      <text:p text:style-name="Text_20_body">Business Logic Execution</text:p>
      <text:p text:style-name="Text_20_body">│</text:p>
      <text:p text:style-name="Text_20_body">▼</text:p>
      <text:p text:style-name="Text_20_body">Database Operations</text:p>
      <text:p text:style-name="Text_20_body">│</text:p>
      <text:p text:style-name="Text_20_body">▼</text:p>
      <text:p text:style-name="Text_20_body">Response Construction</text:p>
      <text:p text:style-name="Text_20_body">│</text:p>
      <text:p text:style-name="Text_20_body">▼</text:p>
      <text:p text:style-name="Text_20_body">UI Rendering</text:p>
      <text:p text:style-name="Text_20_body">│</text:p>
      <text:p text:style-name="Text_20_body">▼</text:p>
      <text:p text:style-name="Text_20_body">User Interaction Continues</text:p>
      <text:p text:style-name="Text_20_body">```</text:p>
      <text:p text:style-name="Text_20_body">---</text:p>
      <text:p text:style-name="Text_20_body">## Next Section</text:p>
      <text:p text:style-name="Text_20_body">The following chapter begins with **Stage 1 – Application Bootstrap**, which explains how the Search System initializes the frontend application, prepares global providers, restores user sessions, and establishes the runtime environment before any business functionality is executed.</text:p>
      <text:p text:style-name="Text_20_body">---</text:p>
      <text:p text:style-name="Text_20_body">This completes the **front matter** (Cover, Version History, Table of Contents, and Pipeline Overview) in a concise, professional style. The next section will start **Stage 1 – Application Bootstrap** using the same structured format that will be repeated for every stage.</text:p>
      <text:h text:style-name="Heading_20_1" text:outline-level="1"><text:soft-page-break/>2. Stage 1 – Application Bootstrap</text:h>
      <text:h text:style-name="Heading_20_2" text:outline-level="2">Overview</text:h>
      <text:p text:style-name="Text_20_body">The <text:span text:style-name="Strong_20_Emphasis">Application Bootstrap</text:span> stage is responsible for preparing the application runtime before any user interaction or business logic is executed.</text:p>
      <text:p text:style-name="Text_20_body">When a user accesses the application, the frontend initializes the React environment, loads the Next.js application, configures global providers, restores persisted client state, and prepares essential services required throughout the application lifecycle.</text:p>
      <text:p text:style-name="Text_20_body">This stage runs once during the initial application load and establishes the foundation for all subsequent processing stages.</text:p>
      <text:p text:style-name="Horizontal_20_Line"/>
      <text:h text:style-name="Heading_20_2" text:outline-level="2">Primary Responsibilities</text:h>
      <text:p text:style-name="Text_20_body">The Application Bootstrap stage is responsible for:</text:p>
      <text:list text:style-name="L5">
        <text:list-item>
          <text:p text:style-name="P6">Initializing the Next.js application.</text:p>
        </text:list-item>
        <text:list-item>
          <text:p text:style-name="P6">Creating the React component tree.</text:p>
        </text:list-item>
        <text:list-item>
          <text:p text:style-name="P6">Loading global styles and layouts.</text:p>
        </text:list-item>
        <text:list-item>
          <text:p text:style-name="P6">Registering application-wide providers.</text:p>
        </text:list-item>
        <text:list-item>
          <text:p text:style-name="P6">Restoring persisted client state.</text:p>
        </text:list-item>
        <text:list-item>
          <text:p text:style-name="P6">Configuring API communication.</text:p>
        </text:list-item>
        <text:list-item>
          <text:p text:style-name="P6">Preparing routing.</text:p>
        </text:list-item>
        <text:list-item>
          <text:p text:style-name="P6">Loading environment configuration.</text:p>
        </text:list-item>
        <text:list-item>
          <text:p text:style-name="P6">Handing control to the Authentication &amp; Session Manager.</text:p>
        </text:list-item>
      </text:list>
      <text:p text:style-name="Horizontal_20_Line"/>
      <text:h text:style-name="Heading_20_2" text:outline-level="2">Runtime Components</text:h>
      <text:p text:style-name="Preformatted_20_Text"><text:span text:style-name="Source_20_Text">Application Bootstrap</text:span></text:p>
      <text:p text:style-name="Preformatted_20_Text"><text:span text:style-name="Source_20_Text">│</text:span></text:p>
      <text:p text:style-name="Preformatted_20_Text"><text:span text:style-name="Source_20_Text">├── Next.js Runtime</text:span></text:p>
      <text:p text:style-name="Preformatted_20_Text"><text:span text:style-name="Source_20_Text">├── React Root</text:span></text:p>
      <text:p text:style-name="Preformatted_20_Text"><text:span text:style-name="Source_20_Text">├── Global Layout</text:span></text:p>
      <text:p text:style-name="Preformatted_20_Text"><text:span text:style-name="Source_20_Text">├── Theme Provider</text:span></text:p>
      <text:p text:style-name="Preformatted_20_Text"><text:span text:style-name="Source_20_Text">├── Zustand Provider</text:span></text:p>
      <text:p text:style-name="Preformatted_20_Text"><text:span text:style-name="Source_20_Text">├── TanStack Query Client</text:span></text:p>
      <text:p text:style-name="Preformatted_20_Text"><text:span text:style-name="Source_20_Text">├── Authentication Context</text:span></text:p>
      <text:p text:style-name="Preformatted_20_Text"><text:span text:style-name="Source_20_Text">├── API Client Configuration</text:span></text:p>
      <text:p text:style-name="P1"><text:span text:style-name="Source_20_Text">└── Route Initialization</text:span></text:p>
      <text:p text:style-name="Horizontal_20_Line"/>
      <text:h text:style-name="Heading_20_2" text:outline-level="2"><text:soft-page-break/>Execution Workflow</text:h>
      <text:p text:style-name="Preformatted_20_Text"><text:span text:style-name="Source_20_Text">User Opens Websit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Next.js Starts Applica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eact Root Creat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Global Layout Load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Application Providers Register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Client State Restor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Query Client Initializ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API Configuration Load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Initial Route Prepared</text:span></text:p>
      <text:p text:style-name="Preformatted_20_Text"><text:span text:style-name="Source_20_Text"><text:s text:c="8"/>│</text:span></text:p>
      <text:p text:style-name="Preformatted_20_Text"><text:span text:style-name="Source_20_Text"><text:s text:c="8"/>▼</text:span></text:p>
      <text:p text:style-name="P1"><text:span text:style-name="Source_20_Text">Proceed to Authentication Stage</text:span></text:p>
      <text:p text:style-name="Horizontal_20_Line"/>
      <text:h text:style-name="Heading_20_2" text:outline-level="2">Internal Processing</text:h>
      <text:h text:style-name="Heading_20_3" text:outline-level="3">Step 1 – Browser Request</text:h>
      <text:p text:style-name="Text_20_body">The browser requests the application by navigating to the website URL.</text:p>
      <text:p text:style-name="Text_20_body">The request reaches the Next.js server, which begins preparing the application for rendering.</text:p>
      <text:p text:style-name="Horizontal_20_Line"/>
      <text:h text:style-name="Heading_20_3" text:outline-level="3">Step 2 – Next.js Runtime Initialization</text:h>
      <text:p text:style-name="Text_20_body">The Next.js runtime initializes:</text:p>
      <text:list text:style-name="L6">
        <text:list-item>
          <text:p text:style-name="P7">App Router</text:p>
        </text:list-item>
        <text:list-item>
          <text:p text:style-name="P7">Root layout</text:p>
        </text:list-item>
        <text:list-item>
          <text:p text:style-name="P7">Global metadata</text:p>
        </text:list-item>
        <text:list-item>
          <text:p text:style-name="P7">Static assets</text:p>
        </text:list-item>
        <text:list-item>
          <text:p text:style-name="P7">Environment configuration</text:p>
        </text:list-item>
      </text:list>
      <text:p text:style-name="Text_20_body">At this point, the application shell becomes available.</text:p>
      <text:p text:style-name="Horizontal_20_Line"/>
      <text:h text:style-name="Heading_20_3" text:outline-level="3"><text:soft-page-break/>Step 3 – React Initialization</text:h>
      <text:p text:style-name="Text_20_body">React creates the application's component hierarchy.</text:p>
      <text:p text:style-name="Text_20_body">This includes:</text:p>
      <text:list text:style-name="L7">
        <text:list-item>
          <text:p text:style-name="P8">Root component</text:p>
        </text:list-item>
        <text:list-item>
          <text:p text:style-name="P8">Global layouts</text:p>
        </text:list-item>
        <text:list-item>
          <text:p text:style-name="P8">Shared UI structure</text:p>
        </text:list-item>
        <text:list-item>
          <text:p text:style-name="P8">Navigation container</text:p>
        </text:list-item>
      </text:list>
      <text:p text:style-name="Text_20_body">No business modules are loaded yet.</text:p>
      <text:p text:style-name="Horizontal_20_Line"/>
      <text:h text:style-name="Heading_20_3" text:outline-level="3">Step 4 – Provider Registration</text:h>
      <text:p text:style-name="Text_20_body">Application-wide providers are initialized.</text:p>
      <text:p text:style-name="Text_20_body">Typical providers include:</text:p>
      <text:p text:style-name="Preformatted_20_Text"><text:span text:style-name="Source_20_Text">Root Layout</text:span></text:p>
      <text:p text:style-name="Preformatted_20_Text"><text:span text:style-name="Source_20_Text">│</text:span></text:p>
      <text:p text:style-name="Preformatted_20_Text"><text:span text:style-name="Source_20_Text">├── Theme Provider</text:span></text:p>
      <text:p text:style-name="Preformatted_20_Text"><text:span text:style-name="Source_20_Text">├── Query Client Provider</text:span></text:p>
      <text:p text:style-name="Preformatted_20_Text"><text:span text:style-name="Source_20_Text">├── Authentication Provider</text:span></text:p>
      <text:p text:style-name="Preformatted_20_Text"><text:span text:style-name="Source_20_Text">├── Zustand Store</text:span></text:p>
      <text:p text:style-name="Preformatted_20_Text"><text:span text:style-name="Source_20_Text">├── Toast Provider</text:span></text:p>
      <text:p text:style-name="P1"><text:span text:style-name="Source_20_Text">└── Error Boundary</text:span></text:p>
      <text:p text:style-name="Text_20_body">These providers remain active throughout the application's lifecycle.</text:p>
      <text:p text:style-name="Horizontal_20_Line"/>
      <text:h text:style-name="Heading_20_3" text:outline-level="3">Step 5 – Client State Restoration</text:h>
      <text:p text:style-name="Text_20_body">Persisted client-side information is restored.</text:p>
      <text:p text:style-name="Text_20_body">Examples include:</text:p>
      <text:list text:style-name="L8">
        <text:list-item>
          <text:p text:style-name="P9">Selected theme</text:p>
        </text:list-item>
        <text:list-item>
          <text:p text:style-name="P9">Sidebar state</text:p>
        </text:list-item>
        <text:list-item>
          <text:p text:style-name="P9">User preferences</text:p>
        </text:list-item>
        <text:list-item>
          <text:p text:style-name="P9">Recently viewed project</text:p>
        </text:list-item>
        <text:list-item>
          <text:p text:style-name="P9">Cached UI settings</text:p>
        </text:list-item>
      </text:list>
      <text:p text:style-name="Text_20_body">This enables users to continue where they previously left off.</text:p>
      <text:p text:style-name="Horizontal_20_Line"/>
      <text:h text:style-name="Heading_20_3" text:outline-level="3">Step 6 – Query Client Initialization</text:h>
      <text:p text:style-name="Text_20_body">TanStack Query initializes its cache manager.</text:p>
      <text:p text:style-name="Text_20_body">Responsibilities include:</text:p>
      <text:list text:style-name="L9">
        <text:list-item>
          <text:p text:style-name="P10"><text:soft-page-break/>Creating query cache</text:p>
        </text:list-item>
        <text:list-item>
          <text:p text:style-name="P10">Configuring retry strategy</text:p>
        </text:list-item>
        <text:list-item>
          <text:p text:style-name="P10">Defining stale times</text:p>
        </text:list-item>
        <text:list-item>
          <text:p text:style-name="P10">Managing background refetches</text:p>
        </text:list-item>
        <text:list-item>
          <text:p text:style-name="P10">Preparing server-state synchronization</text:p>
        </text:list-item>
      </text:list>
      <text:p text:style-name="Text_20_body">No API requests are executed yet unless configured for prefetching.</text:p>
      <text:p text:style-name="Horizontal_20_Line"/>
      <text:h text:style-name="Heading_20_3" text:outline-level="3">Step 7 – API Configuration</text:h>
      <text:p text:style-name="Text_20_body">The application prepares communication with the backend.</text:p>
      <text:p text:style-name="Text_20_body">Configuration includes:</text:p>
      <text:list text:style-name="L10">
        <text:list-item>
          <text:p text:style-name="P11">Base API URL</text:p>
        </text:list-item>
        <text:list-item>
          <text:p text:style-name="P11">Default request headers</text:p>
        </text:list-item>
        <text:list-item>
          <text:p text:style-name="P11">Authentication interceptor</text:p>
        </text:list-item>
        <text:list-item>
          <text:p text:style-name="P11">Response interceptor</text:p>
        </text:list-item>
        <text:list-item>
          <text:p text:style-name="P11">Error handling strategy</text:p>
        </text:list-item>
      </text:list>
      <text:p text:style-name="Text_20_body">All future HTTP requests use this shared configuration.</text:p>
      <text:p text:style-name="Horizontal_20_Line"/>
      <text:h text:style-name="Heading_20_3" text:outline-level="3">Step 8 – Route Resolution</text:h>
      <text:p text:style-name="Text_20_body">Next.js determines which page should be rendered based on the requested URL.</text:p>
      <text:p text:style-name="Text_20_body">Examples:</text:p>
      <text:p text:style-name="Preformatted_20_Text"><text:span text:style-name="Source_20_Text">/</text:span></text:p>
      <text:p text:style-name="Preformatted_20_Text"/>
      <text:p text:style-name="Preformatted_20_Text"><text:span text:style-name="Source_20_Text"><text:s/>/dashboard</text:span></text:p>
      <text:p text:style-name="Preformatted_20_Text"/>
      <text:p text:style-name="Preformatted_20_Text"><text:span text:style-name="Source_20_Text"><text:s/>/search</text:span></text:p>
      <text:p text:style-name="Preformatted_20_Text"/>
      <text:p text:style-name="Preformatted_20_Text"><text:span text:style-name="Source_20_Text"><text:s/>/analytics</text:span></text:p>
      <text:p text:style-name="Preformatted_20_Text"/>
      <text:p text:style-name="Preformatted_20_Text"><text:span text:style-name="Source_20_Text"><text:s/>/projects</text:span></text:p>
      <text:p text:style-name="Preformatted_20_Text"/>
      <text:p text:style-name="P1"><text:span text:style-name="Source_20_Text"><text:s/>/settings</text:span></text:p>
      <text:p text:style-name="Text_20_body">The appropriate page component is selected, but protected routes still require authentication verification.</text:p>
      <text:p text:style-name="Horizontal_20_Line"/>
      <text:h text:style-name="Heading_20_3" text:outline-level="3">Step 9 – Handoff</text:h>
      <text:p text:style-name="Text_20_body">Once initialization completes successfully, execution moves to the Authentication &amp; Session Manager.</text:p>
      <text:p text:style-name="Text_20_body"><text:soft-page-break/>At this point:</text:p>
      <text:list text:style-name="L11">
        <text:list-item>
          <text:p text:style-name="P12">Runtime is ready.</text:p>
        </text:list-item>
        <text:list-item>
          <text:p text:style-name="P12">Providers are active.</text:p>
        </text:list-item>
        <text:list-item>
          <text:p text:style-name="P12">Client state is restored.</text:p>
        </text:list-item>
        <text:list-item>
          <text:p text:style-name="P12">API communication is configured.</text:p>
        </text:list-item>
        <text:list-item>
          <text:p text:style-name="P12">Routing is prepared.</text:p>
        </text:list-item>
      </text:list>
      <text:p text:style-name="Text_20_body">The application is now ready to determine whether the current user has a valid authenticated session.</text:p>
      <text:p text:style-name="Horizontal_20_Line"/>
      <text:h text:style-name="Heading_20_2" text:outline-level="2">Data Produced</text:h>
      <text:p text:style-name="Text_20_body">The bootstrap stage prepares the following runtime resources:</text:p>
      <table:table table:name="Table1" table:style-name="Table1">
        <table:table-column table:style-name="Table1.A"/>
        <table:table-column table:style-name="Table1.B"/>
        <table:table-header-rows>
          <table:table-row>
            <table:table-cell table:style-name="Table1.A1" office:value-type="string">
              <text:p text:style-name="Table_20_Heading">Resource</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React Runtime</text:p>
          </table:table-cell>
          <table:table-cell table:style-name="Table1.A1" office:value-type="string">
            <text:p text:style-name="Table_20_Contents">Component execution</text:p>
          </table:table-cell>
        </table:table-row>
        <table:table-row>
          <table:table-cell table:style-name="Table1.A1" office:value-type="string">
            <text:p text:style-name="Table_20_Contents">Global Providers</text:p>
          </table:table-cell>
          <table:table-cell table:style-name="Table1.A1" office:value-type="string">
            <text:p text:style-name="Table_20_Contents">Shared application services</text:p>
          </table:table-cell>
        </table:table-row>
        <table:table-row>
          <table:table-cell table:style-name="Table1.A1" office:value-type="string">
            <text:p text:style-name="Table_20_Contents">Zustand Store</text:p>
          </table:table-cell>
          <table:table-cell table:style-name="Table1.A1" office:value-type="string">
            <text:p text:style-name="Table_20_Contents">Client-side state</text:p>
          </table:table-cell>
        </table:table-row>
        <table:table-row>
          <table:table-cell table:style-name="Table1.A1" office:value-type="string">
            <text:p text:style-name="Table_20_Contents">Query Client</text:p>
          </table:table-cell>
          <table:table-cell table:style-name="Table1.A1" office:value-type="string">
            <text:p text:style-name="Table_20_Contents">Server-state management</text:p>
          </table:table-cell>
        </table:table-row>
        <table:table-row>
          <table:table-cell table:style-name="Table1.A1" office:value-type="string">
            <text:p text:style-name="Table_20_Contents">API Client</text:p>
          </table:table-cell>
          <table:table-cell table:style-name="Table1.A1" office:value-type="string">
            <text:p text:style-name="Table_20_Contents">Backend communication</text:p>
          </table:table-cell>
        </table:table-row>
        <table:table-row>
          <table:table-cell table:style-name="Table1.A1" office:value-type="string">
            <text:p text:style-name="Table_20_Contents">Active Route</text:p>
          </table:table-cell>
          <table:table-cell table:style-name="Table1.A1" office:value-type="string">
            <text:p text:style-name="Table_20_Contents">Current page resolution</text:p>
          </table:table-cell>
        </table:table-row>
        <table:table-row>
          <table:table-cell table:style-name="Table1.A1" office:value-type="string">
            <text:p text:style-name="Table_20_Contents">Environment Configuration</text:p>
          </table:table-cell>
          <table:table-cell table:style-name="Table1.A1" office:value-type="string">
            <text:p text:style-name="Table_20_Contents">Runtime settings</text:p>
          </table:table-cell>
        </table:table-row>
      </table:table>
      <text:p text:style-name="Text_20_body">These resources are consumed by every subsequent stage.</text:p>
      <text:p text:style-name="Horizontal_20_Line"/>
      <text:h text:style-name="Heading_20_2" text:outline-level="2">Failure Handling</text:h>
      <text:p text:style-name="Text_20_body">Possible initialization failures include:</text:p>
      <table:table table:name="Table2" table:style-name="Table2">
        <table:table-column table:style-name="Table2.A"/>
        <table:table-column table:style-name="Table2.B"/>
        <table:table-header-rows>
          <table:table-row>
            <table:table-cell table:style-name="Table2.A1" office:value-type="string">
              <text:p text:style-name="Table_20_Heading">Failure</text:p>
            </table:table-cell>
            <table:table-cell table:style-name="Table2.A1" office:value-type="string">
              <text:p text:style-name="Table_20_Heading">Handling Strategy</text:p>
            </table:table-cell>
          </table:table-row>
        </table:table-header-rows>
        <table:table-row>
          <table:table-cell table:style-name="Table2.A1" office:value-type="string">
            <text:p text:style-name="Table_20_Contents">Missing configuration</text:p>
          </table:table-cell>
          <table:table-cell table:style-name="Table2.A1" office:value-type="string">
            <text:p text:style-name="Table_20_Contents">Display startup error page</text:p>
          </table:table-cell>
        </table:table-row>
        <table:table-row>
          <table:table-cell table:style-name="Table2.A1" office:value-type="string">
            <text:p text:style-name="Table_20_Contents">Provider initialization failure</text:p>
          </table:table-cell>
          <table:table-cell table:style-name="Table2.A1" office:value-type="string">
            <text:p text:style-name="Table_20_Contents">Error Boundary fallback</text:p>
          </table:table-cell>
        </table:table-row>
        <table:table-row>
          <table:table-cell table:style-name="Table2.A1" office:value-type="string">
            <text:p text:style-name="Table_20_Contents">Invalid environment variables</text:p>
          </table:table-cell>
          <table:table-cell table:style-name="Table2.A1" office:value-type="string">
            <text:p text:style-name="Table_20_Contents">Prevent application startup</text:p>
          </table:table-cell>
        </table:table-row>
        <table:table-row>
          <table:table-cell table:style-name="Table2.A1" office:value-type="string">
            <text:p text:style-name="Table_20_Contents">API configuration failure</text:p>
          </table:table-cell>
          <table:table-cell table:style-name="Table2.A1" office:value-type="string">
            <text:p text:style-name="Table_20_Contents">Retry or show maintenance message</text:p>
          </table:table-cell>
        </table:table-row>
        <table:table-row>
          <table:table-cell table:style-name="Table2.A1" office:value-type="string">
            <text:p text:style-name="Table_20_Contents">Route loading failure</text:p>
          </table:table-cell>
          <table:table-cell table:style-name="Table2.A1" office:value-type="string">
            <text:p text:style-name="Table_20_Contents">Render 404 or error page</text:p>
          </table:table-cell>
        </table:table-row>
      </table:table>
      <text:p text:style-name="Text_20_body">The bootstrap stage ensures failures are detected before business logic begins.</text:p>
      <text:p text:style-name="Horizontal_20_Line"/>
      <text:h text:style-name="Heading_20_2" text:outline-level="2">Stage Output</text:h>
      <text:p text:style-name="Text_20_body">After successful completion, the Application Bootstrap stage provides:</text:p>
      <text:p text:style-name="Preformatted_20_Text"><text:span text:style-name="Source_20_Text">✓ React Application Running</text:span></text:p>
      <text:p text:style-name="Preformatted_20_Text"/>
      <text:p text:style-name="Preformatted_20_Text"><text:soft-page-break/><text:span text:style-name="Source_20_Text">✓ Global Providers Active</text:span></text:p>
      <text:p text:style-name="Preformatted_20_Text"/>
      <text:p text:style-name="Preformatted_20_Text"><text:span text:style-name="Source_20_Text">✓ Client State Restored</text:span></text:p>
      <text:p text:style-name="Preformatted_20_Text"/>
      <text:p text:style-name="Preformatted_20_Text"><text:span text:style-name="Source_20_Text">✓ Query Client Ready</text:span></text:p>
      <text:p text:style-name="Preformatted_20_Text"/>
      <text:p text:style-name="Preformatted_20_Text"><text:span text:style-name="Source_20_Text">✓ API Client Configured</text:span></text:p>
      <text:p text:style-name="Preformatted_20_Text"/>
      <text:p text:style-name="Preformatted_20_Text"><text:span text:style-name="Source_20_Text">✓ Route Initialized</text:span></text:p>
      <text:p text:style-name="Preformatted_20_Text"/>
      <text:p text:style-name="P1"><text:span text:style-name="Source_20_Text">✓ Runtime Environment Ready</text:span></text:p>
      <text:p text:style-name="Text_20_body">This output becomes the input for <text:span text:style-name="Strong_20_Emphasis">Stage 2 – Authentication &amp; Session Manager</text:span>, where the system verifies user identity, restores authenticated sessions, and determines access to protected application features.</text:p>
      <text:p text:style-name="Horizontal_20_Line"/>
      <text:h text:style-name="Heading_20_2" text:outline-level="2">Next Stage</text:h>
      <text:p text:style-name="Text_20_body"><text:span text:style-name="Strong_20_Emphasis">Stage 2 – Authentication &amp; Session Manager</text:span></text:p>
      <text:p text:style-name="Text_20_body">The next stage validates authentication tokens, restores user sessions, loads the authenticated user profile, applies authorization rules, and prepares secure access to the application's business modules.</text:p>
      <text:h text:style-name="Heading_20_1" text:outline-level="1">3. Stage 2 – Authentication &amp; Session Manager</text:h>
      <text:h text:style-name="Heading_20_2" text:outline-level="2">Overview</text:h>
      <text:p text:style-name="Text_20_body">The <text:span text:style-name="Strong_20_Emphasis">Authentication &amp; Session Manager</text:span> is responsible for verifying the identity of the user and establishing a secure application session.</text:p>
      <text:p text:style-name="Text_20_body">After the application has been initialized, this stage determines whether the current user is authenticated, validates access credentials, restores existing sessions, and loads essential user information before any protected business functionality becomes available.</text:p>
      <text:p text:style-name="Text_20_body">This stage acts as the security gateway for the entire application.</text:p>
      <text:p text:style-name="Horizontal_20_Line"/>
      <text:h text:style-name="Heading_20_2" text:outline-level="2">Primary Responsibilities</text:h>
      <text:p text:style-name="Text_20_body">The Authentication &amp; Session Manager is responsible for:</text:p>
      <text:list text:style-name="L12">
        <text:list-item>
          <text:p text:style-name="P13">Detecting authenticated users.</text:p>
        </text:list-item>
        <text:list-item>
          <text:p text:style-name="P13">Validating JWT access tokens.</text:p>
        </text:list-item>
        <text:list-item>
          <text:p text:style-name="P13">Restoring active sessions.</text:p>
        </text:list-item>
        <text:list-item>
          <text:p text:style-name="P13">Loading authenticated user information.</text:p>
        </text:list-item>
        <text:list-item>
          <text:p text:style-name="P13">Enforcing route protection.</text:p>
        </text:list-item>
        <text:list-item>
          <text:p text:style-name="P13"><text:soft-page-break/>Managing login and logout workflows.</text:p>
        </text:list-item>
        <text:list-item>
          <text:p text:style-name="P13">Handling expired or invalid sessions.</text:p>
        </text:list-item>
        <text:list-item>
          <text:p text:style-name="P13">Passing authenticated user data to the application.</text:p>
        </text:list-item>
      </text:list>
      <text:p text:style-name="Horizontal_20_Line"/>
      <text:h text:style-name="Heading_20_2" text:outline-level="2">Runtime Components</text:h>
      <text:p text:style-name="Preformatted_20_Text"><text:span text:style-name="Source_20_Text">Authentication &amp; Session Manager</text:span></text:p>
      <text:p text:style-name="Preformatted_20_Text"><text:span text:style-name="Source_20_Text">│</text:span></text:p>
      <text:p text:style-name="Preformatted_20_Text"><text:span text:style-name="Source_20_Text">├── Login Module</text:span></text:p>
      <text:p text:style-name="Preformatted_20_Text"><text:span text:style-name="Source_20_Text">├── JWT Validator</text:span></text:p>
      <text:p text:style-name="Preformatted_20_Text"><text:span text:style-name="Source_20_Text">├── Authentication Middleware</text:span></text:p>
      <text:p text:style-name="Preformatted_20_Text"><text:span text:style-name="Source_20_Text">├── Session Manager</text:span></text:p>
      <text:p text:style-name="Preformatted_20_Text"><text:span text:style-name="Source_20_Text">├── Authorization Guard</text:span></text:p>
      <text:p text:style-name="Preformatted_20_Text"><text:span text:style-name="Source_20_Text">├── User Loader</text:span></text:p>
      <text:p text:style-name="Preformatted_20_Text"><text:span text:style-name="Source_20_Text">├── Token Refresh Handler</text:span></text:p>
      <text:p text:style-name="P1"><text:span text:style-name="Source_20_Text">└── Logout Manager</text:span></text:p>
      <text:p text:style-name="Horizontal_20_Line"/>
      <text:h text:style-name="Heading_20_2" text:outline-level="2">Execution Workflow</text:h>
      <text:p text:style-name="Preformatted_20_Text"><text:span text:style-name="Source_20_Text">Application Bootstrap Complete</text:span></text:p>
      <text:p text:style-name="Preformatted_20_Text"><text:span text:style-name="Source_20_Text"><text:s text:c="13"/>│</text:span></text:p>
      <text:p text:style-name="Preformatted_20_Text"><text:span text:style-name="Source_20_Text"><text:s text:c="13"/>▼</text:span></text:p>
      <text:p text:style-name="Preformatted_20_Text"><text:span text:style-name="Source_20_Text">Check Existing Session</text:span></text:p>
      <text:p text:style-name="Preformatted_20_Text"><text:span text:style-name="Source_20_Text"><text:s text:c="13"/>│</text:span></text:p>
      <text:p text:style-name="Preformatted_20_Text"><text:span text:style-name="Source_20_Text"><text:s text:c="13"/>▼</text:span></text:p>
      <text:p text:style-name="Preformatted_20_Text"><text:span text:style-name="Source_20_Text">Access Token Available?</text:span></text:p>
      <text:p text:style-name="Preformatted_20_Text"><text:span text:style-name="Source_20_Text"><text:s text:c="6"/>│ <text:s text:c="13"/>│</text:span></text:p>
      <text:p text:style-name="Preformatted_20_Text"><text:span text:style-name="Source_20_Text"><text:s text:c="5"/>Yes <text:s text:c="12"/>No</text:span></text:p>
      <text:p text:style-name="Preformatted_20_Text"><text:span text:style-name="Source_20_Text"><text:s text:c="6"/>│ <text:s text:c="13"/>│</text:span></text:p>
      <text:p text:style-name="Preformatted_20_Text"><text:span text:style-name="Source_20_Text"><text:s text:c="6"/>▼ <text:s text:c="13"/>▼</text:span></text:p>
      <text:p text:style-name="Preformatted_20_Text"><text:span text:style-name="Source_20_Text">Validate JWT <text:s text:c="5"/>Redirect to Logi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oken Valid?</text:span></text:p>
      <text:p text:style-name="Preformatted_20_Text"><text:span text:style-name="Source_20_Text"><text:s/>│ <text:s text:c="11"/>│</text:span></text:p>
      <text:p text:style-name="Preformatted_20_Text"><text:span text:style-name="Source_20_Text">Yes <text:s text:c="9"/>No</text:span></text:p>
      <text:p text:style-name="Preformatted_20_Text"><text:span text:style-name="Source_20_Text"><text:s/>│ <text:s text:c="11"/>│</text:span></text:p>
      <text:p text:style-name="Preformatted_20_Text"><text:span text:style-name="Source_20_Text"><text:s/>▼ <text:s text:c="11"/>▼</text:span></text:p>
      <text:p text:style-name="Preformatted_20_Text"><text:span text:style-name="Source_20_Text">Load User <text:s text:c="2"/>Clear Session</text:span></text:p>
      <text:p text:style-name="Preformatted_20_Text"><text:span text:style-name="Source_20_Text"><text:s/>│ <text:s text:c="11"/>│</text:span></text:p>
      <text:p text:style-name="Preformatted_20_Text"><text:span text:style-name="Source_20_Text"><text:s/>▼ <text:s text:c="11"/>▼</text:span></text:p>
      <text:p text:style-name="Preformatted_20_Text"><text:span text:style-name="Source_20_Text">Initialize Session</text:span></text:p>
      <text:p text:style-name="Preformatted_20_Text"><text:span text:style-name="Source_20_Text"><text:s/>│</text:span></text:p>
      <text:p text:style-name="Preformatted_20_Text"><text:span text:style-name="Source_20_Text"><text:s/>▼</text:span></text:p>
      <text:p text:style-name="P1"><text:span text:style-name="Source_20_Text">Proceed to Application State Engine</text:span></text:p>
      <text:p text:style-name="Horizontal_20_Line"/>
      <text:h text:style-name="Heading_20_2" text:outline-level="2">Internal Processing</text:h>
      <text:h text:style-name="Heading_20_3" text:outline-level="3">Step 1 – Session Detection</text:h>
      <text:p text:style-name="Text_20_body">The application checks whether an authentication token already exists.</text:p>
      <text:p text:style-name="Text_20_body"><text:soft-page-break/>Possible storage locations include:</text:p>
      <text:list text:style-name="L13">
        <text:list-item>
          <text:p text:style-name="P14">HTTP-only cookies</text:p>
        </text:list-item>
        <text:list-item>
          <text:p text:style-name="P14">Secure browser cookies</text:p>
        </text:list-item>
        <text:list-item>
          <text:p text:style-name="P14">Memory storage</text:p>
        </text:list-item>
        <text:list-item>
          <text:p text:style-name="P14">Refresh token storage</text:p>
        </text:list-item>
      </text:list>
      <text:p text:style-name="Text_20_body">If no valid session exists, the user is treated as unauthenticated.</text:p>
      <text:p text:style-name="Horizontal_20_Line"/>
      <text:h text:style-name="Heading_20_3" text:outline-level="3">Step 2 – JWT Validation</text:h>
      <text:p text:style-name="Text_20_body">If an access token is found, it is sent to the backend for verification.</text:p>
      <text:p text:style-name="Text_20_body">Validation checks include:</text:p>
      <text:list text:style-name="L14">
        <text:list-item>
          <text:p text:style-name="P15">Token signature</text:p>
        </text:list-item>
        <text:list-item>
          <text:p text:style-name="P15">Expiration time</text:p>
        </text:list-item>
        <text:list-item>
          <text:p text:style-name="P15">User identity</text:p>
        </text:list-item>
        <text:list-item>
          <text:p text:style-name="P15">Issuer</text:p>
        </text:list-item>
        <text:list-item>
          <text:p text:style-name="P15">Audience (if configured)</text:p>
        </text:list-item>
      </text:list>
      <text:p text:style-name="Text_20_body">Only valid tokens are accepted.</text:p>
      <text:p text:style-name="Horizontal_20_Line"/>
      <text:h text:style-name="Heading_20_3" text:outline-level="3">Step 3 – Authentication Middleware</text:h>
      <text:p text:style-name="Text_20_body">The backend authentication middleware intercepts protected requests.</text:p>
      <text:p text:style-name="Text_20_body">Responsibilities include:</text:p>
      <text:list text:style-name="L15">
        <text:list-item>
          <text:p text:style-name="P16">Reading JWT</text:p>
        </text:list-item>
        <text:list-item>
          <text:p text:style-name="P16">Verifying authenticity</text:p>
        </text:list-item>
        <text:list-item>
          <text:p text:style-name="P16">Extracting user identifier</text:p>
        </text:list-item>
        <text:list-item>
          <text:p text:style-name="P16">Rejecting unauthorized requests</text:p>
        </text:list-item>
        <text:list-item>
          <text:p text:style-name="P16">Attaching authenticated user information to the request</text:p>
        </text:list-item>
      </text:list>
      <text:p text:style-name="Text_20_body">Only authenticated requests continue through the pipeline.</text:p>
      <text:p text:style-name="Horizontal_20_Line"/>
      <text:h text:style-name="Heading_20_3" text:outline-level="3">Step 4 – User Information Loading</text:h>
      <text:p text:style-name="Text_20_body">Once authentication succeeds, the system retrieves the user's profile.</text:p>
      <text:p text:style-name="Text_20_body">Typical information includes:</text:p>
      <text:p text:style-name="Preformatted_20_Text"><text:span text:style-name="Source_20_Text">Authenticated User</text:span></text:p>
      <text:p text:style-name="Preformatted_20_Text"><text:span text:style-name="Source_20_Text">│</text:span></text:p>
      <text:p text:style-name="Preformatted_20_Text"><text:soft-page-break/><text:span text:style-name="Source_20_Text">├── User ID</text:span></text:p>
      <text:p text:style-name="Preformatted_20_Text"><text:span text:style-name="Source_20_Text">├── Name</text:span></text:p>
      <text:p text:style-name="Preformatted_20_Text"><text:span text:style-name="Source_20_Text">├── Email</text:span></text:p>
      <text:p text:style-name="Preformatted_20_Text"><text:span text:style-name="Source_20_Text">├── Role</text:span></text:p>
      <text:p text:style-name="Preformatted_20_Text"><text:span text:style-name="Source_20_Text">├── Preferences</text:span></text:p>
      <text:p text:style-name="Preformatted_20_Text"><text:span text:style-name="Source_20_Text">├── Permissions</text:span></text:p>
      <text:p text:style-name="P1"><text:span text:style-name="Source_20_Text">└── Account Status</text:span></text:p>
      <text:p text:style-name="Text_20_body">This information becomes available throughout the application.</text:p>
      <text:p text:style-name="Horizontal_20_Line"/>
      <text:h text:style-name="Heading_20_3" text:outline-level="3">Step 5 – Authorization</text:h>
      <text:p text:style-name="Text_20_body">The system determines whether the authenticated user has permission to access the requested resource.</text:p>
      <text:p text:style-name="Text_20_body">Examples include:</text:p>
      <text:list text:style-name="L16">
        <text:list-item>
          <text:p text:style-name="P17">Dashboard access</text:p>
        </text:list-item>
        <text:list-item>
          <text:p text:style-name="P17">Project ownership</text:p>
        </text:list-item>
        <text:list-item>
          <text:p text:style-name="P17">Administrative settings</text:p>
        </text:list-item>
        <text:list-item>
          <text:p text:style-name="P17">Analytics features</text:p>
        </text:list-item>
        <text:list-item>
          <text:p text:style-name="P17">Future premium modules</text:p>
        </text:list-item>
      </text:list>
      <text:p text:style-name="Text_20_body">Authorization rules are applied before business logic executes.</text:p>
      <text:p text:style-name="Horizontal_20_Line"/>
      <text:h text:style-name="Heading_20_3" text:outline-level="3">Step 6 – Session Initialization</text:h>
      <text:p text:style-name="Text_20_body">A valid authenticated session is established.</text:p>
      <text:p text:style-name="Text_20_body">The application initializes:</text:p>
      <text:list text:style-name="L17">
        <text:list-item>
          <text:p text:style-name="P18">Current user</text:p>
        </text:list-item>
        <text:list-item>
          <text:p text:style-name="P18">Authentication status</text:p>
        </text:list-item>
        <text:list-item>
          <text:p text:style-name="P18">User permissions</text:p>
        </text:list-item>
        <text:list-item>
          <text:p text:style-name="P18">Session expiration</text:p>
        </text:list-item>
        <text:list-item>
          <text:p text:style-name="P18">Client authentication state</text:p>
        </text:list-item>
      </text:list>
      <text:p text:style-name="Text_20_body">The frontend can now safely access protected routes.</text:p>
      <text:p text:style-name="Horizontal_20_Line"/>
      <text:h text:style-name="Heading_20_3" text:outline-level="3">Step 7 – Protected Route Handling</text:h>
      <text:p text:style-name="Text_20_body">Before rendering protected pages, the router checks authentication status.</text:p>
      <text:p text:style-name="Preformatted_20_Text"><text:span text:style-name="Source_20_Text">Requested Rout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Public Route?</text:span></text:p>
      <text:p text:style-name="Preformatted_20_Text"><text:soft-page-break/><text:span text:style-name="Source_20_Text"><text:s/>│ <text:s text:c="12"/>│</text:span></text:p>
      <text:p text:style-name="Preformatted_20_Text"><text:span text:style-name="Source_20_Text">Yes <text:s text:c="10"/>No</text:span></text:p>
      <text:p text:style-name="Preformatted_20_Text"><text:span text:style-name="Source_20_Text"><text:s/>│ <text:s text:c="12"/>│</text:span></text:p>
      <text:p text:style-name="Preformatted_20_Text"><text:span text:style-name="Source_20_Text"><text:s/>▼ <text:s text:c="12"/>▼</text:span></text:p>
      <text:p text:style-name="Preformatted_20_Text"><text:span text:style-name="Source_20_Text">Render <text:s text:c="5"/>Check Session</text:span></text:p>
      <text:p text:style-name="Preformatted_20_Text"><text:span text:style-name="Source_20_Text"><text:s text:c="18"/>│</text:span></text:p>
      <text:p text:style-name="Preformatted_20_Text"><text:span text:style-name="Source_20_Text"><text:s text:c="18"/>▼</text:span></text:p>
      <text:p text:style-name="Preformatted_20_Text"><text:span text:style-name="Source_20_Text"><text:s text:c="9"/>Session Valid?</text:span></text:p>
      <text:p text:style-name="Preformatted_20_Text"><text:span text:style-name="Source_20_Text"><text:s text:c="11"/>│ <text:s text:c="9"/>│</text:span></text:p>
      <text:p text:style-name="Preformatted_20_Text"><text:span text:style-name="Source_20_Text"><text:s text:c="10"/>Yes <text:s text:c="8"/>No</text:span></text:p>
      <text:p text:style-name="Preformatted_20_Text"><text:span text:style-name="Source_20_Text"><text:s text:c="11"/>│ <text:s text:c="9"/>│</text:span></text:p>
      <text:p text:style-name="Preformatted_20_Text"><text:span text:style-name="Source_20_Text"><text:s text:c="11"/>▼ <text:s text:c="9"/>▼</text:span></text:p>
      <text:p text:style-name="P1"><text:span text:style-name="Source_20_Text"><text:s text:c="6"/>Render Page <text:s text:c="2"/>Redirect Login</text:span></text:p>
      <text:p text:style-name="Text_20_body">This prevents unauthorized access.</text:p>
      <text:p text:style-name="Horizontal_20_Line"/>
      <text:h text:style-name="Heading_20_3" text:outline-level="3">Step 8 – Token Expiration Handling</text:h>
      <text:p text:style-name="Text_20_body">If the token has expired, the application attempts recovery.</text:p>
      <text:p text:style-name="Text_20_body">Possible actions include:</text:p>
      <text:list text:style-name="L18">
        <text:list-item>
          <text:p text:style-name="P19">Refresh access token</text:p>
        </text:list-item>
        <text:list-item>
          <text:p text:style-name="P19">Re-authenticate user</text:p>
        </text:list-item>
        <text:list-item>
          <text:p text:style-name="P19">Clear invalid session</text:p>
        </text:list-item>
        <text:list-item>
          <text:p text:style-name="P19">Redirect to login</text:p>
        </text:list-item>
      </text:list>
      <text:p text:style-name="Text_20_body">The goal is to maintain a secure but seamless user experience.</text:p>
      <text:p text:style-name="Horizontal_20_Line"/>
      <text:h text:style-name="Heading_20_3" text:outline-level="3">Step 9 – Logout Processing</text:h>
      <text:p text:style-name="Text_20_body">When a user logs out:</text:p>
      <text:list text:style-name="L19">
        <text:list-item>
          <text:p text:style-name="P20">Authentication token is removed.</text:p>
        </text:list-item>
        <text:list-item>
          <text:p text:style-name="P20">Session information is cleared.</text:p>
        </text:list-item>
        <text:list-item>
          <text:p text:style-name="P20">Cached user data is invalidated.</text:p>
        </text:list-item>
        <text:list-item>
          <text:p text:style-name="P20">Protected state is reset.</text:p>
        </text:list-item>
        <text:list-item>
          <text:p text:style-name="P20">User is redirected to the login page.</text:p>
        </text:list-item>
      </text:list>
      <text:p text:style-name="Text_20_body">This ensures no sensitive information remains accessible.</text:p>
      <text:p text:style-name="Horizontal_20_Line"/>
      <text:h text:style-name="Heading_20_2" text:outline-level="2">Security Flow</text:h>
      <text:p text:style-name="Preformatted_20_Text"><text:span text:style-name="Source_20_Text">User Logi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Generate JWT</text:span></text:p>
      <text:p text:style-name="Preformatted_20_Text"><text:span text:style-name="Source_20_Text"><text:s text:c="6"/>│</text:span></text:p>
      <text:p text:style-name="Preformatted_20_Text"><text:soft-page-break/><text:span text:style-name="Source_20_Text"><text:s text:c="6"/>▼</text:span></text:p>
      <text:p text:style-name="Preformatted_20_Text"><text:span text:style-name="Source_20_Text">Store Securely</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Send Protected Request</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JWT Middlewar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Verify Toke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Load User</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Authorize Request</text:span></text:p>
      <text:p text:style-name="Preformatted_20_Text"><text:span text:style-name="Source_20_Text"><text:s text:c="6"/>│</text:span></text:p>
      <text:p text:style-name="Preformatted_20_Text"><text:span text:style-name="Source_20_Text"><text:s text:c="6"/>▼</text:span></text:p>
      <text:p text:style-name="P1"><text:span text:style-name="Source_20_Text">Continue Pipeline</text:span></text:p>
      <text:p text:style-name="Horizontal_20_Line"/>
      <text:h text:style-name="Heading_20_2" text:outline-level="2">Data Produced</text:h>
      <text:p text:style-name="Text_20_body">After successful authentication, the following information is available:</text:p>
      <table:table table:name="Table3" table:style-name="Table3">
        <table:table-column table:style-name="Table3.A"/>
        <table:table-column table:style-name="Table3.B"/>
        <table:table-header-rows>
          <table:table-row>
            <table:table-cell table:style-name="Table3.A1" office:value-type="string">
              <text:p text:style-name="Table_20_Heading">Data</text:p>
            </table:table-cell>
            <table:table-cell table:style-name="Table3.A1" office:value-type="string">
              <text:p text:style-name="Table_20_Heading">Purpose</text:p>
            </table:table-cell>
          </table:table-row>
        </table:table-header-rows>
        <table:table-row>
          <table:table-cell table:style-name="Table3.A1" office:value-type="string">
            <text:p text:style-name="Table_20_Contents">Authentication Status</text:p>
          </table:table-cell>
          <table:table-cell table:style-name="Table3.A1" office:value-type="string">
            <text:p text:style-name="Table_20_Contents">Logged in / Logged out</text:p>
          </table:table-cell>
        </table:table-row>
        <table:table-row>
          <table:table-cell table:style-name="Table3.A1" office:value-type="string">
            <text:p text:style-name="Table_20_Contents">User ID</text:p>
          </table:table-cell>
          <table:table-cell table:style-name="Table3.A1" office:value-type="string">
            <text:p text:style-name="Table_20_Contents">User identification</text:p>
          </table:table-cell>
        </table:table-row>
        <table:table-row>
          <table:table-cell table:style-name="Table3.A1" office:value-type="string">
            <text:p text:style-name="Table_20_Contents">User Profile</text:p>
          </table:table-cell>
          <table:table-cell table:style-name="Table3.A1" office:value-type="string">
            <text:p text:style-name="Table_20_Contents">Display and personalization</text:p>
          </table:table-cell>
        </table:table-row>
        <table:table-row>
          <table:table-cell table:style-name="Table3.A1" office:value-type="string">
            <text:p text:style-name="Table_20_Contents">User Role</text:p>
          </table:table-cell>
          <table:table-cell table:style-name="Table3.A1" office:value-type="string">
            <text:p text:style-name="Table_20_Contents">Authorization</text:p>
          </table:table-cell>
        </table:table-row>
        <table:table-row>
          <table:table-cell table:style-name="Table3.A1" office:value-type="string">
            <text:p text:style-name="Table_20_Contents">Permissions</text:p>
          </table:table-cell>
          <table:table-cell table:style-name="Table3.A1" office:value-type="string">
            <text:p text:style-name="Table_20_Contents">Feature access</text:p>
          </table:table-cell>
        </table:table-row>
        <table:table-row>
          <table:table-cell table:style-name="Table3.A1" office:value-type="string">
            <text:p text:style-name="Table_20_Contents">JWT Claims</text:p>
          </table:table-cell>
          <table:table-cell table:style-name="Table3.A1" office:value-type="string">
            <text:p text:style-name="Table_20_Contents">Secure request validation</text:p>
          </table:table-cell>
        </table:table-row>
        <table:table-row>
          <table:table-cell table:style-name="Table3.A1" office:value-type="string">
            <text:p text:style-name="Table_20_Contents">Session Information</text:p>
          </table:table-cell>
          <table:table-cell table:style-name="Table3.A1" office:value-type="string">
            <text:p text:style-name="Table_20_Contents">Active authenticated session</text:p>
          </table:table-cell>
        </table:table-row>
      </table:table>
      <text:p text:style-name="Text_20_body">These values are consumed by the Application State Engine.</text:p>
      <text:p text:style-name="Horizontal_20_Line"/>
      <text:h text:style-name="Heading_20_2" text:outline-level="2">Failure Handling</text:h>
      <text:p text:style-name="Text_20_body">Possible authentication failures include:</text:p>
      <table:table table:name="Table4" table:style-name="Table4">
        <table:table-column table:style-name="Table4.A"/>
        <table:table-column table:style-name="Table4.B"/>
        <table:table-header-rows>
          <table:table-row>
            <table:table-cell table:style-name="Table4.A1" office:value-type="string">
              <text:p text:style-name="Table_20_Heading">Failure</text:p>
            </table:table-cell>
            <table:table-cell table:style-name="Table4.A1" office:value-type="string">
              <text:p text:style-name="Table_20_Heading">Handling Strategy</text:p>
            </table:table-cell>
          </table:table-row>
        </table:table-header-rows>
        <table:table-row>
          <table:table-cell table:style-name="Table4.A1" office:value-type="string">
            <text:p text:style-name="Table_20_Contents">Missing token</text:p>
          </table:table-cell>
          <table:table-cell table:style-name="Table4.A1" office:value-type="string">
            <text:p text:style-name="Table_20_Contents">Redirect to login</text:p>
          </table:table-cell>
        </table:table-row>
        <table:table-row>
          <table:table-cell table:style-name="Table4.A1" office:value-type="string">
            <text:p text:style-name="Table_20_Contents">Invalid JWT</text:p>
          </table:table-cell>
          <table:table-cell table:style-name="Table4.A1" office:value-type="string">
            <text:p text:style-name="Table_20_Contents">Clear session and re-authenticate</text:p>
          </table:table-cell>
        </table:table-row>
        <table:table-row>
          <table:table-cell table:style-name="Table4.A1" office:value-type="string">
            <text:p text:style-name="Table_20_Contents">Expired token</text:p>
          </table:table-cell>
          <table:table-cell table:style-name="Table4.A1" office:value-type="string">
            <text:p text:style-name="Table_20_Contents">Refresh token or login again</text:p>
          </table:table-cell>
        </table:table-row>
        <table:table-row>
          <table:table-cell table:style-name="Table4.A1" office:value-type="string">
            <text:p text:style-name="Table_20_Contents">Unauthorized access</text:p>
          </table:table-cell>
          <table:table-cell table:style-name="Table4.A1" office:value-type="string">
            <text:p text:style-name="Table_20_Contents">Return HTTP 401/403</text:p>
          </table:table-cell>
        </table:table-row>
        <table:table-row>
          <table:table-cell table:style-name="Table4.A1" office:value-type="string">
            <text:p text:style-name="Table_20_Contents">Disabled account</text:p>
          </table:table-cell>
          <table:table-cell table:style-name="Table4.A1" office:value-type="string">
            <text:p text:style-name="Table_20_Contents">Prevent login and display appropriate message</text:p>
          </table:table-cell>
        </table:table-row>
        <table:table-row>
          <table:table-cell table:style-name="Table4.A1" office:value-type="string">
            <text:p text:style-name="Table_20_Contents">Backend authentication failure</text:p>
          </table:table-cell>
          <table:table-cell table:style-name="Table4.A1" office:value-type="string">
            <text:p text:style-name="Table_20_Contents">Display authentication error</text:p>
          </table:table-cell>
        </table:table-row>
      </table:table>
      <text:p text:style-name="Text_20_body">Security-related failures stop the execution pipeline before business processing begins.</text:p>
      <text:p text:style-name="Horizontal_20_Line"/>
      <text:h text:style-name="Heading_20_2" text:outline-level="2"><text:soft-page-break/>Stage Output</text:h>
      <text:p text:style-name="Text_20_body">After successful completion, the Authentication &amp; Session Manager provides:</text:p>
      <text:p text:style-name="Preformatted_20_Text"><text:span text:style-name="Source_20_Text">✓ User Authenticated</text:span></text:p>
      <text:p text:style-name="Preformatted_20_Text"/>
      <text:p text:style-name="Preformatted_20_Text"><text:span text:style-name="Source_20_Text">✓ JWT Verified</text:span></text:p>
      <text:p text:style-name="Preformatted_20_Text"/>
      <text:p text:style-name="Preformatted_20_Text"><text:span text:style-name="Source_20_Text">✓ Session Restored</text:span></text:p>
      <text:p text:style-name="Preformatted_20_Text"/>
      <text:p text:style-name="Preformatted_20_Text"><text:span text:style-name="Source_20_Text">✓ User Profile Loaded</text:span></text:p>
      <text:p text:style-name="Preformatted_20_Text"/>
      <text:p text:style-name="Preformatted_20_Text"><text:span text:style-name="Source_20_Text">✓ Permissions Applied</text:span></text:p>
      <text:p text:style-name="Preformatted_20_Text"/>
      <text:p text:style-name="Preformatted_20_Text"><text:span text:style-name="Source_20_Text">✓ Protected Routes Enabled</text:span></text:p>
      <text:p text:style-name="Preformatted_20_Text"/>
      <text:p text:style-name="P1"><text:span text:style-name="Source_20_Text">✓ Secure Session Established</text:span></text:p>
      <text:p text:style-name="Text_20_body">This authenticated context becomes the input for <text:span text:style-name="Strong_20_Emphasis">Stage 3 – Application State Engine</text:span>, where the application initializes and synchronizes client-side and server-side state for all business modules.</text:p>
      <text:p text:style-name="Horizontal_20_Line"/>
      <text:h text:style-name="Heading_20_2" text:outline-level="2">Next Stage</text:h>
      <text:p text:style-name="Text_20_body"><text:span text:style-name="Strong_20_Emphasis">Stage 3 – Application State Engine</text:span></text:p>
      <text:p text:style-name="Text_20_body">The next stage initializes global application state, synchronizes client and server data using Zustand and TanStack Query, manages caching, and prepares shared data for all business modules before request execution continues.</text:p>
      <text:h text:style-name="Heading_20_1" text:outline-level="1">4. Stage 3 – Application State Engine</text:h>
      <text:h text:style-name="Heading_20_2" text:outline-level="2">Overview</text:h>
      <text:p text:style-name="Text_20_body">The <text:span text:style-name="Strong_20_Emphasis">Application State Engine</text:span> manages all application state required during runtime. It coordinates both <text:span text:style-name="Strong_20_Emphasis">client-side state</text:span> and <text:span text:style-name="Strong_20_Emphasis">server-side state</text:span>, ensuring that data remains synchronized, efficient, and easily accessible across the application.</text:p>
      <text:p text:style-name="Text_20_body">Rather than allowing individual components to manage data independently, this stage centralizes state management, reducing duplication, improving performance, and simplifying maintenance.</text:p>
      <text:p text:style-name="Text_20_body">The Search System uses <text:span text:style-name="Strong_20_Emphasis">Zustand</text:span> for client state and <text:span text:style-name="Strong_20_Emphasis">TanStack Query</text:span> for server state.</text:p>
      <text:p text:style-name="Horizontal_20_Line"/>
      <text:h text:style-name="Heading_20_2" text:outline-level="2">Primary Responsibilities</text:h>
      <text:p text:style-name="Text_20_body">The Application State Engine is responsible for:</text:p>
      <text:list text:style-name="L20">
        <text:list-item>
          <text:p text:style-name="P21">Initializing global application state.</text:p>
        </text:list-item>
        <text:list-item>
          <text:p text:style-name="P21">Managing client-side UI state.</text:p>
        </text:list-item>
        <text:list-item>
          <text:p text:style-name="P21">Synchronizing server data.</text:p>
        </text:list-item>
        <text:list-item>
          <text:p text:style-name="P21"><text:soft-page-break/>Caching API responses.</text:p>
        </text:list-item>
        <text:list-item>
          <text:p text:style-name="P21">Updating shared state across modules.</text:p>
        </text:list-item>
        <text:list-item>
          <text:p text:style-name="P21">Invalidating stale data.</text:p>
        </text:list-item>
        <text:list-item>
          <text:p text:style-name="P21">Triggering automatic refetches.</text:p>
        </text:list-item>
        <text:list-item>
          <text:p text:style-name="P21">Providing state to business modules.</text:p>
        </text:list-item>
      </text:list>
      <text:p text:style-name="Horizontal_20_Line"/>
      <text:h text:style-name="Heading_20_2" text:outline-level="2">Runtime Components</text:h>
      <text:p text:style-name="Preformatted_20_Text"><text:span text:style-name="Source_20_Text">Application State Engine</text:span></text:p>
      <text:p text:style-name="Preformatted_20_Text"><text:span text:style-name="Source_20_Text">│</text:span></text:p>
      <text:p text:style-name="Preformatted_20_Text"><text:span text:style-name="Source_20_Text">├── Zustand Store</text:span></text:p>
      <text:p text:style-name="Preformatted_20_Text"><text:span text:style-name="Source_20_Text">├── TanStack Query Client</text:span></text:p>
      <text:p text:style-name="Preformatted_20_Text"><text:span text:style-name="Source_20_Text">├── Query Cache</text:span></text:p>
      <text:p text:style-name="Preformatted_20_Text"><text:span text:style-name="Source_20_Text">├── Mutation Manager</text:span></text:p>
      <text:p text:style-name="Preformatted_20_Text"><text:span text:style-name="Source_20_Text">├── Cache Invalidation Manager</text:span></text:p>
      <text:p text:style-name="Preformatted_20_Text"><text:span text:style-name="Source_20_Text">├── Background Sync</text:span></text:p>
      <text:p text:style-name="Preformatted_20_Text"><text:span text:style-name="Source_20_Text">├── UI State Manager</text:span></text:p>
      <text:p text:style-name="P1"><text:span text:style-name="Source_20_Text">└── Shared Global Store</text:span></text:p>
      <text:p text:style-name="Horizontal_20_Line"/>
      <text:h text:style-name="Heading_20_2" text:outline-level="2">Execution Workflow</text:h>
      <text:p text:style-name="Preformatted_20_Text"><text:span text:style-name="Source_20_Text">Authentication Complete</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Initialize Global Store</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Create Query Client</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Restore Cached Data</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Load Required Queries</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Update Shared State</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Provide State to Modules</text:span></text:p>
      <text:p text:style-name="Preformatted_20_Text"><text:span text:style-name="Source_20_Text"><text:s text:c="10"/>│</text:span></text:p>
      <text:p text:style-name="Preformatted_20_Text"><text:span text:style-name="Source_20_Text"><text:s text:c="10"/>▼</text:span></text:p>
      <text:p text:style-name="P1"><text:span text:style-name="Source_20_Text">Proceed to Request &amp; Module Orchestrator</text:span></text:p>
      <text:p text:style-name="Horizontal_20_Line"/>
      <text:h text:style-name="Heading_20_2" text:outline-level="2">Internal Processing</text:h>
      <text:h text:style-name="Heading_20_3" text:outline-level="3">Step 1 – Global Store Initialization</text:h>
      <text:p text:style-name="Text_20_body">The application initializes the global Zustand store.</text:p>
      <text:p text:style-name="Text_20_body"><text:soft-page-break/>The store contains lightweight client-side information that should remain available throughout the application.</text:p>
      <text:p text:style-name="Text_20_body">Examples include:</text:p>
      <text:list text:style-name="L21">
        <text:list-item>
          <text:p text:style-name="P22">Theme</text:p>
        </text:list-item>
        <text:list-item>
          <text:p text:style-name="P22">Sidebar status</text:p>
        </text:list-item>
        <text:list-item>
          <text:p text:style-name="P22">Selected project</text:p>
        </text:list-item>
        <text:list-item>
          <text:p text:style-name="P22">Current filters</text:p>
        </text:list-item>
        <text:list-item>
          <text:p text:style-name="P22">Search input</text:p>
        </text:list-item>
        <text:list-item>
          <text:p text:style-name="P22">Active navigation item</text:p>
        </text:list-item>
        <text:list-item>
          <text:p text:style-name="P22">Notification visibility</text:p>
        </text:list-item>
      </text:list>
      <text:p text:style-name="Text_20_body">These values are immediately accessible without API requests.</text:p>
      <text:p text:style-name="Horizontal_20_Line"/>
      <text:h text:style-name="Heading_20_3" text:outline-level="3">Step 2 – Query Client Creation</text:h>
      <text:p text:style-name="Text_20_body">TanStack Query initializes its server-state manager.</text:p>
      <text:p text:style-name="Text_20_body">The Query Client prepares:</text:p>
      <text:list text:style-name="L22">
        <text:list-item>
          <text:p text:style-name="P23">Query cache</text:p>
        </text:list-item>
        <text:list-item>
          <text:p text:style-name="P23">Mutation cache</text:p>
        </text:list-item>
        <text:list-item>
          <text:p text:style-name="P23">Retry strategy</text:p>
        </text:list-item>
        <text:list-item>
          <text:p text:style-name="P23">Cache lifecycle</text:p>
        </text:list-item>
        <text:list-item>
          <text:p text:style-name="P23">Background synchronization</text:p>
        </text:list-item>
      </text:list>
      <text:p text:style-name="Text_20_body">This client becomes responsible for every API request in the application.</text:p>
      <text:p text:style-name="Horizontal_20_Line"/>
      <text:h text:style-name="Heading_20_3" text:outline-level="3">Step 3 – Cache Restoration</text:h>
      <text:p text:style-name="Text_20_body">Previously cached server data is restored when appropriate.</text:p>
      <text:p text:style-name="Text_20_body">Examples:</text:p>
      <text:p text:style-name="Preformatted_20_Text"><text:span text:style-name="Source_20_Text">Cached Data</text:span></text:p>
      <text:p text:style-name="Preformatted_20_Text"><text:span text:style-name="Source_20_Text">│</text:span></text:p>
      <text:p text:style-name="Preformatted_20_Text"><text:span text:style-name="Source_20_Text">├── Dashboard Summary</text:span></text:p>
      <text:p text:style-name="Preformatted_20_Text"><text:span text:style-name="Source_20_Text">├── User Profile</text:span></text:p>
      <text:p text:style-name="Preformatted_20_Text"><text:span text:style-name="Source_20_Text">├── Search Results</text:span></text:p>
      <text:p text:style-name="Preformatted_20_Text"><text:span text:style-name="Source_20_Text">├── Analytics</text:span></text:p>
      <text:p text:style-name="Preformatted_20_Text"><text:span text:style-name="Source_20_Text">├── Projects</text:span></text:p>
      <text:p text:style-name="P1"><text:span text:style-name="Source_20_Text">└── Recent Activity</text:span></text:p>
      <text:p text:style-name="Text_20_body">If valid cached data exists, unnecessary API requests are avoided.</text:p>
      <text:p text:style-name="Horizontal_20_Line"/>
      <text:h text:style-name="Heading_20_3" text:outline-level="3"><text:soft-page-break/>Step 4 – Initial Query Execution</text:h>
      <text:p text:style-name="Text_20_body">The application determines which server data is required for the current page.</text:p>
      <text:p text:style-name="Text_20_body">Examples:</text:p>
      <table:table table:name="Table5" table:style-name="Table5">
        <table:table-column table:style-name="Table5.A"/>
        <table:table-column table:style-name="Table5.B"/>
        <table:table-header-rows>
          <table:table-row>
            <table:table-cell table:style-name="Table5.A1" office:value-type="string">
              <text:p text:style-name="Table_20_Heading">Route</text:p>
            </table:table-cell>
            <table:table-cell table:style-name="Table5.A1" office:value-type="string">
              <text:p text:style-name="Table_20_Heading">Initial Queries</text:p>
            </table:table-cell>
          </table:table-row>
        </table:table-header-rows>
        <table:table-row>
          <table:table-cell table:style-name="Table5.A1" office:value-type="string">
            <text:p text:style-name="Table_20_Contents">Dashboard</text:p>
          </table:table-cell>
          <table:table-cell table:style-name="Table5.A1" office:value-type="string">
            <text:p text:style-name="Table_20_Contents">Dashboard statistics</text:p>
          </table:table-cell>
        </table:table-row>
        <table:table-row>
          <table:table-cell table:style-name="Table5.A1" office:value-type="string">
            <text:p text:style-name="Table_20_Contents">Search</text:p>
          </table:table-cell>
          <table:table-cell table:style-name="Table5.A1" office:value-type="string">
            <text:p text:style-name="Table_20_Contents">Search history</text:p>
          </table:table-cell>
        </table:table-row>
        <table:table-row>
          <table:table-cell table:style-name="Table5.A1" office:value-type="string">
            <text:p text:style-name="Table_20_Contents">Projects</text:p>
          </table:table-cell>
          <table:table-cell table:style-name="Table5.A1" office:value-type="string">
            <text:p text:style-name="Table_20_Contents">Project list</text:p>
          </table:table-cell>
        </table:table-row>
        <table:table-row>
          <table:table-cell table:style-name="Table5.A1" office:value-type="string">
            <text:p text:style-name="Table_20_Contents">Analytics</text:p>
          </table:table-cell>
          <table:table-cell table:style-name="Table5.A1" office:value-type="string">
            <text:p text:style-name="Table_20_Contents">Analytics summary</text:p>
          </table:table-cell>
        </table:table-row>
        <table:table-row>
          <table:table-cell table:style-name="Table5.A1" office:value-type="string">
            <text:p text:style-name="Table_20_Contents">Profile</text:p>
          </table:table-cell>
          <table:table-cell table:style-name="Table5.A1" office:value-type="string">
            <text:p text:style-name="Table_20_Contents">User information</text:p>
          </table:table-cell>
        </table:table-row>
      </table:table>
      <text:p text:style-name="Text_20_body">Only the necessary queries are executed.</text:p>
      <text:p text:style-name="Horizontal_20_Line"/>
      <text:h text:style-name="Heading_20_3" text:outline-level="3">Step 5 – Server-State Synchronization</text:h>
      <text:p text:style-name="Text_20_body">After API responses are received:</text:p>
      <text:list text:style-name="L23">
        <text:list-item>
          <text:p text:style-name="P24">Query cache is updated.</text:p>
        </text:list-item>
        <text:list-item>
          <text:p text:style-name="P24">Components automatically receive new data.</text:p>
        </text:list-item>
        <text:list-item>
          <text:p text:style-name="P24">Loading states are removed.</text:p>
        </text:list-item>
        <text:list-item>
          <text:p text:style-name="P24">Errors are propagated if necessary.</text:p>
        </text:list-item>
      </text:list>
      <text:p text:style-name="Text_20_body">This keeps all UI components synchronized without manual updates.</text:p>
      <text:p text:style-name="Horizontal_20_Line"/>
      <text:h text:style-name="Heading_20_3" text:outline-level="3">Step 6 – Client-State Updates</text:h>
      <text:p text:style-name="Text_20_body">Client-side interactions update the Zustand store.</text:p>
      <text:p text:style-name="Text_20_body">Typical updates include:</text:p>
      <text:p text:style-name="Preformatted_20_Text"><text:span text:style-name="Source_20_Text">User Interac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Sidebar Toggle</text:span></text:p>
      <text:p text:style-name="Preformatted_20_Text"/>
      <text:p text:style-name="Preformatted_20_Text"><text:span text:style-name="Source_20_Text">Search Filters</text:span></text:p>
      <text:p text:style-name="Preformatted_20_Text"/>
      <text:p text:style-name="Preformatted_20_Text"><text:span text:style-name="Source_20_Text">Theme Change</text:span></text:p>
      <text:p text:style-name="Preformatted_20_Text"/>
      <text:p text:style-name="Preformatted_20_Text"><text:span text:style-name="Source_20_Text">Current Project</text:span></text:p>
      <text:p text:style-name="Preformatted_20_Text"/>
      <text:p text:style-name="Preformatted_20_Text"><text:span text:style-name="Source_20_Text">Selected Tab</text:span></text:p>
      <text:p text:style-name="Preformatted_20_Text"/>
      <text:p text:style-name="Preformatted_20_Text"><text:span text:style-name="Source_20_Text">Pagination</text:span></text:p>
      <text:p text:style-name="Preformatted_20_Text"/>
      <text:p text:style-name="P1"><text:span text:style-name="Source_20_Text">Sorting</text:span></text:p>
      <text:p text:style-name="Text_20_body">These updates happen instantly without contacting the backend.</text:p>
      <text:p text:style-name="Horizontal_20_Line"/>
      <text:h text:style-name="Heading_20_3" text:outline-level="3"><text:soft-page-break/>Step 7 – Mutation Processing</text:h>
      <text:p text:style-name="Text_20_body">When users modify data, TanStack Query executes mutations.</text:p>
      <text:p text:style-name="Text_20_body">Examples include:</text:p>
      <text:list text:style-name="L24">
        <text:list-item>
          <text:p text:style-name="P25">Creating projects</text:p>
        </text:list-item>
        <text:list-item>
          <text:p text:style-name="P25">Updating settings</text:p>
        </text:list-item>
        <text:list-item>
          <text:p text:style-name="P25">Editing profiles</text:p>
        </text:list-item>
        <text:list-item>
          <text:p text:style-name="P25">Saving search configurations</text:p>
        </text:list-item>
        <text:list-item>
          <text:p text:style-name="P25">Deleting records</text:p>
        </text:list-item>
      </text:list>
      <text:p text:style-name="Text_20_body">After successful mutations, affected queries are automatically refreshed.</text:p>
      <text:p text:style-name="Horizontal_20_Line"/>
      <text:h text:style-name="Heading_20_3" text:outline-level="3">Step 8 – Cache Invalidation</text:h>
      <text:p text:style-name="Text_20_body">Whenever server data changes, outdated cache entries are invalidated.</text:p>
      <text:p text:style-name="Text_20_body">Example flow:</text:p>
      <text:p text:style-name="Preformatted_20_Text"><text:span text:style-name="Source_20_Text">Update Project</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Mutation Success</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Invalidate Cach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Automatic Refetch</text:span></text:p>
      <text:p text:style-name="Preformatted_20_Text"><text:span text:style-name="Source_20_Text"><text:s text:c="6"/>│</text:span></text:p>
      <text:p text:style-name="Preformatted_20_Text"><text:span text:style-name="Source_20_Text"><text:s text:c="6"/>▼</text:span></text:p>
      <text:p text:style-name="P1"><text:span text:style-name="Source_20_Text">Updated UI</text:span></text:p>
      <text:p text:style-name="Text_20_body">This ensures users always see the latest data.</text:p>
      <text:p text:style-name="Horizontal_20_Line"/>
      <text:h text:style-name="Heading_20_3" text:outline-level="3">Step 9 – Background Synchronization</text:h>
      <text:p text:style-name="Text_20_body">TanStack Query continues maintaining fresh server data.</text:p>
      <text:p text:style-name="Text_20_body">Examples include:</text:p>
      <text:list text:style-name="L25">
        <text:list-item>
          <text:p text:style-name="P26">Window refocus refetch</text:p>
        </text:list-item>
        <text:list-item>
          <text:p text:style-name="P26">Network reconnection</text:p>
        </text:list-item>
        <text:list-item>
          <text:p text:style-name="P26">Periodic background refresh</text:p>
        </text:list-item>
        <text:list-item>
          <text:p text:style-name="P26">Automatic retry after temporary failures</text:p>
        </text:list-item>
      </text:list>
      <text:p text:style-name="Text_20_body">This minimizes stale information while reducing unnecessary requests.</text:p>
      <text:p text:style-name="Horizontal_20_Line"/>
      <text:h text:style-name="Heading_20_2" text:outline-level="2"><text:soft-page-break/>State Architecture</text:h>
      <text:p text:style-name="Preformatted_20_Text"><text:span text:style-name="Source_20_Text">Application State</text:span></text:p>
      <text:p text:style-name="Preformatted_20_Text"><text:span text:style-name="Source_20_Text">│</text:span></text:p>
      <text:p text:style-name="Preformatted_20_Text"><text:span text:style-name="Source_20_Text">├── Client State (Zustand)</text:span></text:p>
      <text:p text:style-name="Preformatted_20_Text"><text:span text:style-name="Source_20_Text">│ <text:s text:c="4"/>├── Theme</text:span></text:p>
      <text:p text:style-name="Preformatted_20_Text"><text:span text:style-name="Source_20_Text">│ <text:s text:c="4"/>├── Sidebar</text:span></text:p>
      <text:p text:style-name="Preformatted_20_Text"><text:span text:style-name="Source_20_Text">│ <text:s text:c="4"/>├── Filters</text:span></text:p>
      <text:p text:style-name="Preformatted_20_Text"><text:span text:style-name="Source_20_Text">│ <text:s text:c="4"/>├── UI Preferences</text:span></text:p>
      <text:p text:style-name="Preformatted_20_Text"><text:span text:style-name="Source_20_Text">│ <text:s text:c="4"/>└── Selected Project</text:span></text:p>
      <text:p text:style-name="Preformatted_20_Text"><text:span text:style-name="Source_20_Text">│</text:span></text:p>
      <text:p text:style-name="Preformatted_20_Text"><text:span text:style-name="Source_20_Text">└── Server State (TanStack Query)</text:span></text:p>
      <text:p text:style-name="Preformatted_20_Text"><text:span text:style-name="Source_20_Text"><text:s text:c="6"/>├── User</text:span></text:p>
      <text:p text:style-name="Preformatted_20_Text"><text:span text:style-name="Source_20_Text"><text:s text:c="6"/>├── Dashboard</text:span></text:p>
      <text:p text:style-name="Preformatted_20_Text"><text:span text:style-name="Source_20_Text"><text:s text:c="6"/>├── Search Results</text:span></text:p>
      <text:p text:style-name="Preformatted_20_Text"><text:span text:style-name="Source_20_Text"><text:s text:c="6"/>├── Analytics</text:span></text:p>
      <text:p text:style-name="Preformatted_20_Text"><text:span text:style-name="Source_20_Text"><text:s text:c="6"/>├── Projects</text:span></text:p>
      <text:p text:style-name="P1"><text:span text:style-name="Source_20_Text"><text:s text:c="6"/>└── Settings</text:span></text:p>
      <text:p text:style-name="Text_20_body">This separation ensures each type of state is managed by the most appropriate tool.</text:p>
      <text:p text:style-name="Horizontal_20_Line"/>
      <text:h text:style-name="Heading_20_2" text:outline-level="2">Data Produced</text:h>
      <text:p text:style-name="Text_20_body">The Application State Engine prepares the following shared resources:</text:p>
      <table:table table:name="Table6" table:style-name="Table6">
        <table:table-column table:style-name="Table6.A"/>
        <table:table-column table:style-name="Table6.B"/>
        <table:table-header-rows>
          <table:table-row>
            <table:table-cell table:style-name="Table6.A1" office:value-type="string">
              <text:p text:style-name="Table_20_Heading">Resource</text:p>
            </table:table-cell>
            <table:table-cell table:style-name="Table6.A1" office:value-type="string">
              <text:p text:style-name="Table_20_Heading">Purpose</text:p>
            </table:table-cell>
          </table:table-row>
        </table:table-header-rows>
        <table:table-row>
          <table:table-cell table:style-name="Table6.A1" office:value-type="string">
            <text:p text:style-name="Table_20_Contents">Global Store</text:p>
          </table:table-cell>
          <table:table-cell table:style-name="Table6.A1" office:value-type="string">
            <text:p text:style-name="Table_20_Contents">Client-side shared state</text:p>
          </table:table-cell>
        </table:table-row>
        <table:table-row>
          <table:table-cell table:style-name="Table6.A1" office:value-type="string">
            <text:p text:style-name="Table_20_Contents">Query Cache</text:p>
          </table:table-cell>
          <table:table-cell table:style-name="Table6.A1" office:value-type="string">
            <text:p text:style-name="Table_20_Contents">Cached server responses</text:p>
          </table:table-cell>
        </table:table-row>
        <table:table-row>
          <table:table-cell table:style-name="Table6.A1" office:value-type="string">
            <text:p text:style-name="Table_20_Contents">Active Queries</text:p>
          </table:table-cell>
          <table:table-cell table:style-name="Table6.A1" office:value-type="string">
            <text:p text:style-name="Table_20_Contents">Current server data</text:p>
          </table:table-cell>
        </table:table-row>
        <table:table-row>
          <table:table-cell table:style-name="Table6.A1" office:value-type="string">
            <text:p text:style-name="Table_20_Contents">Mutations</text:p>
          </table:table-cell>
          <table:table-cell table:style-name="Table6.A1" office:value-type="string">
            <text:p text:style-name="Table_20_Contents">Data modification operations</text:p>
          </table:table-cell>
        </table:table-row>
        <table:table-row>
          <table:table-cell table:style-name="Table6.A1" office:value-type="string">
            <text:p text:style-name="Table_20_Contents">Cached UI State</text:p>
          </table:table-cell>
          <table:table-cell table:style-name="Table6.A1" office:value-type="string">
            <text:p text:style-name="Table_20_Contents">Persistent interface state</text:p>
          </table:table-cell>
        </table:table-row>
        <table:table-row>
          <table:table-cell table:style-name="Table6.A1" office:value-type="string">
            <text:p text:style-name="Table_20_Contents">Shared Module Data</text:p>
          </table:table-cell>
          <table:table-cell table:style-name="Table6.A1" office:value-type="string">
            <text:p text:style-name="Table_20_Contents">Common application information</text:p>
          </table:table-cell>
        </table:table-row>
      </table:table>
      <text:p text:style-name="Text_20_body">These resources are consumed by all business modules during request processing.</text:p>
      <text:p text:style-name="Horizontal_20_Line"/>
      <text:h text:style-name="Heading_20_2" text:outline-level="2">Failure Handling</text:h>
      <text:p text:style-name="Text_20_body">Possible state management failures include:</text:p>
      <table:table table:name="Table7" table:style-name="Table7">
        <table:table-column table:style-name="Table7.A"/>
        <table:table-column table:style-name="Table7.B"/>
        <table:table-header-rows>
          <table:table-row>
            <table:table-cell table:style-name="Table7.A1" office:value-type="string">
              <text:p text:style-name="Table_20_Heading">Failure</text:p>
            </table:table-cell>
            <table:table-cell table:style-name="Table7.A1" office:value-type="string">
              <text:p text:style-name="Table_20_Heading">Handling Strategy</text:p>
            </table:table-cell>
          </table:table-row>
        </table:table-header-rows>
        <table:table-row>
          <table:table-cell table:style-name="Table7.A1" office:value-type="string">
            <text:p text:style-name="Table_20_Contents">Query failure</text:p>
          </table:table-cell>
          <table:table-cell table:style-name="Table7.A1" office:value-type="string">
            <text:p text:style-name="Table_20_Contents">Retry or display error state</text:p>
          </table:table-cell>
        </table:table-row>
        <table:table-row>
          <table:table-cell table:style-name="Table7.A1" office:value-type="string">
            <text:p text:style-name="Table_20_Contents">Cache corruption</text:p>
          </table:table-cell>
          <table:table-cell table:style-name="Table7.A1" office:value-type="string">
            <text:p text:style-name="Table_20_Contents">Clear cache and reload</text:p>
          </table:table-cell>
        </table:table-row>
        <table:table-row>
          <table:table-cell table:style-name="Table7.A1" office:value-type="string">
            <text:p text:style-name="Table_20_Contents">Mutation failure</text:p>
          </table:table-cell>
          <table:table-cell table:style-name="Table7.A1" office:value-type="string">
            <text:p text:style-name="Table_20_Contents">Rollback optimistic updates</text:p>
          </table:table-cell>
        </table:table-row>
        <table:table-row>
          <table:table-cell table:style-name="Table7.A1" office:value-type="string">
            <text:p text:style-name="Table_20_Contents">Network interruption</text:p>
          </table:table-cell>
          <table:table-cell table:style-name="Table7.A1" office:value-type="string">
            <text:p text:style-name="Table_20_Contents">Retry on reconnection</text:p>
          </table:table-cell>
        </table:table-row>
        <table:table-row>
          <table:table-cell table:style-name="Table7.A1" office:value-type="string">
            <text:p text:style-name="Table_20_Contents">Store initialization failure</text:p>
          </table:table-cell>
          <table:table-cell table:style-name="Table7.A1" office:value-type="string">
            <text:p text:style-name="Table_20_Contents">Reset to default state</text:p>
          </table:table-cell>
        </table:table-row>
        <table:table-row>
          <table:table-cell table:style-name="Table7.A1" office:value-type="string">
            <text:p text:style-name="Table_20_Contents">Invalid cached data</text:p>
          </table:table-cell>
          <table:table-cell table:style-name="Table7.A1" office:value-type="string">
            <text:p text:style-name="Table_20_Contents">Invalidate and refetch</text:p>
          </table:table-cell>
        </table:table-row>
      </table:table>
      <text:p text:style-name="Text_20_body">These mechanisms help maintain consistency between the client and the server.</text:p>
      <text:p text:style-name="Horizontal_20_Line"/>
      <text:h text:style-name="Heading_20_2" text:outline-level="2"><text:soft-page-break/>Stage Output</text:h>
      <text:p text:style-name="Text_20_body">After successful completion, the Application State Engine provides:</text:p>
      <text:p text:style-name="Preformatted_20_Text"><text:span text:style-name="Source_20_Text">✓ Global Store Initialized</text:span></text:p>
      <text:p text:style-name="Preformatted_20_Text"/>
      <text:p text:style-name="Preformatted_20_Text"><text:span text:style-name="Source_20_Text">✓ Query Client Ready</text:span></text:p>
      <text:p text:style-name="Preformatted_20_Text"/>
      <text:p text:style-name="Preformatted_20_Text"><text:span text:style-name="Source_20_Text">✓ Server Cache Available</text:span></text:p>
      <text:p text:style-name="Preformatted_20_Text"/>
      <text:p text:style-name="Preformatted_20_Text"><text:span text:style-name="Source_20_Text">✓ Required Queries Loaded</text:span></text:p>
      <text:p text:style-name="Preformatted_20_Text"/>
      <text:p text:style-name="Preformatted_20_Text"><text:span text:style-name="Source_20_Text">✓ Client State Active</text:span></text:p>
      <text:p text:style-name="Preformatted_20_Text"/>
      <text:p text:style-name="Preformatted_20_Text"><text:span text:style-name="Source_20_Text">✓ Shared Data Synchronized</text:span></text:p>
      <text:p text:style-name="Preformatted_20_Text"/>
      <text:p text:style-name="P1"><text:span text:style-name="Source_20_Text">✓ State Available Across Modules</text:span></text:p>
      <text:p text:style-name="Text_20_body">This shared application state becomes the input for <text:span text:style-name="Strong_20_Emphasis">Stage 4 – Request &amp; Module Orchestrator</text:span>, where incoming requests are routed to the appropriate business modules for processing.</text:p>
      <text:p text:style-name="Horizontal_20_Line"/>
      <text:h text:style-name="Heading_20_2" text:outline-level="2">Next Stage</text:h>
      <text:p text:style-name="Text_20_body"><text:span text:style-name="Strong_20_Emphasis">Stage 4 – Request &amp; Module Orchestrator</text:span></text:p>
      <text:p text:style-name="Text_20_body">The next stage analyzes incoming requests, resolves frontend and backend routes, identifies the target business module, applies middleware, and dispatches the request to the appropriate controller for execution.</text:p>
      <text:h text:style-name="Heading_20_1" text:outline-level="1">5. Stage 4 – Request &amp; Module Orchestrator</text:h>
      <text:h text:style-name="Heading_20_2" text:outline-level="2">Overview</text:h>
      <text:p text:style-name="Text_20_body">The <text:span text:style-name="Strong_20_Emphasis">Request &amp; Module Orchestrator</text:span> serves as the central dispatcher of the Search System. Once the application is initialized, the user is authenticated, and application state is available, every incoming request passes through this stage before reaching the business logic.</text:p>
      <text:p text:style-name="Text_20_body">Its primary responsibility is to identify <text:span text:style-name="Strong_20_Emphasis">what the user is trying to do</text:span>, determine <text:span text:style-name="Strong_20_Emphasis">which business module should handle the request</text:span>, apply any required middleware, and route the request to the correct controller.</text:p>
      <text:p text:style-name="Text_20_body">This stage does <text:span text:style-name="Strong_20_Emphasis">not</text:span> execute business logic—it only coordinates and delegates requests.</text:p>
      <text:p text:style-name="Horizontal_20_Line"/>
      <text:h text:style-name="Heading_20_2" text:outline-level="2">Primary Responsibilities</text:h>
      <text:p text:style-name="Text_20_body">The Request &amp; Module Orchestrator is responsible for:</text:p>
      <text:list text:style-name="L26">
        <text:list-item>
          <text:p text:style-name="P27">Receiving frontend requests.</text:p>
        </text:list-item>
        <text:list-item>
          <text:p text:style-name="P27">Resolving application routes.</text:p>
        </text:list-item>
        <text:list-item>
          <text:p text:style-name="P27"><text:soft-page-break/>Matching API endpoints.</text:p>
        </text:list-item>
        <text:list-item>
          <text:p text:style-name="P27">Applying middleware.</text:p>
        </text:list-item>
        <text:list-item>
          <text:p text:style-name="P27">Identifying target business modules.</text:p>
        </text:list-item>
        <text:list-item>
          <text:p text:style-name="P27">Dispatching requests to controllers.</text:p>
        </text:list-item>
        <text:list-item>
          <text:p text:style-name="P27">Handling unknown routes.</text:p>
        </text:list-item>
        <text:list-item>
          <text:p text:style-name="P27">Forwarding validated requests for business processing.</text:p>
        </text:list-item>
      </text:list>
      <text:p text:style-name="Horizontal_20_Line"/>
      <text:h text:style-name="Heading_20_2" text:outline-level="2">Runtime Components</text:h>
      <text:p text:style-name="Preformatted_20_Text"><text:span text:style-name="Source_20_Text">Request &amp; Module Orchestrator</text:span></text:p>
      <text:p text:style-name="Preformatted_20_Text"><text:span text:style-name="Source_20_Text">│</text:span></text:p>
      <text:p text:style-name="Preformatted_20_Text"><text:span text:style-name="Source_20_Text">├── Next.js App Router</text:span></text:p>
      <text:p text:style-name="Preformatted_20_Text"><text:span text:style-name="Source_20_Text">├── Express Router</text:span></text:p>
      <text:p text:style-name="Preformatted_20_Text"><text:span text:style-name="Source_20_Text">├── Route Matcher</text:span></text:p>
      <text:p text:style-name="Preformatted_20_Text"><text:span text:style-name="Source_20_Text">├── Middleware Pipeline</text:span></text:p>
      <text:p text:style-name="Preformatted_20_Text"><text:span text:style-name="Source_20_Text">├── Module Resolver</text:span></text:p>
      <text:p text:style-name="Preformatted_20_Text"><text:span text:style-name="Source_20_Text">├── Controller Dispatcher</text:span></text:p>
      <text:p text:style-name="Preformatted_20_Text"><text:span text:style-name="Source_20_Text">├── Request Validator</text:span></text:p>
      <text:p text:style-name="P1"><text:span text:style-name="Source_20_Text">└── Error Route Handler</text:span></text:p>
      <text:p text:style-name="Horizontal_20_Line"/>
      <text:h text:style-name="Heading_20_2" text:outline-level="2">Execution Workflow</text:h>
      <text:p text:style-name="Preformatted_20_Text"><text:span text:style-name="Source_20_Text">User Actio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Frontend Rout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API Request Generated</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Express Router</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Route Matching</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Middleware Executio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Resolve Business Modul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Dispatch Controller</text:span></text:p>
      <text:p text:style-name="Preformatted_20_Text"><text:span text:style-name="Source_20_Text"><text:s text:c="6"/>│</text:span></text:p>
      <text:p text:style-name="Preformatted_20_Text"><text:span text:style-name="Source_20_Text"><text:s text:c="6"/>▼</text:span></text:p>
      <text:p text:style-name="P1"><text:span text:style-name="Source_20_Text">Proceed to Business Processing Engine</text:span></text:p>
      <text:p text:style-name="Horizontal_20_Line"/>
      <text:h text:style-name="Heading_20_2" text:outline-level="2"><text:soft-page-break/>Internal Processing</text:h>
      <text:h text:style-name="Heading_20_3" text:outline-level="3">Step 1 – User Request Generation</text:h>
      <text:p text:style-name="Text_20_body">A request is generated whenever a user performs an action.</text:p>
      <text:p text:style-name="Text_20_body">Examples include:</text:p>
      <text:list text:style-name="L27">
        <text:list-item>
          <text:p text:style-name="P28">Searching for data</text:p>
        </text:list-item>
        <text:list-item>
          <text:p text:style-name="P28">Opening the dashboard</text:p>
        </text:list-item>
        <text:list-item>
          <text:p text:style-name="P28">Creating a project</text:p>
        </text:list-item>
        <text:list-item>
          <text:p text:style-name="P28">Updating settings</text:p>
        </text:list-item>
        <text:list-item>
          <text:p text:style-name="P28">Viewing analytics</text:p>
        </text:list-item>
        <text:list-item>
          <text:p text:style-name="P28">Editing profile information</text:p>
        </text:list-item>
      </text:list>
      <text:p text:style-name="Text_20_body">Each interaction eventually becomes an HTTP request to the backend.</text:p>
      <text:p text:style-name="Horizontal_20_Line"/>
      <text:h text:style-name="Heading_20_3" text:outline-level="3">Step 2 – Frontend Route Resolution</text:h>
      <text:p text:style-name="Text_20_body">The Next.js App Router determines which frontend page is currently active.</text:p>
      <text:p text:style-name="Text_20_body">Example routes:</text:p>
      <text:p text:style-name="Preformatted_20_Text"><text:span text:style-name="Source_20_Text">/</text:span></text:p>
      <text:p text:style-name="Preformatted_20_Text"/>
      <text:p text:style-name="Preformatted_20_Text"><text:span text:style-name="Source_20_Text"><text:s/>/login</text:span></text:p>
      <text:p text:style-name="Preformatted_20_Text"/>
      <text:p text:style-name="Preformatted_20_Text"><text:span text:style-name="Source_20_Text"><text:s/>/dashboard</text:span></text:p>
      <text:p text:style-name="Preformatted_20_Text"/>
      <text:p text:style-name="Preformatted_20_Text"><text:span text:style-name="Source_20_Text"><text:s/>/search</text:span></text:p>
      <text:p text:style-name="Preformatted_20_Text"/>
      <text:p text:style-name="Preformatted_20_Text"><text:span text:style-name="Source_20_Text"><text:s/>/analytics</text:span></text:p>
      <text:p text:style-name="Preformatted_20_Text"/>
      <text:p text:style-name="Preformatted_20_Text"><text:span text:style-name="Source_20_Text"><text:s/>/projects</text:span></text:p>
      <text:p text:style-name="Preformatted_20_Text"/>
      <text:p text:style-name="Preformatted_20_Text"><text:span text:style-name="Source_20_Text"><text:s/>/profile</text:span></text:p>
      <text:p text:style-name="Preformatted_20_Text"/>
      <text:p text:style-name="P1"><text:span text:style-name="Source_20_Text"><text:s/>/settings</text:span></text:p>
      <text:p text:style-name="Text_20_body">Frontend routing determines the UI, while backend routing determines business execution.</text:p>
      <text:p text:style-name="Horizontal_20_Line"/>
      <text:h text:style-name="Heading_20_3" text:outline-level="3">Step 3 – API Endpoint Resolution</text:h>
      <text:p text:style-name="Text_20_body">The frontend sends a request to the backend API.</text:p>
      <text:p text:style-name="Text_20_body">Example endpoints:</text:p>
      <text:p text:style-name="Preformatted_20_Text"><text:span text:style-name="Source_20_Text">POST <text:s text:c="2"/>/api/auth/login</text:span></text:p>
      <text:p text:style-name="Preformatted_20_Text"/>
      <text:p text:style-name="Preformatted_20_Text"><text:span text:style-name="Source_20_Text">GET <text:s text:c="3"/>/api/dashboard</text:span></text:p>
      <text:p text:style-name="Preformatted_20_Text"/>
      <text:p text:style-name="Preformatted_20_Text"><text:span text:style-name="Source_20_Text">GET <text:s text:c="3"/>/api/search</text:span></text:p>
      <text:p text:style-name="Preformatted_20_Text"><text:soft-page-break/></text:p>
      <text:p text:style-name="Preformatted_20_Text"><text:span text:style-name="Source_20_Text">POST <text:s text:c="2"/>/api/projects</text:span></text:p>
      <text:p text:style-name="Preformatted_20_Text"/>
      <text:p text:style-name="Preformatted_20_Text"><text:span text:style-name="Source_20_Text">PUT <text:s text:c="3"/>/api/profile</text:span></text:p>
      <text:p text:style-name="Preformatted_20_Text"/>
      <text:p text:style-name="P1"><text:span text:style-name="Source_20_Text">DELETE /api/projects/:id</text:span></text:p>
      <text:p text:style-name="Text_20_body">The Express Router receives the request.</text:p>
      <text:p text:style-name="Horizontal_20_Line"/>
      <text:h text:style-name="Heading_20_3" text:outline-level="3">Step 4 – Route Matching</text:h>
      <text:p text:style-name="Text_20_body">Express compares the incoming request with registered routes.</text:p>
      <text:p text:style-name="Text_20_body">Example:</text:p>
      <text:p text:style-name="Preformatted_20_Text"><text:span text:style-name="Source_20_Text">GET /api/search</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Search Router</text:span></text:p>
      <text:p text:style-name="Preformatted_20_Text"><text:span text:style-name="Source_20_Text"><text:s text:c="8"/>│</text:span></text:p>
      <text:p text:style-name="Preformatted_20_Text"><text:span text:style-name="Source_20_Text"><text:s text:c="8"/>▼</text:span></text:p>
      <text:p text:style-name="P1"><text:span text:style-name="Source_20_Text">Search Controller</text:span></text:p>
      <text:p text:style-name="Text_20_body">Only matching routes continue.</text:p>
      <text:p text:style-name="Text_20_body">Unknown routes return a <text:span text:style-name="Strong_20_Emphasis">404 Not Found</text:span> response.</text:p>
      <text:p text:style-name="Horizontal_20_Line"/>
      <text:h text:style-name="Heading_20_3" text:outline-level="3">Step 5 – Middleware Pipeline</text:h>
      <text:p text:style-name="Text_20_body">Before reaching the controller, middleware executes sequentially.</text:p>
      <text:p text:style-name="Text_20_body">Typical middleware includes:</text:p>
      <text:p text:style-name="Preformatted_20_Text"><text:span text:style-name="Source_20_Text">Incoming Request</text:span></text:p>
      <text:p text:style-name="Preformatted_20_Text"><text:span text:style-name="Source_20_Text">│</text:span></text:p>
      <text:p text:style-name="Preformatted_20_Text"><text:span text:style-name="Source_20_Text">├── Logger</text:span></text:p>
      <text:p text:style-name="Preformatted_20_Text"><text:span text:style-name="Source_20_Text">├── Authentication</text:span></text:p>
      <text:p text:style-name="Preformatted_20_Text"><text:span text:style-name="Source_20_Text">├── Authorization</text:span></text:p>
      <text:p text:style-name="Preformatted_20_Text"><text:span text:style-name="Source_20_Text">├── Validation</text:span></text:p>
      <text:p text:style-name="Preformatted_20_Text"><text:span text:style-name="Source_20_Text">├── Rate Limiter</text:span></text:p>
      <text:p text:style-name="Preformatted_20_Text"><text:span text:style-name="Source_20_Text">├── Error Handler</text:span></text:p>
      <text:p text:style-name="P1"><text:span text:style-name="Source_20_Text">└── Controller</text:span></text:p>
      <text:p text:style-name="Text_20_body">Each middleware performs a single responsibility before passing control to the next.</text:p>
      <text:p text:style-name="Horizontal_20_Line"/>
      <text:h text:style-name="Heading_20_3" text:outline-level="3">Step 6 – Request Validation</text:h>
      <text:p text:style-name="Text_20_body">Incoming request data is validated.</text:p>
      <text:p text:style-name="Text_20_body">Validation checks may include:</text:p>
      <text:list text:style-name="L28">
        <text:list-item>
          <text:p text:style-name="P29">Required fields</text:p>
        </text:list-item>
        <text:list-item>
          <text:p text:style-name="P29">Data types</text:p>
        </text:list-item>
        <text:list-item>
          <text:p text:style-name="P29"><text:soft-page-break/>Input length</text:p>
        </text:list-item>
        <text:list-item>
          <text:p text:style-name="P29">Parameter format</text:p>
        </text:list-item>
        <text:list-item>
          <text:p text:style-name="P29">Query parameters</text:p>
        </text:list-item>
        <text:list-item>
          <text:p text:style-name="P29">Request body structure</text:p>
        </text:list-item>
      </text:list>
      <text:p text:style-name="Text_20_body">Invalid requests are rejected before business processing begins.</text:p>
      <text:p text:style-name="Horizontal_20_Line"/>
      <text:h text:style-name="Heading_20_3" text:outline-level="3">Step 7 – Module Resolution</text:h>
      <text:p text:style-name="Text_20_body">The orchestrator determines which business module owns the request.</text:p>
      <text:p text:style-name="Preformatted_20_Text"><text:span text:style-name="Source_20_Text">Business Modules</text:span></text:p>
      <text:p text:style-name="Preformatted_20_Text"><text:span text:style-name="Source_20_Text">│</text:span></text:p>
      <text:p text:style-name="Preformatted_20_Text"><text:span text:style-name="Source_20_Text">├── Authentication</text:span></text:p>
      <text:p text:style-name="Preformatted_20_Text"><text:span text:style-name="Source_20_Text">├── Search</text:span></text:p>
      <text:p text:style-name="Preformatted_20_Text"><text:span text:style-name="Source_20_Text">├── Dashboard</text:span></text:p>
      <text:p text:style-name="Preformatted_20_Text"><text:span text:style-name="Source_20_Text">├── Analytics</text:span></text:p>
      <text:p text:style-name="Preformatted_20_Text"><text:span text:style-name="Source_20_Text">├── Projects</text:span></text:p>
      <text:p text:style-name="Preformatted_20_Text"><text:span text:style-name="Source_20_Text">├── User Profile</text:span></text:p>
      <text:p text:style-name="Preformatted_20_Text"><text:span text:style-name="Source_20_Text">├── Settings</text:span></text:p>
      <text:p text:style-name="P1"><text:span text:style-name="Source_20_Text">└── Notifications (Future)</text:span></text:p>
      <text:p text:style-name="Text_20_body">Each module maintains its own controllers, services, and business rules.</text:p>
      <text:p text:style-name="Horizontal_20_Line"/>
      <text:h text:style-name="Heading_20_3" text:outline-level="3">Step 8 – Controller Dispatch</text:h>
      <text:p text:style-name="Text_20_body">The selected controller receives the validated request.</text:p>
      <text:p text:style-name="Text_20_body">Example flow:</text:p>
      <text:p text:style-name="Preformatted_20_Text"><text:span text:style-name="Source_20_Text">GET /api/project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Projects Controller</text:span></text:p>
      <text:p text:style-name="Preformatted_20_Text"><text:span text:style-name="Source_20_Text"><text:s text:c="8"/>│</text:span></text:p>
      <text:p text:style-name="Preformatted_20_Text"><text:span text:style-name="Source_20_Text"><text:s text:c="8"/>▼</text:span></text:p>
      <text:p text:style-name="P1"><text:span text:style-name="Source_20_Text">Projects Service</text:span></text:p>
      <text:p text:style-name="Text_20_body">At this point, execution enters the Business Processing Engine.</text:p>
      <text:p text:style-name="Horizontal_20_Line"/>
      <text:h text:style-name="Heading_20_3" text:outline-level="3">Step 9 – Error Route Handling</text:h>
      <text:p text:style-name="Text_20_body">If routing fails, appropriate responses are returned.</text:p>
      <text:p text:style-name="Text_20_body">Examples:</text:p>
      <table:table table:name="Table8" table:style-name="Table8">
        <table:table-column table:style-name="Table8.A"/>
        <table:table-column table:style-name="Table8.B"/>
        <table:table-header-rows>
          <table:table-row>
            <table:table-cell table:style-name="Table8.A1" office:value-type="string">
              <text:p text:style-name="Table_20_Heading">Situation</text:p>
            </table:table-cell>
            <table:table-cell table:style-name="Table8.A1" office:value-type="string">
              <text:p text:style-name="Table_20_Heading">Response</text:p>
            </table:table-cell>
          </table:table-row>
        </table:table-header-rows>
        <table:table-row>
          <table:table-cell table:style-name="Table8.A1" office:value-type="string">
            <text:p text:style-name="Table_20_Contents">Unknown endpoint</text:p>
          </table:table-cell>
          <table:table-cell table:style-name="Table8.A1" office:value-type="string">
            <text:p text:style-name="Table_20_Contents">404 Not Found</text:p>
          </table:table-cell>
        </table:table-row>
        <table:table-row>
          <table:table-cell table:style-name="Table8.A1" office:value-type="string">
            <text:p text:style-name="Table_20_Contents">Invalid HTTP method</text:p>
          </table:table-cell>
          <table:table-cell table:style-name="Table8.A1" office:value-type="string">
            <text:p text:style-name="Table_20_Contents">405 Method Not Allowed</text:p>
          </table:table-cell>
        </table:table-row>
        <table:table-row>
          <table:table-cell table:style-name="Table8.A1" office:value-type="string">
            <text:p text:style-name="Table_20_Contents">Unauthorized access</text:p>
          </table:table-cell>
          <table:table-cell table:style-name="Table8.A1" office:value-type="string">
            <text:p text:style-name="Table_20_Contents">401 Unauthorized</text:p>
          </table:table-cell>
        </table:table-row>
        <text:soft-page-break/>
        <table:table-row>
          <table:table-cell table:style-name="Table8.A1" office:value-type="string">
            <text:p text:style-name="Table_20_Contents">Validation failure</text:p>
          </table:table-cell>
          <table:table-cell table:style-name="Table8.A1" office:value-type="string">
            <text:p text:style-name="Table_20_Contents">400 Bad Request</text:p>
          </table:table-cell>
        </table:table-row>
      </table:table>
      <text:p text:style-name="Text_20_body">The orchestrator prevents invalid requests from reaching business logic.</text:p>
      <text:p text:style-name="Horizontal_20_Line"/>
      <text:h text:style-name="Heading_20_2" text:outline-level="2">Routing Architecture</text:h>
      <text:p text:style-name="Preformatted_20_Text"><text:span text:style-name="Source_20_Text">Incoming Reques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Express Rout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text:s text:c="13"/>│</text:span></text:p>
      <text:p text:style-name="Preformatted_20_Text"><text:span text:style-name="Source_20_Text"><text:s text:c="8"/>▼ <text:s text:c="13"/>▼</text:span></text:p>
      <text:p text:style-name="Preformatted_20_Text"><text:span text:style-name="Source_20_Text">Authentication <text:s text:c="4"/>Dashboard</text:span></text:p>
      <text:p text:style-name="Preformatted_20_Text"><text:span text:style-name="Source_20_Text"><text:s text:c="8"/>│ <text:s text:c="13"/>│</text:span></text:p>
      <text:p text:style-name="Preformatted_20_Text"><text:span text:style-name="Source_20_Text"><text:s text:c="8"/>▼ <text:s text:c="13"/>▼</text:span></text:p>
      <text:p text:style-name="Preformatted_20_Text"><text:span text:style-name="Source_20_Text">Search <text:s text:c="8"/>Analytics</text:span></text:p>
      <text:p text:style-name="Preformatted_20_Text"><text:span text:style-name="Source_20_Text"><text:s text:c="8"/>│ <text:s text:c="13"/>│</text:span></text:p>
      <text:p text:style-name="Preformatted_20_Text"><text:span text:style-name="Source_20_Text"><text:s text:c="8"/>▼ <text:s text:c="13"/>▼</text:span></text:p>
      <text:p text:style-name="Preformatted_20_Text"><text:span text:style-name="Source_20_Text">Projects <text:s text:c="5"/>User Profile</text:span></text:p>
      <text:p text:style-name="Preformatted_20_Text"><text:span text:style-name="Source_20_Text"><text:s text:c="8"/>│</text:span></text:p>
      <text:p text:style-name="Preformatted_20_Text"><text:span text:style-name="Source_20_Text"><text:s text:c="8"/>▼</text:span></text:p>
      <text:p text:style-name="P1"><text:span text:style-name="Source_20_Text">Settings</text:span></text:p>
      <text:p text:style-name="Text_20_body">Each router delegates execution only to its corresponding module.</text:p>
      <text:p text:style-name="Horizontal_20_Line"/>
      <text:h text:style-name="Heading_20_2" text:outline-level="2">Data Produced</text:h>
      <text:p text:style-name="Text_20_body">The Request &amp; Module Orchestrator prepares the following execution context:</text:p>
      <table:table table:name="Table9" table:style-name="Table9">
        <table:table-column table:style-name="Table9.A"/>
        <table:table-column table:style-name="Table9.B"/>
        <table:table-header-rows>
          <table:table-row>
            <table:table-cell table:style-name="Table9.A1" office:value-type="string">
              <text:p text:style-name="Table_20_Heading">Resource</text:p>
            </table:table-cell>
            <table:table-cell table:style-name="Table9.A1" office:value-type="string">
              <text:p text:style-name="Table_20_Heading">Purpose</text:p>
            </table:table-cell>
          </table:table-row>
        </table:table-header-rows>
        <table:table-row>
          <table:table-cell table:style-name="Table9.A1" office:value-type="string">
            <text:p text:style-name="Table_20_Contents">Matched Route</text:p>
          </table:table-cell>
          <table:table-cell table:style-name="Table9.A1" office:value-type="string">
            <text:p text:style-name="Table_20_Contents">Identifies the requested endpoint</text:p>
          </table:table-cell>
        </table:table-row>
        <table:table-row>
          <table:table-cell table:style-name="Table9.A1" office:value-type="string">
            <text:p text:style-name="Table_20_Contents">Validated Request</text:p>
          </table:table-cell>
          <table:table-cell table:style-name="Table9.A1" office:value-type="string">
            <text:p text:style-name="Table_20_Contents">Sanitized request data</text:p>
          </table:table-cell>
        </table:table-row>
        <table:table-row>
          <table:table-cell table:style-name="Table9.A1" office:value-type="string">
            <text:p text:style-name="Table_20_Contents">Middleware Context</text:p>
          </table:table-cell>
          <table:table-cell table:style-name="Table9.A1" office:value-type="string">
            <text:p text:style-name="Table_20_Contents">Authentication and validation results</text:p>
          </table:table-cell>
        </table:table-row>
        <table:table-row>
          <table:table-cell table:style-name="Table9.A1" office:value-type="string">
            <text:p text:style-name="Table_20_Contents">Selected Module</text:p>
          </table:table-cell>
          <table:table-cell table:style-name="Table9.A1" office:value-type="string">
            <text:p text:style-name="Table_20_Contents">Business module responsible for execution</text:p>
          </table:table-cell>
        </table:table-row>
        <table:table-row>
          <table:table-cell table:style-name="Table9.A1" office:value-type="string">
            <text:p text:style-name="Table_20_Contents">Controller Instance</text:p>
          </table:table-cell>
          <table:table-cell table:style-name="Table9.A1" office:value-type="string">
            <text:p text:style-name="Table_20_Contents">Entry point for business logic</text:p>
          </table:table-cell>
        </table:table-row>
        <table:table-row>
          <table:table-cell table:style-name="Table9.A1" office:value-type="string">
            <text:p text:style-name="Table_20_Contents">Request Metadata</text:p>
          </table:table-cell>
          <table:table-cell table:style-name="Table9.A1" office:value-type="string">
            <text:p text:style-name="Table_20_Contents">Method, parameters, headers, user context</text:p>
          </table:table-cell>
        </table:table-row>
      </table:table>
      <text:p text:style-name="Text_20_body">This context is passed directly to the Business Processing Engine.</text:p>
      <text:p text:style-name="Horizontal_20_Line"/>
      <text:h text:style-name="Heading_20_2" text:outline-level="2">Failure Handling</text:h>
      <text:p text:style-name="Text_20_body">Possible orchestration failures include:</text:p>
      <table:table table:name="Table10" table:style-name="Table10">
        <table:table-column table:style-name="Table10.A"/>
        <table:table-column table:style-name="Table10.B"/>
        <table:table-header-rows>
          <table:table-row>
            <table:table-cell table:style-name="Table10.A1" office:value-type="string">
              <text:p text:style-name="Table_20_Heading">Failure</text:p>
            </table:table-cell>
            <table:table-cell table:style-name="Table10.A1" office:value-type="string">
              <text:p text:style-name="Table_20_Heading">Handling Strategy</text:p>
            </table:table-cell>
          </table:table-row>
        </table:table-header-rows>
        <table:table-row>
          <table:table-cell table:style-name="Table10.A1" office:value-type="string">
            <text:p text:style-name="Table_20_Contents">Unknown route</text:p>
          </table:table-cell>
          <table:table-cell table:style-name="Table10.A1" office:value-type="string">
            <text:p text:style-name="Table_20_Contents">Return 404 response</text:p>
          </table:table-cell>
        </table:table-row>
        <table:table-row>
          <table:table-cell table:style-name="Table10.A1" office:value-type="string">
            <text:p text:style-name="Table_20_Contents">Invalid request data</text:p>
          </table:table-cell>
          <table:table-cell table:style-name="Table10.A1" office:value-type="string">
            <text:p text:style-name="Table_20_Contents">Return validation error</text:p>
          </table:table-cell>
        </table:table-row>
        <table:table-row>
          <table:table-cell table:style-name="Table10.A1" office:value-type="string">
            <text:p text:style-name="Table_20_Contents">Unauthorized request</text:p>
          </table:table-cell>
          <table:table-cell table:style-name="Table10.A1" office:value-type="string">
            <text:p text:style-name="Table_20_Contents">Return 401 response</text:p>
          </table:table-cell>
        </table:table-row>
        <text:soft-page-break/>
        <table:table-row>
          <table:table-cell table:style-name="Table10.A1" office:value-type="string">
            <text:p text:style-name="Table_20_Contents">Forbidden operation</text:p>
          </table:table-cell>
          <table:table-cell table:style-name="Table10.A1" office:value-type="string">
            <text:p text:style-name="Table_20_Contents">Return 403 response</text:p>
          </table:table-cell>
        </table:table-row>
        <table:table-row>
          <table:table-cell table:style-name="Table10.A1" office:value-type="string">
            <text:p text:style-name="Table_20_Contents">Middleware failure</text:p>
          </table:table-cell>
          <table:table-cell table:style-name="Table10.A1" office:value-type="string">
            <text:p text:style-name="Table_20_Contents">Stop pipeline and return error</text:p>
          </table:table-cell>
        </table:table-row>
        <table:table-row>
          <table:table-cell table:style-name="Table10.A1" office:value-type="string">
            <text:p text:style-name="Table_20_Contents">Unsupported method</text:p>
          </table:table-cell>
          <table:table-cell table:style-name="Table10.A1" office:value-type="string">
            <text:p text:style-name="Table_20_Contents">Return 405 response</text:p>
          </table:table-cell>
        </table:table-row>
      </table:table>
      <text:p text:style-name="Text_20_body">These checks ensure that only valid, authorized requests proceed further.</text:p>
      <text:p text:style-name="Horizontal_20_Line"/>
      <text:h text:style-name="Heading_20_2" text:outline-level="2">Stage Output</text:h>
      <text:p text:style-name="Text_20_body">After successful completion, the Request &amp; Module Orchestrator provides:</text:p>
      <text:p text:style-name="Preformatted_20_Text"><text:span text:style-name="Source_20_Text">✓ Route Resolved</text:span></text:p>
      <text:p text:style-name="Preformatted_20_Text"/>
      <text:p text:style-name="Preformatted_20_Text"><text:span text:style-name="Source_20_Text">✓ Request Validated</text:span></text:p>
      <text:p text:style-name="Preformatted_20_Text"/>
      <text:p text:style-name="Preformatted_20_Text"><text:span text:style-name="Source_20_Text">✓ Middleware Executed</text:span></text:p>
      <text:p text:style-name="Preformatted_20_Text"/>
      <text:p text:style-name="Preformatted_20_Text"><text:span text:style-name="Source_20_Text">✓ Business Module Selected</text:span></text:p>
      <text:p text:style-name="Preformatted_20_Text"/>
      <text:p text:style-name="Preformatted_20_Text"><text:span text:style-name="Source_20_Text">✓ Controller Identified</text:span></text:p>
      <text:p text:style-name="Preformatted_20_Text"/>
      <text:p text:style-name="Preformatted_20_Text"><text:span text:style-name="Source_20_Text">✓ Execution Context Prepared</text:span></text:p>
      <text:p text:style-name="Preformatted_20_Text"/>
      <text:p text:style-name="P1"><text:span text:style-name="Source_20_Text">✓ Request Ready for Business Logic</text:span></text:p>
      <text:p text:style-name="Text_20_body">This execution context becomes the input for <text:span text:style-name="Strong_20_Emphasis">Stage 5 – Business Processing Engine</text:span>, where the application's core features, business rules, validations, and workflows are executed.</text:p>
      <text:p text:style-name="Horizontal_20_Line"/>
      <text:h text:style-name="Heading_20_2" text:outline-level="2">Next Stage</text:h>
      <text:p text:style-name="Text_20_body"><text:span text:style-name="Strong_20_Emphasis">Stage 5 – Business Processing Engine</text:span></text:p>
      <text:p text:style-name="Text_20_body">The next stage contains the core functionality of the Search System. Controllers coordinate requests, services execute business rules, validations are enforced, workflows are processed, and the appropriate database operations are prepared before interacting with the Data Access Engine.</text:p>
      <text:h text:style-name="Heading_20_1" text:outline-level="1">6. Stage 5 – Business Processing Engine</text:h>
      <text:h text:style-name="Heading_20_2" text:outline-level="2">Overview</text:h>
      <text:p text:style-name="Text_20_body">The <text:span text:style-name="Strong_20_Emphasis">Business Processing Engine</text:span> is the core of the Search System. It contains all application-specific functionality and implements the business rules that define how the platform behaves.</text:p>
      <text:p text:style-name="Text_20_body">After a request has been routed to the appropriate controller, this stage validates business requirements, executes workflows, coordinates services, and prepares the required database operations.</text:p>
      <text:p text:style-name="Text_20_body">Unlike previous stages that initialize or route requests, this stage is where the application's actual features are implemented.</text:p>
      <text:p text:style-name="Horizontal_20_Line"/>
      <text:h text:style-name="Heading_20_2" text:outline-level="2"><text:soft-page-break/>Primary Responsibilities</text:h>
      <text:p text:style-name="Text_20_body">The Business Processing Engine is responsible for:</text:p>
      <text:list text:style-name="L29">
        <text:list-item>
          <text:p text:style-name="P30">Executing business logic.</text:p>
        </text:list-item>
        <text:list-item>
          <text:p text:style-name="P30">Coordinating controllers and services.</text:p>
        </text:list-item>
        <text:list-item>
          <text:p text:style-name="P30">Enforcing business rules.</text:p>
        </text:list-item>
        <text:list-item>
          <text:p text:style-name="P30">Validating application-specific constraints.</text:p>
        </text:list-item>
        <text:list-item>
          <text:p text:style-name="P30">Processing workflows.</text:p>
        </text:list-item>
        <text:list-item>
          <text:p text:style-name="P30">Managing module interactions.</text:p>
        </text:list-item>
        <text:list-item>
          <text:p text:style-name="P30">Preparing database operations.</text:p>
        </text:list-item>
        <text:list-item>
          <text:p text:style-name="P30">Returning processed results to the Response Processing Engine.</text:p>
        </text:list-item>
      </text:list>
      <text:p text:style-name="Horizontal_20_Line"/>
      <text:h text:style-name="Heading_20_2" text:outline-level="2">Runtime Components</text:h>
      <text:p text:style-name="Preformatted_20_Text"><text:span text:style-name="Source_20_Text">Business Processing Engine</text:span></text:p>
      <text:p text:style-name="Preformatted_20_Text"><text:span text:style-name="Source_20_Text">│</text:span></text:p>
      <text:p text:style-name="Preformatted_20_Text"><text:span text:style-name="Source_20_Text">├── Controllers</text:span></text:p>
      <text:p text:style-name="Preformatted_20_Text"><text:span text:style-name="Source_20_Text">├── Services</text:span></text:p>
      <text:p text:style-name="Preformatted_20_Text"><text:span text:style-name="Source_20_Text">├── Business Validators</text:span></text:p>
      <text:p text:style-name="Preformatted_20_Text"><text:span text:style-name="Source_20_Text">├── Workflow Manager</text:span></text:p>
      <text:p text:style-name="Preformatted_20_Text"><text:span text:style-name="Source_20_Text">├── Search Module</text:span></text:p>
      <text:p text:style-name="Preformatted_20_Text"><text:span text:style-name="Source_20_Text">├── Dashboard Module</text:span></text:p>
      <text:p text:style-name="Preformatted_20_Text"><text:span text:style-name="Source_20_Text">├── Analytics Module</text:span></text:p>
      <text:p text:style-name="Preformatted_20_Text"><text:span text:style-name="Source_20_Text">├── Projects Module</text:span></text:p>
      <text:p text:style-name="Preformatted_20_Text"><text:span text:style-name="Source_20_Text">├── User Module</text:span></text:p>
      <text:p text:style-name="Preformatted_20_Text"><text:span text:style-name="Source_20_Text">├── Settings Module</text:span></text:p>
      <text:p text:style-name="P1"><text:span text:style-name="Source_20_Text">└── Notification Module (Future)</text:span></text:p>
      <text:p text:style-name="Horizontal_20_Line"/>
      <text:h text:style-name="Heading_20_2" text:outline-level="2">Execution Workflow</text:h>
      <text:p text:style-name="Preformatted_20_Text"><text:span text:style-name="Source_20_Text">Validated Reques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Controller Receives Reques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Business Valida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Execute Service Logic</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un Module Workflow</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Prepare Database Operation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eceive Data</text:span></text:p>
      <text:p text:style-name="Preformatted_20_Text"><text:soft-page-break/><text:span text:style-name="Source_20_Text"><text:s text:c="8"/>│</text:span></text:p>
      <text:p text:style-name="Preformatted_20_Text"><text:span text:style-name="Source_20_Text"><text:s text:c="8"/>▼</text:span></text:p>
      <text:p text:style-name="Preformatted_20_Text"><text:span text:style-name="Source_20_Text">Prepare Business Result</text:span></text:p>
      <text:p text:style-name="Preformatted_20_Text"><text:span text:style-name="Source_20_Text"><text:s text:c="8"/>│</text:span></text:p>
      <text:p text:style-name="Preformatted_20_Text"><text:span text:style-name="Source_20_Text"><text:s text:c="8"/>▼</text:span></text:p>
      <text:p text:style-name="P1"><text:span text:style-name="Source_20_Text">Proceed to Data Access Engine</text:span></text:p>
      <text:p text:style-name="Horizontal_20_Line"/>
      <text:h text:style-name="Heading_20_2" text:outline-level="2">Internal Processing</text:h>
      <text:h text:style-name="Heading_20_3" text:outline-level="3">Step 1 – Controller Execution</text:h>
      <text:p text:style-name="Text_20_body">The controller acts as the entry point for the selected business module.</text:p>
      <text:p text:style-name="Text_20_body">Responsibilities include:</text:p>
      <text:list text:style-name="L30">
        <text:list-item>
          <text:p text:style-name="P31">Receiving validated requests.</text:p>
        </text:list-item>
        <text:list-item>
          <text:p text:style-name="P31">Calling appropriate services.</text:p>
        </text:list-item>
        <text:list-item>
          <text:p text:style-name="P31">Handling request parameters.</text:p>
        </text:list-item>
        <text:list-item>
          <text:p text:style-name="P31">Coordinating execution.</text:p>
        </text:list-item>
        <text:list-item>
          <text:p text:style-name="P31">Returning processed responses.</text:p>
        </text:list-item>
      </text:list>
      <text:p text:style-name="Text_20_body">Controllers remain lightweight and avoid implementing complex business logic directly.</text:p>
      <text:p text:style-name="Horizontal_20_Line"/>
      <text:h text:style-name="Heading_20_3" text:outline-level="3">Step 2 – Service Layer Execution</text:h>
      <text:p text:style-name="Text_20_body">Services contain the application's business rules.</text:p>
      <text:p text:style-name="Text_20_body">Typical responsibilities include:</text:p>
      <text:list text:style-name="L31">
        <text:list-item>
          <text:p text:style-name="P32">Processing application workflows.</text:p>
        </text:list-item>
        <text:list-item>
          <text:p text:style-name="P32">Applying business constraints.</text:p>
        </text:list-item>
        <text:list-item>
          <text:p text:style-name="P32">Coordinating multiple operations.</text:p>
        </text:list-item>
        <text:list-item>
          <text:p text:style-name="P32">Performing calculations.</text:p>
        </text:list-item>
        <text:list-item>
          <text:p text:style-name="P32">Managing feature-specific logic.</text:p>
        </text:list-item>
      </text:list>
      <text:p text:style-name="Text_20_body">Services remain independent of HTTP-specific concerns.</text:p>
      <text:p text:style-name="Horizontal_20_Line"/>
      <text:h text:style-name="Heading_20_3" text:outline-level="3">Step 3 – Business Validation</text:h>
      <text:p text:style-name="Text_20_body">Beyond request validation, business-specific rules are enforced.</text:p>
      <text:p text:style-name="Text_20_body">Examples include:</text:p>
      <text:list text:style-name="L32">
        <text:list-item>
          <text:p text:style-name="P33">Project name uniqueness.</text:p>
        </text:list-item>
        <text:list-item>
          <text:p text:style-name="P33">Search quota limits.</text:p>
        </text:list-item>
        <text:list-item>
          <text:p text:style-name="P33"><text:soft-page-break/>User permission verification.</text:p>
        </text:list-item>
        <text:list-item>
          <text:p text:style-name="P33">Maximum dashboard widgets.</text:p>
        </text:list-item>
        <text:list-item>
          <text:p text:style-name="P33">Analytics access restrictions.</text:p>
        </text:list-item>
        <text:list-item>
          <text:p text:style-name="P33">Profile update policies.</text:p>
        </text:list-item>
      </text:list>
      <text:p text:style-name="Text_20_body">Only requests satisfying all business rules continue.</text:p>
      <text:p text:style-name="Horizontal_20_Line"/>
      <text:h text:style-name="Heading_20_3" text:outline-level="3">Step 4 – Module Workflow Processing</text:h>
      <text:p text:style-name="Text_20_body">Each feature follows its own internal workflow.</text:p>
      <text:p text:style-name="Preformatted_20_Text"><text:span text:style-name="Source_20_Text">Business Modules</text:span></text:p>
      <text:p text:style-name="Preformatted_20_Text"><text:span text:style-name="Source_20_Text">│</text:span></text:p>
      <text:p text:style-name="Preformatted_20_Text"><text:span text:style-name="Source_20_Text">├── Authentication</text:span></text:p>
      <text:p text:style-name="Preformatted_20_Text"><text:span text:style-name="Source_20_Text">│ <text:s text:c="4"/>├── Login</text:span></text:p>
      <text:p text:style-name="Preformatted_20_Text"><text:span text:style-name="Source_20_Text">│ <text:s text:c="4"/>├── Register</text:span></text:p>
      <text:p text:style-name="Preformatted_20_Text"><text:span text:style-name="Source_20_Text">│ <text:s text:c="4"/>└── Logout</text:span></text:p>
      <text:p text:style-name="Preformatted_20_Text"><text:span text:style-name="Source_20_Text">│</text:span></text:p>
      <text:p text:style-name="Preformatted_20_Text"><text:span text:style-name="Source_20_Text">├── Search</text:span></text:p>
      <text:p text:style-name="Preformatted_20_Text"><text:span text:style-name="Source_20_Text">│ <text:s text:c="4"/>├── Search Query</text:span></text:p>
      <text:p text:style-name="Preformatted_20_Text"><text:span text:style-name="Source_20_Text">│ <text:s text:c="4"/>├── Search History</text:span></text:p>
      <text:p text:style-name="Preformatted_20_Text"><text:span text:style-name="Source_20_Text">│ <text:s text:c="4"/>├── Saved Searches</text:span></text:p>
      <text:p text:style-name="Preformatted_20_Text"><text:span text:style-name="Source_20_Text">│ <text:s text:c="4"/>└── Filters</text:span></text:p>
      <text:p text:style-name="Preformatted_20_Text"><text:span text:style-name="Source_20_Text">│</text:span></text:p>
      <text:p text:style-name="Preformatted_20_Text"><text:span text:style-name="Source_20_Text">├── Dashboard</text:span></text:p>
      <text:p text:style-name="Preformatted_20_Text"><text:span text:style-name="Source_20_Text">│ <text:s text:c="4"/>├── Statistics</text:span></text:p>
      <text:p text:style-name="Preformatted_20_Text"><text:span text:style-name="Source_20_Text">│ <text:s text:c="4"/>├── Widgets</text:span></text:p>
      <text:p text:style-name="Preformatted_20_Text"><text:span text:style-name="Source_20_Text">│ <text:s text:c="4"/>└── Activity</text:span></text:p>
      <text:p text:style-name="Preformatted_20_Text"><text:span text:style-name="Source_20_Text">│</text:span></text:p>
      <text:p text:style-name="Preformatted_20_Text"><text:span text:style-name="Source_20_Text">├── Analytics</text:span></text:p>
      <text:p text:style-name="Preformatted_20_Text"><text:span text:style-name="Source_20_Text">│ <text:s text:c="4"/>├── Reports</text:span></text:p>
      <text:p text:style-name="Preformatted_20_Text"><text:span text:style-name="Source_20_Text">│ <text:s text:c="4"/>├── Charts</text:span></text:p>
      <text:p text:style-name="Preformatted_20_Text"><text:span text:style-name="Source_20_Text">│ <text:s text:c="4"/>└── Metrics</text:span></text:p>
      <text:p text:style-name="Preformatted_20_Text"><text:span text:style-name="Source_20_Text">│</text:span></text:p>
      <text:p text:style-name="Preformatted_20_Text"><text:span text:style-name="Source_20_Text">├── Projects</text:span></text:p>
      <text:p text:style-name="Preformatted_20_Text"><text:span text:style-name="Source_20_Text">│ <text:s text:c="4"/>├── Create</text:span></text:p>
      <text:p text:style-name="Preformatted_20_Text"><text:span text:style-name="Source_20_Text">│ <text:s text:c="4"/>├── Update</text:span></text:p>
      <text:p text:style-name="Preformatted_20_Text"><text:span text:style-name="Source_20_Text">│ <text:s text:c="4"/>├── Delete</text:span></text:p>
      <text:p text:style-name="Preformatted_20_Text"><text:span text:style-name="Source_20_Text">│ <text:s text:c="4"/>└── Archive</text:span></text:p>
      <text:p text:style-name="Preformatted_20_Text"><text:span text:style-name="Source_20_Text">│</text:span></text:p>
      <text:p text:style-name="Preformatted_20_Text"><text:span text:style-name="Source_20_Text">├── User</text:span></text:p>
      <text:p text:style-name="Preformatted_20_Text"><text:span text:style-name="Source_20_Text">│ <text:s text:c="4"/>├── Profile</text:span></text:p>
      <text:p text:style-name="Preformatted_20_Text"><text:span text:style-name="Source_20_Text">│ <text:s text:c="4"/>├── Preferences</text:span></text:p>
      <text:p text:style-name="Preformatted_20_Text"><text:span text:style-name="Source_20_Text">│ <text:s text:c="4"/>└── Account</text:span></text:p>
      <text:p text:style-name="Preformatted_20_Text"><text:span text:style-name="Source_20_Text">│</text:span></text:p>
      <text:p text:style-name="Preformatted_20_Text"><text:span text:style-name="Source_20_Text">└── Settings</text:span></text:p>
      <text:p text:style-name="Preformatted_20_Text"><text:span text:style-name="Source_20_Text"><text:s text:c="6"/>├── Theme</text:span></text:p>
      <text:p text:style-name="Preformatted_20_Text"><text:span text:style-name="Source_20_Text"><text:s text:c="6"/>├── Notifications</text:span></text:p>
      <text:p text:style-name="P1"><text:span text:style-name="Source_20_Text"><text:s text:c="6"/>└── Security</text:span></text:p>
      <text:p text:style-name="Text_20_body">Each module is isolated while sharing common infrastructure.</text:p>
      <text:p text:style-name="Horizontal_20_Line"/>
      <text:h text:style-name="Heading_20_3" text:outline-level="3">Step 5 – Cross-Module Coordination</text:h>
      <text:p text:style-name="Text_20_body">Some workflows involve multiple modules.</text:p>
      <text:p text:style-name="Text_20_body"><text:soft-page-break/>Example:</text:p>
      <text:p text:style-name="Preformatted_20_Text"><text:span text:style-name="Source_20_Text">Create Project</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Projects Modul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Analytics Updat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Dashboard Refresh</text:span></text:p>
      <text:p text:style-name="Preformatted_20_Text"><text:span text:style-name="Source_20_Text"><text:s text:c="6"/>│</text:span></text:p>
      <text:p text:style-name="Preformatted_20_Text"><text:span text:style-name="Source_20_Text"><text:s text:c="6"/>▼</text:span></text:p>
      <text:p text:style-name="P1"><text:span text:style-name="Source_20_Text">Notification Trigger</text:span></text:p>
      <text:p text:style-name="Text_20_body">This coordination ensures system consistency while maintaining module independence.</text:p>
      <text:p text:style-name="Horizontal_20_Line"/>
      <text:h text:style-name="Heading_20_3" text:outline-level="3">Step 6 – Database Operation Preparation</text:h>
      <text:p text:style-name="Text_20_body">Business services determine which database operations are required.</text:p>
      <text:p text:style-name="Text_20_body">Examples include:</text:p>
      <text:list text:style-name="L33">
        <text:list-item>
          <text:p text:style-name="P34">Read user information.</text:p>
        </text:list-item>
        <text:list-item>
          <text:p text:style-name="P34">Insert project.</text:p>
        </text:list-item>
        <text:list-item>
          <text:p text:style-name="P34">Update analytics.</text:p>
        </text:list-item>
        <text:list-item>
          <text:p text:style-name="P34">Delete search history.</text:p>
        </text:list-item>
        <text:list-item>
          <text:p text:style-name="P34">Aggregate dashboard statistics.</text:p>
        </text:list-item>
      </text:list>
      <text:p text:style-name="Text_20_body">The actual database interaction is delegated to the Data Access Engine.</text:p>
      <text:p text:style-name="Horizontal_20_Line"/>
      <text:h text:style-name="Heading_20_3" text:outline-level="3">Step 7 – Business Result Construction</text:h>
      <text:p text:style-name="Text_20_body">Once business processing is complete, the service prepares a structured result.</text:p>
      <text:p text:style-name="Text_20_body">The result may contain:</text:p>
      <text:list text:style-name="L34">
        <text:list-item>
          <text:p text:style-name="P35">Processed data.</text:p>
        </text:list-item>
        <text:list-item>
          <text:p text:style-name="P35">Success status.</text:p>
        </text:list-item>
        <text:list-item>
          <text:p text:style-name="P35">Error information.</text:p>
        </text:list-item>
        <text:list-item>
          <text:p text:style-name="P35">Validation messages.</text:p>
        </text:list-item>
        <text:list-item>
          <text:p text:style-name="P35">Metadata.</text:p>
        </text:list-item>
        <text:list-item>
          <text:p text:style-name="P35">Pagination details.</text:p>
        </text:list-item>
      </text:list>
      <text:p text:style-name="Text_20_body">This standardized output simplifies downstream processing.</text:p>
      <text:p text:style-name="Horizontal_20_Line"/>
      <text:h text:style-name="Heading_20_3" text:outline-level="3"><text:soft-page-break/>Step 8 – Exception Handling</text:h>
      <text:p text:style-name="Text_20_body">Business exceptions are handled before leaving the service layer.</text:p>
      <text:p text:style-name="Text_20_body">Examples include:</text:p>
      <table:table table:name="Table11" table:style-name="Table11">
        <table:table-column table:style-name="Table11.A"/>
        <table:table-column table:style-name="Table11.B"/>
        <table:table-header-rows>
          <table:table-row>
            <table:table-cell table:style-name="Table11.A1" office:value-type="string">
              <text:p text:style-name="Table_20_Heading">Business Condition</text:p>
            </table:table-cell>
            <table:table-cell table:style-name="Table11.A1" office:value-type="string">
              <text:p text:style-name="Table_20_Heading">Action</text:p>
            </table:table-cell>
          </table:table-row>
        </table:table-header-rows>
        <table:table-row>
          <table:table-cell table:style-name="Table11.A1" office:value-type="string">
            <text:p text:style-name="Table_20_Contents">Duplicate project</text:p>
          </table:table-cell>
          <table:table-cell table:style-name="Table11.A1" office:value-type="string">
            <text:p text:style-name="Table_20_Contents">Reject creation</text:p>
          </table:table-cell>
        </table:table-row>
        <table:table-row>
          <table:table-cell table:style-name="Table11.A1" office:value-type="string">
            <text:p text:style-name="Table_20_Contents">Invalid search filter</text:p>
          </table:table-cell>
          <table:table-cell table:style-name="Table11.A1" office:value-type="string">
            <text:p text:style-name="Table_20_Contents">Return validation error</text:p>
          </table:table-cell>
        </table:table-row>
        <table:table-row>
          <table:table-cell table:style-name="Table11.A1" office:value-type="string">
            <text:p text:style-name="Table_20_Contents">Access denied</text:p>
          </table:table-cell>
          <table:table-cell table:style-name="Table11.A1" office:value-type="string">
            <text:p text:style-name="Table_20_Contents">Return authorization error</text:p>
          </table:table-cell>
        </table:table-row>
        <table:table-row>
          <table:table-cell table:style-name="Table11.A1" office:value-type="string">
            <text:p text:style-name="Table_20_Contents">Resource not found</text:p>
          </table:table-cell>
          <table:table-cell table:style-name="Table11.A1" office:value-type="string">
            <text:p text:style-name="Table_20_Contents">Return not found response</text:p>
          </table:table-cell>
        </table:table-row>
        <table:table-row>
          <table:table-cell table:style-name="Table11.A1" office:value-type="string">
            <text:p text:style-name="Table_20_Contents">Quota exceeded</text:p>
          </table:table-cell>
          <table:table-cell table:style-name="Table11.A1" office:value-type="string">
            <text:p text:style-name="Table_20_Contents">Return limit exceeded message</text:p>
          </table:table-cell>
        </table:table-row>
      </table:table>
      <text:p text:style-name="Text_20_body">Business errors are converted into consistent application responses.</text:p>
      <text:p text:style-name="Horizontal_20_Line"/>
      <text:h text:style-name="Heading_20_3" text:outline-level="3">Step 9 – Handoff to Data Access Engine</text:h>
      <text:p text:style-name="Text_20_body">After business rules are applied, the required database operations are forwarded to the Data Access Engine.</text:p>
      <text:p text:style-name="Text_20_body">The Business Processing Engine does not directly interact with MongoDB. Instead, it delegates persistence responsibilities to the dedicated data layer.</text:p>
      <text:p text:style-name="Horizontal_20_Line"/>
      <text:h text:style-name="Heading_20_2" text:outline-level="2">Module Architecture</text:h>
      <text:p text:style-name="Preformatted_20_Text"><text:span text:style-name="Source_20_Text">Business Processing Engine</text:span></text:p>
      <text:p text:style-name="Preformatted_20_Text"><text:span text:style-name="Source_20_Text">│</text:span></text:p>
      <text:p text:style-name="Preformatted_20_Text"><text:span text:style-name="Source_20_Text">├── Authentication</text:span></text:p>
      <text:p text:style-name="Preformatted_20_Text"><text:span text:style-name="Source_20_Text">├── Search</text:span></text:p>
      <text:p text:style-name="Preformatted_20_Text"><text:span text:style-name="Source_20_Text">├── Dashboard</text:span></text:p>
      <text:p text:style-name="Preformatted_20_Text"><text:span text:style-name="Source_20_Text">├── Analytics</text:span></text:p>
      <text:p text:style-name="Preformatted_20_Text"><text:span text:style-name="Source_20_Text">├── Projects</text:span></text:p>
      <text:p text:style-name="Preformatted_20_Text"><text:span text:style-name="Source_20_Text">├── User</text:span></text:p>
      <text:p text:style-name="Preformatted_20_Text"><text:span text:style-name="Source_20_Text">└── Settings</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Controllers</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Services</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Business Rules</text:span></text:p>
      <text:p text:style-name="Preformatted_20_Text"><text:span text:style-name="Source_20_Text"><text:s text:c="9"/>│</text:span></text:p>
      <text:p text:style-name="Preformatted_20_Text"><text:span text:style-name="Source_20_Text"><text:s text:c="9"/>▼</text:span></text:p>
      <text:p text:style-name="P1"><text:span text:style-name="Source_20_Text">Database Requests</text:span></text:p>
      <text:p text:style-name="Text_20_body">This layered architecture promotes modularity, testability, and scalability.</text:p>
      <text:p text:style-name="Horizontal_20_Line"/>
      <text:h text:style-name="Heading_20_2" text:outline-level="2">Data Produced</text:h>
      <text:p text:style-name="Text_20_body">The Business Processing Engine generates the following outputs:</text:p>
      <table:table table:name="Table12" table:style-name="Table12">
        <table:table-column table:style-name="Table12.A"/>
        <table:table-column table:style-name="Table12.B"/>
        <table:table-header-rows>
          <text:soft-page-break/>
          <table:table-row>
            <table:table-cell table:style-name="Table12.A1" office:value-type="string">
              <text:p text:style-name="Table_20_Heading">Resource</text:p>
            </table:table-cell>
            <table:table-cell table:style-name="Table12.A1" office:value-type="string">
              <text:p text:style-name="Table_20_Heading">Purpose</text:p>
            </table:table-cell>
          </table:table-row>
        </table:table-header-rows>
        <table:table-row>
          <table:table-cell table:style-name="Table12.A1" office:value-type="string">
            <text:p text:style-name="Table_20_Contents">Business Result</text:p>
          </table:table-cell>
          <table:table-cell table:style-name="Table12.A1" office:value-type="string">
            <text:p text:style-name="Table_20_Contents">Processed application data</text:p>
          </table:table-cell>
        </table:table-row>
        <table:table-row>
          <table:table-cell table:style-name="Table12.A1" office:value-type="string">
            <text:p text:style-name="Table_20_Contents">Workflow Outcome</text:p>
          </table:table-cell>
          <table:table-cell table:style-name="Table12.A1" office:value-type="string">
            <text:p text:style-name="Table_20_Contents">Final result of business execution</text:p>
          </table:table-cell>
        </table:table-row>
        <table:table-row>
          <table:table-cell table:style-name="Table12.A1" office:value-type="string">
            <text:p text:style-name="Table_20_Contents">Database Instructions</text:p>
          </table:table-cell>
          <table:table-cell table:style-name="Table12.A1" office:value-type="string">
            <text:p text:style-name="Table_20_Contents">Required CRUD/aggregation operations</text:p>
          </table:table-cell>
        </table:table-row>
        <table:table-row>
          <table:table-cell table:style-name="Table12.A1" office:value-type="string">
            <text:p text:style-name="Table_20_Contents">Validation Results</text:p>
          </table:table-cell>
          <table:table-cell table:style-name="Table12.A1" office:value-type="string">
            <text:p text:style-name="Table_20_Contents">Business rule outcomes</text:p>
          </table:table-cell>
        </table:table-row>
        <table:table-row>
          <table:table-cell table:style-name="Table12.A1" office:value-type="string">
            <text:p text:style-name="Table_20_Contents">Module Context</text:p>
          </table:table-cell>
          <table:table-cell table:style-name="Table12.A1" office:value-type="string">
            <text:p text:style-name="Table_20_Contents">Feature-specific execution state</text:p>
          </table:table-cell>
        </table:table-row>
        <table:table-row>
          <table:table-cell table:style-name="Table12.A1" office:value-type="string">
            <text:p text:style-name="Table_20_Contents">Exception Information</text:p>
          </table:table-cell>
          <table:table-cell table:style-name="Table12.A1" office:value-type="string">
            <text:p text:style-name="Table_20_Contents">Structured business errors</text:p>
          </table:table-cell>
        </table:table-row>
      </table:table>
      <text:p text:style-name="Text_20_body">These outputs are consumed by the Data Access Engine.</text:p>
      <text:p text:style-name="Horizontal_20_Line"/>
      <text:h text:style-name="Heading_20_2" text:outline-level="2">Failure Handling</text:h>
      <text:p text:style-name="Text_20_body">Possible business processing failures include:</text:p>
      <table:table table:name="Table13" table:style-name="Table13">
        <table:table-column table:style-name="Table13.A"/>
        <table:table-column table:style-name="Table13.B"/>
        <table:table-header-rows>
          <table:table-row>
            <table:table-cell table:style-name="Table13.A1" office:value-type="string">
              <text:p text:style-name="Table_20_Heading">Failure</text:p>
            </table:table-cell>
            <table:table-cell table:style-name="Table13.A1" office:value-type="string">
              <text:p text:style-name="Table_20_Heading">Handling Strategy</text:p>
            </table:table-cell>
          </table:table-row>
        </table:table-header-rows>
        <table:table-row>
          <table:table-cell table:style-name="Table13.A1" office:value-type="string">
            <text:p text:style-name="Table_20_Contents">Business rule violation</text:p>
          </table:table-cell>
          <table:table-cell table:style-name="Table13.A1" office:value-type="string">
            <text:p text:style-name="Table_20_Contents">Return validation error</text:p>
          </table:table-cell>
        </table:table-row>
        <table:table-row>
          <table:table-cell table:style-name="Table13.A1" office:value-type="string">
            <text:p text:style-name="Table_20_Contents">Permission failure</text:p>
          </table:table-cell>
          <table:table-cell table:style-name="Table13.A1" office:value-type="string">
            <text:p text:style-name="Table_20_Contents">Deny operation</text:p>
          </table:table-cell>
        </table:table-row>
        <table:table-row>
          <table:table-cell table:style-name="Table13.A1" office:value-type="string">
            <text:p text:style-name="Table_20_Contents">Missing resource</text:p>
          </table:table-cell>
          <table:table-cell table:style-name="Table13.A1" office:value-type="string">
            <text:p text:style-name="Table_20_Contents">Return not found</text:p>
          </table:table-cell>
        </table:table-row>
        <table:table-row>
          <table:table-cell table:style-name="Table13.A1" office:value-type="string">
            <text:p text:style-name="Table_20_Contents">Workflow interruption</text:p>
          </table:table-cell>
          <table:table-cell table:style-name="Table13.A1" office:value-type="string">
            <text:p text:style-name="Table_20_Contents">Abort transaction</text:p>
          </table:table-cell>
        </table:table-row>
        <table:table-row>
          <table:table-cell table:style-name="Table13.A1" office:value-type="string">
            <text:p text:style-name="Table_20_Contents">Unexpected service exception</text:p>
          </table:table-cell>
          <table:table-cell table:style-name="Table13.A1" office:value-type="string">
            <text:p text:style-name="Table_20_Contents">Log and return server error</text:p>
          </table:table-cell>
        </table:table-row>
        <table:table-row>
          <table:table-cell table:style-name="Table13.A1" office:value-type="string">
            <text:p text:style-name="Table_20_Contents">Invalid module state</text:p>
          </table:table-cell>
          <table:table-cell table:style-name="Table13.A1" office:value-type="string">
            <text:p text:style-name="Table_20_Contents">Reset workflow and notify caller</text:p>
          </table:table-cell>
        </table:table-row>
      </table:table>
      <text:p text:style-name="Text_20_body">The engine ensures failures are handled consistently before data persistence occurs.</text:p>
      <text:p text:style-name="Horizontal_20_Line"/>
      <text:h text:style-name="Heading_20_2" text:outline-level="2">Stage Output</text:h>
      <text:p text:style-name="Text_20_body">After successful completion, the Business Processing Engine provides:</text:p>
      <text:p text:style-name="Preformatted_20_Text"><text:span text:style-name="Source_20_Text">✓ Controller Executed</text:span></text:p>
      <text:p text:style-name="Preformatted_20_Text"/>
      <text:p text:style-name="Preformatted_20_Text"><text:span text:style-name="Source_20_Text">✓ Business Rules Applied</text:span></text:p>
      <text:p text:style-name="Preformatted_20_Text"/>
      <text:p text:style-name="Preformatted_20_Text"><text:span text:style-name="Source_20_Text">✓ Services Completed</text:span></text:p>
      <text:p text:style-name="Preformatted_20_Text"/>
      <text:p text:style-name="Preformatted_20_Text"><text:span text:style-name="Source_20_Text">✓ Module Workflow Processed</text:span></text:p>
      <text:p text:style-name="Preformatted_20_Text"/>
      <text:p text:style-name="Preformatted_20_Text"><text:span text:style-name="Source_20_Text">✓ Validation Successful</text:span></text:p>
      <text:p text:style-name="Preformatted_20_Text"/>
      <text:p text:style-name="Preformatted_20_Text"><text:span text:style-name="Source_20_Text">✓ Database Operations Prepared</text:span></text:p>
      <text:p text:style-name="Preformatted_20_Text"/>
      <text:p text:style-name="P1"><text:span text:style-name="Source_20_Text">✓ Business Result Generated</text:span></text:p>
      <text:p text:style-name="Text_20_body">This prepared execution context becomes the input for <text:span text:style-name="Strong_20_Emphasis">Stage 6 – Data Access Engine</text:span>, where MongoDB operations are executed through Mongoose and persistent data is retrieved or modified.</text:p>
      <text:p text:style-name="Horizontal_20_Line"/>
      <text:h text:style-name="Heading_20_2" text:outline-level="2">Next Stage</text:h>
      <text:p text:style-name="Text_20_body"><text:span text:style-name="Strong_20_Emphasis">Stage 6 – Data Access Engine</text:span></text:p>
      <text:p text:style-name="Text_20_body"><text:soft-page-break/>The next stage executes all database interactions. It translates business requests into MongoDB operations, performs queries, updates, aggregations, and transactions through Mongoose, and returns persistent data back to the Business Processing Engine for response generation.</text:p>
      <text:h text:style-name="Heading_20_1" text:outline-level="1">7. Stage 6 – Data Access Engine</text:h>
      <text:h text:style-name="Heading_20_2" text:outline-level="2">Overview</text:h>
      <text:p text:style-name="Text_20_body">The <text:span text:style-name="Strong_20_Emphasis">Data Access Engine</text:span> is responsible for all interactions with the persistent storage layer. It receives database instructions from the Business Processing Engine, translates them into database operations using Mongoose, communicates with MongoDB, and returns structured data.</text:p>
      <text:p text:style-name="Text_20_body">This stage acts as the only gateway to the database, ensuring that business modules never access MongoDB directly. By centralizing data access, the system maintains consistency, improves maintainability, and simplifies future database changes.</text:p>
      <text:p text:style-name="Horizontal_20_Line"/>
      <text:h text:style-name="Heading_20_2" text:outline-level="2">Primary Responsibilities</text:h>
      <text:p text:style-name="Text_20_body">The Data Access Engine is responsible for:</text:p>
      <text:list text:style-name="L35">
        <text:list-item>
          <text:p text:style-name="P36">Executing database operations.</text:p>
        </text:list-item>
        <text:list-item>
          <text:p text:style-name="P36">Managing MongoDB connections.</text:p>
        </text:list-item>
        <text:list-item>
          <text:p text:style-name="P36">Interacting with Mongoose models.</text:p>
        </text:list-item>
        <text:list-item>
          <text:p text:style-name="P36">Performing CRUD operations.</text:p>
        </text:list-item>
        <text:list-item>
          <text:p text:style-name="P36">Executing aggregations.</text:p>
        </text:list-item>
        <text:list-item>
          <text:p text:style-name="P36">Handling database transactions.</text:p>
        </text:list-item>
        <text:list-item>
          <text:p text:style-name="P36">Returning structured data.</text:p>
        </text:list-item>
        <text:list-item>
          <text:p text:style-name="P36">Managing database errors.</text:p>
        </text:list-item>
      </text:list>
      <text:p text:style-name="Horizontal_20_Line"/>
      <text:h text:style-name="Heading_20_2" text:outline-level="2">Runtime Components</text:h>
      <text:p text:style-name="Preformatted_20_Text"><text:span text:style-name="Source_20_Text">Data Access Engine</text:span></text:p>
      <text:p text:style-name="Preformatted_20_Text"><text:span text:style-name="Source_20_Text">│</text:span></text:p>
      <text:p text:style-name="Preformatted_20_Text"><text:span text:style-name="Source_20_Text">├── Database Connection Manager</text:span></text:p>
      <text:p text:style-name="Preformatted_20_Text"><text:span text:style-name="Source_20_Text">├── Mongoose Models</text:span></text:p>
      <text:p text:style-name="Preformatted_20_Text"><text:span text:style-name="Source_20_Text">├── Repository Layer</text:span></text:p>
      <text:p text:style-name="Preformatted_20_Text"><text:span text:style-name="Source_20_Text">├── CRUD Operations</text:span></text:p>
      <text:p text:style-name="Preformatted_20_Text"><text:span text:style-name="Source_20_Text">├── Aggregation Engine</text:span></text:p>
      <text:p text:style-name="Preformatted_20_Text"><text:span text:style-name="Source_20_Text">├── Transaction Manager</text:span></text:p>
      <text:p text:style-name="Preformatted_20_Text"><text:span text:style-name="Source_20_Text">├── Query Optimizer</text:span></text:p>
      <text:p text:style-name="P1"><text:span text:style-name="Source_20_Text">└── Error Handler</text:span></text:p>
      <text:p text:style-name="Horizontal_20_Line"/>
      <text:h text:style-name="Heading_20_2" text:outline-level="2"><text:soft-page-break/>Execution Workflow</text:h>
      <text:p text:style-name="Preformatted_20_Text"><text:span text:style-name="Source_20_Text">Business Processing Engine</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Database Instructions</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Repository Layer</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Mongoose Models</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MongoDB</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Database Result</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Return Structured Data</text:span></text:p>
      <text:p text:style-name="Preformatted_20_Text"><text:span text:style-name="Source_20_Text"><text:s text:c="10"/>│</text:span></text:p>
      <text:p text:style-name="Preformatted_20_Text"><text:span text:style-name="Source_20_Text"><text:s text:c="10"/>▼</text:span></text:p>
      <text:p text:style-name="P1"><text:span text:style-name="Source_20_Text">Proceed to Response Processing Engine</text:span></text:p>
      <text:p text:style-name="Horizontal_20_Line"/>
      <text:h text:style-name="Heading_20_2" text:outline-level="2">Internal Processing</text:h>
      <text:h text:style-name="Heading_20_3" text:outline-level="3">Step 1 – Receive Database Instructions</text:h>
      <text:p text:style-name="Text_20_body">The Business Processing Engine sends the required operations.</text:p>
      <text:p text:style-name="Text_20_body">Examples include:</text:p>
      <text:list text:style-name="L36">
        <text:list-item>
          <text:p text:style-name="P37">Create document</text:p>
        </text:list-item>
        <text:list-item>
          <text:p text:style-name="P37">Read document</text:p>
        </text:list-item>
        <text:list-item>
          <text:p text:style-name="P37">Update document</text:p>
        </text:list-item>
        <text:list-item>
          <text:p text:style-name="P37">Delete document</text:p>
        </text:list-item>
        <text:list-item>
          <text:p text:style-name="P37">Aggregate data</text:p>
        </text:list-item>
        <text:list-item>
          <text:p text:style-name="P37">Execute transaction</text:p>
        </text:list-item>
      </text:list>
      <text:p text:style-name="Text_20_body">No business rules are evaluated at this stage.</text:p>
      <text:p text:style-name="Horizontal_20_Line"/>
      <text:h text:style-name="Heading_20_3" text:outline-level="3">Step 2 – Repository Execution</text:h>
      <text:p text:style-name="Text_20_body">The Repository Layer converts business requests into database operations.</text:p>
      <text:p text:style-name="Text_20_body">Example responsibilities:</text:p>
      <text:list text:style-name="L37">
        <text:list-item>
          <text:p text:style-name="P38">Selecting the correct model.</text:p>
        </text:list-item>
        <text:list-item>
          <text:p text:style-name="P38">Building queries.</text:p>
        </text:list-item>
        <text:list-item>
          <text:p text:style-name="P38"><text:soft-page-break/>Applying filters.</text:p>
        </text:list-item>
        <text:list-item>
          <text:p text:style-name="P38">Handling pagination.</text:p>
        </text:list-item>
        <text:list-item>
          <text:p text:style-name="P38">Preparing aggregation pipelines.</text:p>
        </text:list-item>
      </text:list>
      <text:p text:style-name="Text_20_body">This layer isolates database implementation details from business services.</text:p>
      <text:p text:style-name="Horizontal_20_Line"/>
      <text:h text:style-name="Heading_20_3" text:outline-level="3">Step 3 – Mongoose Model Interaction</text:h>
      <text:p text:style-name="Text_20_body">The repository interacts with the appropriate Mongoose model.</text:p>
      <text:p text:style-name="Text_20_body">Examples:</text:p>
      <text:p text:style-name="Preformatted_20_Text"><text:span text:style-name="Source_20_Text">Models</text:span></text:p>
      <text:p text:style-name="Preformatted_20_Text"><text:span text:style-name="Source_20_Text">│</text:span></text:p>
      <text:p text:style-name="Preformatted_20_Text"><text:span text:style-name="Source_20_Text">├── User</text:span></text:p>
      <text:p text:style-name="Preformatted_20_Text"><text:span text:style-name="Source_20_Text">├── Project</text:span></text:p>
      <text:p text:style-name="Preformatted_20_Text"><text:span text:style-name="Source_20_Text">├── SearchHistory</text:span></text:p>
      <text:p text:style-name="Preformatted_20_Text"><text:span text:style-name="Source_20_Text">├── Dashboard</text:span></text:p>
      <text:p text:style-name="Preformatted_20_Text"><text:span text:style-name="Source_20_Text">├── Analytics</text:span></text:p>
      <text:p text:style-name="Preformatted_20_Text"><text:span text:style-name="Source_20_Text">├── Settings</text:span></text:p>
      <text:p text:style-name="P1"><text:span text:style-name="Source_20_Text">└── Notification</text:span></text:p>
      <text:p text:style-name="Text_20_body">Each model represents a MongoDB collection and enforces schema validation.</text:p>
      <text:p text:style-name="Horizontal_20_Line"/>
      <text:h text:style-name="Heading_20_3" text:outline-level="3">Step 4 – Database Operation Execution</text:h>
      <text:p text:style-name="Text_20_body">The engine performs the required operation.</text:p>
      <text:p text:style-name="Text_20_body">Common operations include:</text:p>
      <table:table table:name="Table14" table:style-name="Table14">
        <table:table-column table:style-name="Table14.A"/>
        <table:table-column table:style-name="Table14.B"/>
        <table:table-header-rows>
          <table:table-row>
            <table:table-cell table:style-name="Table14.A1" office:value-type="string">
              <text:p text:style-name="Table_20_Heading">Operation</text:p>
            </table:table-cell>
            <table:table-cell table:style-name="Table14.A1" office:value-type="string">
              <text:p text:style-name="Table_20_Heading">Description</text:p>
            </table:table-cell>
          </table:table-row>
        </table:table-header-rows>
        <table:table-row>
          <table:table-cell table:style-name="Table14.A1" office:value-type="string">
            <text:p text:style-name="Table_20_Contents">Create</text:p>
          </table:table-cell>
          <table:table-cell table:style-name="Table14.A1" office:value-type="string">
            <text:p text:style-name="Table_20_Contents">Insert new document</text:p>
          </table:table-cell>
        </table:table-row>
        <table:table-row>
          <table:table-cell table:style-name="Table14.A1" office:value-type="string">
            <text:p text:style-name="Table_20_Contents">Read</text:p>
          </table:table-cell>
          <table:table-cell table:style-name="Table14.A1" office:value-type="string">
            <text:p text:style-name="Table_20_Contents">Retrieve one or more documents</text:p>
          </table:table-cell>
        </table:table-row>
        <table:table-row>
          <table:table-cell table:style-name="Table14.A1" office:value-type="string">
            <text:p text:style-name="Table_20_Contents">Update</text:p>
          </table:table-cell>
          <table:table-cell table:style-name="Table14.A1" office:value-type="string">
            <text:p text:style-name="Table_20_Contents">Modify existing documents</text:p>
          </table:table-cell>
        </table:table-row>
        <table:table-row>
          <table:table-cell table:style-name="Table14.A1" office:value-type="string">
            <text:p text:style-name="Table_20_Contents">Delete</text:p>
          </table:table-cell>
          <table:table-cell table:style-name="Table14.A1" office:value-type="string">
            <text:p text:style-name="Table_20_Contents">Remove documents</text:p>
          </table:table-cell>
        </table:table-row>
        <table:table-row>
          <table:table-cell table:style-name="Table14.A1" office:value-type="string">
            <text:p text:style-name="Table_20_Contents">Aggregate</text:p>
          </table:table-cell>
          <table:table-cell table:style-name="Table14.A1" office:value-type="string">
            <text:p text:style-name="Table_20_Contents">Generate reports and statistics</text:p>
          </table:table-cell>
        </table:table-row>
      </table:table>
      <text:p text:style-name="Text_20_body">These operations are executed efficiently through MongoDB.</text:p>
      <text:p text:style-name="Horizontal_20_Line"/>
      <text:h text:style-name="Heading_20_3" text:outline-level="3">Step 5 – Query Optimization</text:h>
      <text:p text:style-name="Text_20_body">Before execution, queries are optimized whenever possible.</text:p>
      <text:p text:style-name="Text_20_body">Optimization techniques include:</text:p>
      <text:list text:style-name="L38">
        <text:list-item>
          <text:p text:style-name="P39">Indexed searches.</text:p>
        </text:list-item>
        <text:list-item>
          <text:p text:style-name="P39">Projection (select required fields only).</text:p>
        </text:list-item>
        <text:list-item>
          <text:p text:style-name="P39">Pagination.</text:p>
        </text:list-item>
        <text:list-item>
          <text:p text:style-name="P39">Sorting.</text:p>
        </text:list-item>
        <text:list-item>
          <text:p text:style-name="P39"><text:soft-page-break/>Filtering.</text:p>
        </text:list-item>
        <text:list-item>
          <text:p text:style-name="P39">Aggregation optimization.</text:p>
        </text:list-item>
      </text:list>
      <text:p text:style-name="Text_20_body">This minimizes database load and improves response time.</text:p>
      <text:p text:style-name="Horizontal_20_Line"/>
      <text:h text:style-name="Heading_20_3" text:outline-level="3">Step 6 – Transaction Management</text:h>
      <text:p text:style-name="Text_20_body">For operations involving multiple database changes, transactions are used.</text:p>
      <text:p text:style-name="Text_20_body">Example workflow:</text:p>
      <text:p text:style-name="Preformatted_20_Text"><text:span text:style-name="Source_20_Text">Create Project</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Insert Project</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Update Analytics</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Create Activity Log</text:span></text:p>
      <text:p text:style-name="Preformatted_20_Text"><text:span text:style-name="Source_20_Text"><text:s text:c="6"/>│</text:span></text:p>
      <text:p text:style-name="Preformatted_20_Text"><text:span text:style-name="Source_20_Text"><text:s text:c="6"/>▼</text:span></text:p>
      <text:p text:style-name="P1"><text:span text:style-name="Source_20_Text">Commit Transaction</text:span></text:p>
      <text:p text:style-name="Text_20_body">If any operation fails, the transaction is rolled back to maintain data consistency.</text:p>
      <text:p text:style-name="Horizontal_20_Line"/>
      <text:h text:style-name="Heading_20_3" text:outline-level="3">Step 7 – Result Mapping</text:h>
      <text:p text:style-name="Text_20_body">Raw MongoDB results are transformed into structured objects.</text:p>
      <text:p text:style-name="Text_20_body">Typical transformations include:</text:p>
      <text:list text:style-name="L39">
        <text:list-item>
          <text:p text:style-name="P40">Removing internal database fields.</text:p>
        </text:list-item>
        <text:list-item>
          <text:p text:style-name="P40">Formatting dates.</text:p>
        </text:list-item>
        <text:list-item>
          <text:p text:style-name="P40">Converting ObjectIds.</text:p>
        </text:list-item>
        <text:list-item>
          <text:p text:style-name="P40">Preparing API-friendly structures.</text:p>
        </text:list-item>
      </text:list>
      <text:p text:style-name="Text_20_body">This keeps database-specific details hidden from higher layers.</text:p>
      <text:p text:style-name="Horizontal_20_Line"/>
      <text:h text:style-name="Heading_20_3" text:outline-level="3">Step 8 – Error Handling</text:h>
      <text:p text:style-name="Text_20_body">Database-related failures are captured and standardized.</text:p>
      <text:p text:style-name="Text_20_body">Examples include:</text:p>
      <text:list text:style-name="L40">
        <text:list-item>
          <text:p text:style-name="P41">Connection failure.</text:p>
        </text:list-item>
        <text:list-item>
          <text:p text:style-name="P41">Duplicate key error.</text:p>
        </text:list-item>
        <text:list-item>
          <text:p text:style-name="P41">Validation error.</text:p>
        </text:list-item>
        <text:list-item>
          <text:p text:style-name="P41"><text:soft-page-break/>Transaction failure.</text:p>
        </text:list-item>
        <text:list-item>
          <text:p text:style-name="P41">Query timeout.</text:p>
        </text:list-item>
        <text:list-item>
          <text:p text:style-name="P41">Missing document.</text:p>
        </text:list-item>
      </text:list>
      <text:p text:style-name="Text_20_body">Errors are returned in a consistent format for the response layer.</text:p>
      <text:p text:style-name="Horizontal_20_Line"/>
      <text:h text:style-name="Heading_20_3" text:outline-level="3">Step 9 – Return Data</text:h>
      <text:p text:style-name="Text_20_body">The processed database result is returned to the Business Processing Engine, which then prepares the final application response.</text:p>
      <text:p text:style-name="Text_20_body">No UI-specific formatting occurs at this stage.</text:p>
      <text:p text:style-name="Horizontal_20_Line"/>
      <text:h text:style-name="Heading_20_2" text:outline-level="2">Data Flow Architecture</text:h>
      <text:p text:style-name="Preformatted_20_Text"><text:span text:style-name="Source_20_Text">Business Service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epository Lay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Mongoose Model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MongoDB Collection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Query Results</text:span></text:p>
      <text:p text:style-name="Preformatted_20_Text"><text:span text:style-name="Source_20_Text"><text:s text:c="8"/>│</text:span></text:p>
      <text:p text:style-name="Preformatted_20_Text"><text:span text:style-name="Source_20_Text"><text:s text:c="8"/>▼</text:span></text:p>
      <text:p text:style-name="P1"><text:span text:style-name="Source_20_Text">Mapped Objects</text:span></text:p>
      <text:p text:style-name="Text_20_body">This architecture separates persistence concerns from application logic.</text:p>
      <text:p text:style-name="Horizontal_20_Line"/>
      <text:h text:style-name="Heading_20_2" text:outline-level="2">Data Produced</text:h>
      <text:p text:style-name="Text_20_body">The Data Access Engine returns the following outputs:</text:p>
      <table:table table:name="Table15" table:style-name="Table15">
        <table:table-column table:style-name="Table15.A"/>
        <table:table-column table:style-name="Table15.B"/>
        <table:table-header-rows>
          <table:table-row>
            <table:table-cell table:style-name="Table15.A1" office:value-type="string">
              <text:p text:style-name="Table_20_Heading">Resource</text:p>
            </table:table-cell>
            <table:table-cell table:style-name="Table15.A1" office:value-type="string">
              <text:p text:style-name="Table_20_Heading">Purpose</text:p>
            </table:table-cell>
          </table:table-row>
        </table:table-header-rows>
        <table:table-row>
          <table:table-cell table:style-name="Table15.A1" office:value-type="string">
            <text:p text:style-name="Table_20_Contents">Retrieved Documents</text:p>
          </table:table-cell>
          <table:table-cell table:style-name="Table15.A1" office:value-type="string">
            <text:p text:style-name="Table_20_Contents">Requested application data</text:p>
          </table:table-cell>
        </table:table-row>
        <table:table-row>
          <table:table-cell table:style-name="Table15.A1" office:value-type="string">
            <text:p text:style-name="Table_20_Contents">Updated Records</text:p>
          </table:table-cell>
          <table:table-cell table:style-name="Table15.A1" office:value-type="string">
            <text:p text:style-name="Table_20_Contents">Modified database entries</text:p>
          </table:table-cell>
        </table:table-row>
        <table:table-row>
          <table:table-cell table:style-name="Table15.A1" office:value-type="string">
            <text:p text:style-name="Table_20_Contents">Aggregation Results</text:p>
          </table:table-cell>
          <table:table-cell table:style-name="Table15.A1" office:value-type="string">
            <text:p text:style-name="Table_20_Contents">Reports and analytics</text:p>
          </table:table-cell>
        </table:table-row>
        <table:table-row>
          <table:table-cell table:style-name="Table15.A1" office:value-type="string">
            <text:p text:style-name="Table_20_Contents">Transaction Status</text:p>
          </table:table-cell>
          <table:table-cell table:style-name="Table15.A1" office:value-type="string">
            <text:p text:style-name="Table_20_Contents">Commit or rollback result</text:p>
          </table:table-cell>
        </table:table-row>
        <table:table-row>
          <table:table-cell table:style-name="Table15.A1" office:value-type="string">
            <text:p text:style-name="Table_20_Contents">Database Metadata</text:p>
          </table:table-cell>
          <table:table-cell table:style-name="Table15.A1" office:value-type="string">
            <text:p text:style-name="Table_20_Contents">Pagination, counts, IDs</text:p>
          </table:table-cell>
        </table:table-row>
        <table:table-row>
          <table:table-cell table:style-name="Table15.A1" office:value-type="string">
            <text:p text:style-name="Table_20_Contents">Standardized Errors</text:p>
          </table:table-cell>
          <table:table-cell table:style-name="Table15.A1" office:value-type="string">
            <text:p text:style-name="Table_20_Contents">Database exception details</text:p>
          </table:table-cell>
        </table:table-row>
      </table:table>
      <text:p text:style-name="Text_20_body">These outputs are passed to the Response Processing Engine.</text:p>
      <text:p text:style-name="Horizontal_20_Line"/>
      <text:h text:style-name="Heading_20_2" text:outline-level="2"><text:soft-page-break/>Failure Handling</text:h>
      <text:p text:style-name="Text_20_body">Possible database failures include:</text:p>
      <table:table table:name="Table16" table:style-name="Table16">
        <table:table-column table:style-name="Table16.A"/>
        <table:table-column table:style-name="Table16.B"/>
        <table:table-header-rows>
          <table:table-row>
            <table:table-cell table:style-name="Table16.A1" office:value-type="string">
              <text:p text:style-name="Table_20_Heading">Failure</text:p>
            </table:table-cell>
            <table:table-cell table:style-name="Table16.A1" office:value-type="string">
              <text:p text:style-name="Table_20_Heading">Handling Strategy</text:p>
            </table:table-cell>
          </table:table-row>
        </table:table-header-rows>
        <table:table-row>
          <table:table-cell table:style-name="Table16.A1" office:value-type="string">
            <text:p text:style-name="Table_20_Contents">Database unavailable</text:p>
          </table:table-cell>
          <table:table-cell table:style-name="Table16.A1" office:value-type="string">
            <text:p text:style-name="Table_20_Contents">Return server error and retry if appropriate</text:p>
          </table:table-cell>
        </table:table-row>
        <table:table-row>
          <table:table-cell table:style-name="Table16.A1" office:value-type="string">
            <text:p text:style-name="Table_20_Contents">Duplicate key</text:p>
          </table:table-cell>
          <table:table-cell table:style-name="Table16.A1" office:value-type="string">
            <text:p text:style-name="Table_20_Contents">Return conflict response</text:p>
          </table:table-cell>
        </table:table-row>
        <table:table-row>
          <table:table-cell table:style-name="Table16.A1" office:value-type="string">
            <text:p text:style-name="Table_20_Contents">Schema validation failure</text:p>
          </table:table-cell>
          <table:table-cell table:style-name="Table16.A1" office:value-type="string">
            <text:p text:style-name="Table_20_Contents">Return validation error</text:p>
          </table:table-cell>
        </table:table-row>
        <table:table-row>
          <table:table-cell table:style-name="Table16.A1" office:value-type="string">
            <text:p text:style-name="Table_20_Contents">Transaction rollback</text:p>
          </table:table-cell>
          <table:table-cell table:style-name="Table16.A1" office:value-type="string">
            <text:p text:style-name="Table_20_Contents">Restore previous database state</text:p>
          </table:table-cell>
        </table:table-row>
        <table:table-row>
          <table:table-cell table:style-name="Table16.A1" office:value-type="string">
            <text:p text:style-name="Table_20_Contents">Query timeout</text:p>
          </table:table-cell>
          <table:table-cell table:style-name="Table16.A1" office:value-type="string">
            <text:p text:style-name="Table_20_Contents">Abort operation and notify caller</text:p>
          </table:table-cell>
        </table:table-row>
        <table:table-row>
          <table:table-cell table:style-name="Table16.A1" office:value-type="string">
            <text:p text:style-name="Table_20_Contents">Document not found</text:p>
          </table:table-cell>
          <table:table-cell table:style-name="Table16.A1" office:value-type="string">
            <text:p text:style-name="Table_20_Contents">Return empty result or not found response</text:p>
          </table:table-cell>
        </table:table-row>
      </table:table>
      <text:p text:style-name="Text_20_body">The engine ensures database integrity while providing consistent error reporting.</text:p>
      <text:p text:style-name="Horizontal_20_Line"/>
      <text:h text:style-name="Heading_20_2" text:outline-level="2">Stage Output</text:h>
      <text:p text:style-name="Text_20_body">After successful completion, the Data Access Engine provides:</text:p>
      <text:p text:style-name="Preformatted_20_Text"><text:span text:style-name="Source_20_Text">✓ Database Operation Executed</text:span></text:p>
      <text:p text:style-name="Preformatted_20_Text"/>
      <text:p text:style-name="Preformatted_20_Text"><text:span text:style-name="Source_20_Text">✓ Query Completed</text:span></text:p>
      <text:p text:style-name="Preformatted_20_Text"/>
      <text:p text:style-name="Preformatted_20_Text"><text:span text:style-name="Source_20_Text">✓ Data Retrieved or Updated</text:span></text:p>
      <text:p text:style-name="Preformatted_20_Text"/>
      <text:p text:style-name="Preformatted_20_Text"><text:span text:style-name="Source_20_Text">✓ Transaction Finalized</text:span></text:p>
      <text:p text:style-name="Preformatted_20_Text"/>
      <text:p text:style-name="Preformatted_20_Text"><text:span text:style-name="Source_20_Text">✓ Results Mapped</text:span></text:p>
      <text:p text:style-name="Preformatted_20_Text"/>
      <text:p text:style-name="Preformatted_20_Text"><text:span text:style-name="Source_20_Text">✓ Database Integrity Maintained</text:span></text:p>
      <text:p text:style-name="Preformatted_20_Text"/>
      <text:p text:style-name="P1"><text:span text:style-name="Source_20_Text">✓ Structured Data Returned</text:span></text:p>
      <text:p text:style-name="Text_20_body">This structured data becomes the input for <text:span text:style-name="Strong_20_Emphasis">Stage 7 – Response Processing Engine</text:span>, where business results are transformed into standardized API responses and prepared for delivery to the frontend.</text:p>
      <text:p text:style-name="Horizontal_20_Line"/>
      <text:h text:style-name="Heading_20_2" text:outline-level="2">Next Stage</text:h>
      <text:p text:style-name="Text_20_body"><text:span text:style-name="Strong_20_Emphasis">Stage 7 – Response Processing Engine</text:span></text:p>
      <text:p text:style-name="Text_20_body">The next stage formats successful results and errors into consistent API responses, attaches metadata such as pagination or status information, and prepares the final JSON payload that will be sent back to the frontend application.</text:p>
      <text:h text:style-name="Heading_20_1" text:outline-level="1">8. Stage 7 – Response Processing Engine</text:h>
      <text:h text:style-name="Heading_20_2" text:outline-level="2">Overview</text:h>
      <text:p text:style-name="Text_20_body">The <text:span text:style-name="Strong_20_Emphasis">Response Processing Engine</text:span> is responsible for transforming the results produced by the Business Processing Engine and Data Access Engine into standardized API responses.</text:p>
      <text:p text:style-name="Text_20_body"><text:soft-page-break/>Rather than allowing individual controllers to construct responses differently, this stage ensures every API response follows a consistent structure, making frontend integration simpler and improving maintainability.</text:p>
      <text:p text:style-name="Text_20_body">Both successful responses and error responses pass through this stage before being sent to the client.</text:p>
      <text:p text:style-name="Horizontal_20_Line"/>
      <text:h text:style-name="Heading_20_2" text:outline-level="2">Primary Responsibilities</text:h>
      <text:p text:style-name="Text_20_body">The Response Processing Engine is responsible for:</text:p>
      <text:list text:style-name="L41">
        <text:list-item>
          <text:p text:style-name="P42">Standardizing API responses.</text:p>
        </text:list-item>
        <text:list-item>
          <text:p text:style-name="P42">Formatting successful results.</text:p>
        </text:list-item>
        <text:list-item>
          <text:p text:style-name="P42">Formatting error responses.</text:p>
        </text:list-item>
        <text:list-item>
          <text:p text:style-name="P42">Attaching response metadata.</text:p>
        </text:list-item>
        <text:list-item>
          <text:p text:style-name="P42">Handling pagination information.</text:p>
        </text:list-item>
        <text:list-item>
          <text:p text:style-name="P42">Generating HTTP status codes.</text:p>
        </text:list-item>
        <text:list-item>
          <text:p text:style-name="P42">Preparing JSON payloads.</text:p>
        </text:list-item>
        <text:list-item>
          <text:p text:style-name="P42">Sending responses to the frontend.</text:p>
        </text:list-item>
      </text:list>
      <text:p text:style-name="Horizontal_20_Line"/>
      <text:h text:style-name="Heading_20_2" text:outline-level="2">Runtime Components</text:h>
      <text:p text:style-name="Preformatted_20_Text"><text:span text:style-name="Source_20_Text">Response Processing Engine</text:span></text:p>
      <text:p text:style-name="Preformatted_20_Text"><text:span text:style-name="Source_20_Text">│</text:span></text:p>
      <text:p text:style-name="Preformatted_20_Text"><text:span text:style-name="Source_20_Text">├── Response Formatter</text:span></text:p>
      <text:p text:style-name="Preformatted_20_Text"><text:span text:style-name="Source_20_Text">├── Success Response Builder</text:span></text:p>
      <text:p text:style-name="Preformatted_20_Text"><text:span text:style-name="Source_20_Text">├── Error Response Builder</text:span></text:p>
      <text:p text:style-name="Preformatted_20_Text"><text:span text:style-name="Source_20_Text">├── Metadata Generator</text:span></text:p>
      <text:p text:style-name="Preformatted_20_Text"><text:span text:style-name="Source_20_Text">├── Pagination Handler</text:span></text:p>
      <text:p text:style-name="Preformatted_20_Text"><text:span text:style-name="Source_20_Text">├── HTTP Status Manager</text:span></text:p>
      <text:p text:style-name="Preformatted_20_Text"><text:span text:style-name="Source_20_Text">├── JSON Serializer</text:span></text:p>
      <text:p text:style-name="P1"><text:span text:style-name="Source_20_Text">└── Response Sender</text:span></text:p>
      <text:p text:style-name="Horizontal_20_Line"/>
      <text:h text:style-name="Heading_20_2" text:outline-level="2">Execution Workflow</text:h>
      <text:p text:style-name="Preformatted_20_Text"><text:span text:style-name="Source_20_Text">Business Result</text:span></text:p>
      <text:p text:style-name="Preformatted_20_Text"><text:span text:style-name="Source_20_Text"><text:s text:c="7"/>│</text:span></text:p>
      <text:p text:style-name="Preformatted_20_Text"><text:span text:style-name="Source_20_Text"><text:s text:c="7"/>▼</text:span></text:p>
      <text:p text:style-name="Preformatted_20_Text"><text:span text:style-name="Source_20_Text">Check Execution Status</text:span></text:p>
      <text:p text:style-name="Preformatted_20_Text"><text:span text:style-name="Source_20_Text"><text:s text:c="7"/>│</text:span></text:p>
      <text:p text:style-name="Preformatted_20_Text"><text:span text:style-name="Source_20_Text"><text:s/>┌─────┴─────┐</text:span></text:p>
      <text:p text:style-name="Preformatted_20_Text"><text:span text:style-name="Source_20_Text"><text:s/>│ <text:s text:c="10"/>│</text:span></text:p>
      <text:p text:style-name="Preformatted_20_Text"><text:span text:style-name="Source_20_Text">Success <text:s text:c="4"/>Error</text:span></text:p>
      <text:p text:style-name="Preformatted_20_Text"><text:span text:style-name="Source_20_Text"><text:s/>│ <text:s text:c="10"/>│</text:span></text:p>
      <text:p text:style-name="Preformatted_20_Text"><text:span text:style-name="Source_20_Text"><text:s/>▼ <text:s text:c="10"/>▼</text:span></text:p>
      <text:p text:style-name="Preformatted_20_Text"><text:span text:style-name="Source_20_Text">Build <text:s text:c="5"/>Build</text:span></text:p>
      <text:p text:style-name="Preformatted_20_Text"><text:span text:style-name="Source_20_Text">Response <text:s text:c="2"/>Error</text:span></text:p>
      <text:p text:style-name="Preformatted_20_Text"><text:soft-page-break/><text:span text:style-name="Source_20_Text"><text:s/>│ <text:s text:c="10"/>│</text:span></text:p>
      <text:p text:style-name="Preformatted_20_Text"><text:span text:style-name="Source_20_Text"><text:s/>└─────┬─────┘</text:span></text:p>
      <text:p text:style-name="Preformatted_20_Text"><text:span text:style-name="Source_20_Text"><text:s text:c="7"/>▼</text:span></text:p>
      <text:p text:style-name="Preformatted_20_Text"><text:span text:style-name="Source_20_Text">Attach Metadata</text:span></text:p>
      <text:p text:style-name="Preformatted_20_Text"><text:span text:style-name="Source_20_Text"><text:s text:c="7"/>│</text:span></text:p>
      <text:p text:style-name="Preformatted_20_Text"><text:span text:style-name="Source_20_Text"><text:s text:c="7"/>▼</text:span></text:p>
      <text:p text:style-name="Preformatted_20_Text"><text:span text:style-name="Source_20_Text">Serialize JSON</text:span></text:p>
      <text:p text:style-name="Preformatted_20_Text"><text:span text:style-name="Source_20_Text"><text:s text:c="7"/>│</text:span></text:p>
      <text:p text:style-name="Preformatted_20_Text"><text:span text:style-name="Source_20_Text"><text:s text:c="7"/>▼</text:span></text:p>
      <text:p text:style-name="Preformatted_20_Text"><text:span text:style-name="Source_20_Text">Send HTTP Response</text:span></text:p>
      <text:p text:style-name="Preformatted_20_Text"><text:span text:style-name="Source_20_Text"><text:s text:c="7"/>│</text:span></text:p>
      <text:p text:style-name="Preformatted_20_Text"><text:span text:style-name="Source_20_Text"><text:s text:c="7"/>▼</text:span></text:p>
      <text:p text:style-name="P1"><text:span text:style-name="Source_20_Text">Proceed to UI Rendering Engine</text:span></text:p>
      <text:p text:style-name="Horizontal_20_Line"/>
      <text:h text:style-name="Heading_20_2" text:outline-level="2">Internal Processing</text:h>
      <text:h text:style-name="Heading_20_3" text:outline-level="3">Step 1 – Receive Business Result</text:h>
      <text:p text:style-name="Text_20_body">The engine receives processed data from previous stages.</text:p>
      <text:p text:style-name="Text_20_body">The incoming result may contain:</text:p>
      <text:list text:style-name="L42">
        <text:list-item>
          <text:p text:style-name="P43">Retrieved records</text:p>
        </text:list-item>
        <text:list-item>
          <text:p text:style-name="P43">Created resources</text:p>
        </text:list-item>
        <text:list-item>
          <text:p text:style-name="P43">Updated data</text:p>
        </text:list-item>
        <text:list-item>
          <text:p text:style-name="P43">Deleted resources</text:p>
        </text:list-item>
        <text:list-item>
          <text:p text:style-name="P43">Aggregated statistics</text:p>
        </text:list-item>
        <text:list-item>
          <text:p text:style-name="P43">Business validation results</text:p>
        </text:list-item>
      </text:list>
      <text:p text:style-name="Horizontal_20_Line"/>
      <text:h text:style-name="Heading_20_3" text:outline-level="3">Step 2 – Determine Response Type</text:h>
      <text:p text:style-name="Text_20_body">The system determines whether execution completed successfully.</text:p>
      <text:p text:style-name="Text_20_body">Possible outcomes:</text:p>
      <text:list text:style-name="L43">
        <text:list-item>
          <text:p text:style-name="P44">Success</text:p>
        </text:list-item>
        <text:list-item>
          <text:p text:style-name="P44">Validation failure</text:p>
        </text:list-item>
        <text:list-item>
          <text:p text:style-name="P44">Authorization failure</text:p>
        </text:list-item>
        <text:list-item>
          <text:p text:style-name="P44">Resource not found</text:p>
        </text:list-item>
        <text:list-item>
          <text:p text:style-name="P44">Server error</text:p>
        </text:list-item>
      </text:list>
      <text:p text:style-name="Text_20_body">The response structure depends on this outcome.</text:p>
      <text:p text:style-name="Horizontal_20_Line"/>
      <text:h text:style-name="Heading_20_3" text:outline-level="3"><text:soft-page-break/>Step 3 – Build Success Response</text:h>
      <text:p text:style-name="Text_20_body">For successful requests, a standardized JSON response is generated.</text:p>
      <text:p text:style-name="Text_20_body">Typical structure:</text:p>
      <text:p text:style-name="Preformatted_20_Text"><text:span text:style-name="Source_20_Text">{</text:span></text:p>
      <text:p text:style-name="Preformatted_20_Text"><text:span text:style-name="Source_20_Text"><text:s text:c="2"/>success: true,</text:span></text:p>
      <text:p text:style-name="Preformatted_20_Text"><text:span text:style-name="Source_20_Text"><text:s text:c="2"/>data: {...},</text:span></text:p>
      <text:p text:style-name="Preformatted_20_Text"><text:span text:style-name="Source_20_Text"><text:s text:c="2"/>message: "...",</text:span></text:p>
      <text:p text:style-name="Preformatted_20_Text"><text:span text:style-name="Source_20_Text"><text:s text:c="2"/>metadata: {...}</text:span></text:p>
      <text:p text:style-name="P1"><text:span text:style-name="Source_20_Text">}</text:span></text:p>
      <text:p text:style-name="Text_20_body">This consistency simplifies frontend development.</text:p>
      <text:p text:style-name="Horizontal_20_Line"/>
      <text:h text:style-name="Heading_20_3" text:outline-level="3">Step 4 – Build Error Response</text:h>
      <text:p text:style-name="Text_20_body">When an error occurs, a structured error response is created.</text:p>
      <text:p text:style-name="Text_20_body">Typical structure:</text:p>
      <text:p text:style-name="Preformatted_20_Text"><text:span text:style-name="Source_20_Text">{</text:span></text:p>
      <text:p text:style-name="Preformatted_20_Text"><text:span text:style-name="Source_20_Text"><text:s text:c="2"/>success: false,</text:span></text:p>
      <text:p text:style-name="Preformatted_20_Text"><text:span text:style-name="Source_20_Text"><text:s text:c="2"/>error: "...",</text:span></text:p>
      <text:p text:style-name="Preformatted_20_Text"><text:span text:style-name="Source_20_Text"><text:s text:c="2"/>message: "...",</text:span></text:p>
      <text:p text:style-name="Preformatted_20_Text"><text:span text:style-name="Source_20_Text"><text:s text:c="2"/>details: {...}</text:span></text:p>
      <text:p text:style-name="P1"><text:span text:style-name="Source_20_Text">}</text:span></text:p>
      <text:p text:style-name="Text_20_body">Sensitive internal information is never exposed to the client.</text:p>
      <text:p text:style-name="Horizontal_20_Line"/>
      <text:h text:style-name="Heading_20_3" text:outline-level="3">Step 5 – Attach Metadata</text:h>
      <text:p text:style-name="Text_20_body">Additional information is included when necessary.</text:p>
      <text:p text:style-name="Text_20_body">Examples include:</text:p>
      <text:list text:style-name="L44">
        <text:list-item>
          <text:p text:style-name="P45">Pagination</text:p>
        </text:list-item>
        <text:list-item>
          <text:p text:style-name="P45">Total records</text:p>
        </text:list-item>
        <text:list-item>
          <text:p text:style-name="P45">Current page</text:p>
        </text:list-item>
        <text:list-item>
          <text:p text:style-name="P45">Page size</text:p>
        </text:list-item>
        <text:list-item>
          <text:p text:style-name="P45">Processing time</text:p>
        </text:list-item>
        <text:list-item>
          <text:p text:style-name="P45">Request identifier</text:p>
        </text:list-item>
      </text:list>
      <text:p text:style-name="Text_20_body">Metadata improves client-side handling without altering the primary data.</text:p>
      <text:p text:style-name="Horizontal_20_Line"/>
      <text:h text:style-name="Heading_20_3" text:outline-level="3">Step 6 – HTTP Status Assignment</text:h>
      <text:p text:style-name="Text_20_body">The correct HTTP status code is assigned.</text:p>
      <text:p text:style-name="Text_20_body">Common responses include:</text:p>
      <table:table table:name="Table17" table:style-name="Table17">
        <table:table-column table:style-name="Table17.A"/>
        <table:table-column table:style-name="Table17.B"/>
        <table:table-header-rows>
          <text:soft-page-break/>
          <table:table-row>
            <table:table-cell table:style-name="Table17.A1" office:value-type="string">
              <text:p text:style-name="Table_20_Heading">Status Code</text:p>
            </table:table-cell>
            <table:table-cell table:style-name="Table17.A1" office:value-type="string">
              <text:p text:style-name="Table_20_Heading">Meaning</text:p>
            </table:table-cell>
          </table:table-row>
        </table:table-header-rows>
        <table:table-row>
          <table:table-cell table:style-name="Table17.A1" office:value-type="string">
            <text:p text:style-name="Table_20_Contents">200</text:p>
          </table:table-cell>
          <table:table-cell table:style-name="Table17.A1" office:value-type="string">
            <text:p text:style-name="Table_20_Contents">Successful request</text:p>
          </table:table-cell>
        </table:table-row>
        <table:table-row>
          <table:table-cell table:style-name="Table17.A1" office:value-type="string">
            <text:p text:style-name="Table_20_Contents">201</text:p>
          </table:table-cell>
          <table:table-cell table:style-name="Table17.A1" office:value-type="string">
            <text:p text:style-name="Table_20_Contents">Resource created</text:p>
          </table:table-cell>
        </table:table-row>
        <table:table-row>
          <table:table-cell table:style-name="Table17.A1" office:value-type="string">
            <text:p text:style-name="Table_20_Contents">204</text:p>
          </table:table-cell>
          <table:table-cell table:style-name="Table17.A1" office:value-type="string">
            <text:p text:style-name="Table_20_Contents">No content</text:p>
          </table:table-cell>
        </table:table-row>
        <table:table-row>
          <table:table-cell table:style-name="Table17.A1" office:value-type="string">
            <text:p text:style-name="Table_20_Contents">400</text:p>
          </table:table-cell>
          <table:table-cell table:style-name="Table17.A1" office:value-type="string">
            <text:p text:style-name="Table_20_Contents">Bad request</text:p>
          </table:table-cell>
        </table:table-row>
        <table:table-row>
          <table:table-cell table:style-name="Table17.A1" office:value-type="string">
            <text:p text:style-name="Table_20_Contents">401</text:p>
          </table:table-cell>
          <table:table-cell table:style-name="Table17.A1" office:value-type="string">
            <text:p text:style-name="Table_20_Contents">Unauthorized</text:p>
          </table:table-cell>
        </table:table-row>
        <table:table-row>
          <table:table-cell table:style-name="Table17.A1" office:value-type="string">
            <text:p text:style-name="Table_20_Contents">403</text:p>
          </table:table-cell>
          <table:table-cell table:style-name="Table17.A1" office:value-type="string">
            <text:p text:style-name="Table_20_Contents">Forbidden</text:p>
          </table:table-cell>
        </table:table-row>
        <table:table-row>
          <table:table-cell table:style-name="Table17.A1" office:value-type="string">
            <text:p text:style-name="Table_20_Contents">404</text:p>
          </table:table-cell>
          <table:table-cell table:style-name="Table17.A1" office:value-type="string">
            <text:p text:style-name="Table_20_Contents">Resource not found</text:p>
          </table:table-cell>
        </table:table-row>
        <table:table-row>
          <table:table-cell table:style-name="Table17.A1" office:value-type="string">
            <text:p text:style-name="Table_20_Contents">409</text:p>
          </table:table-cell>
          <table:table-cell table:style-name="Table17.A1" office:value-type="string">
            <text:p text:style-name="Table_20_Contents">Conflict</text:p>
          </table:table-cell>
        </table:table-row>
        <table:table-row>
          <table:table-cell table:style-name="Table17.A1" office:value-type="string">
            <text:p text:style-name="Table_20_Contents">500</text:p>
          </table:table-cell>
          <table:table-cell table:style-name="Table17.A1" office:value-type="string">
            <text:p text:style-name="Table_20_Contents">Internal server error</text:p>
          </table:table-cell>
        </table:table-row>
      </table:table>
      <text:p text:style-name="Text_20_body">Status codes accurately represent the outcome of the request.</text:p>
      <text:p text:style-name="Horizontal_20_Line"/>
      <text:h text:style-name="Heading_20_3" text:outline-level="3">Step 7 – JSON Serialization</text:h>
      <text:p text:style-name="Text_20_body">The response object is converted into JSON.</text:p>
      <text:p text:style-name="Text_20_body">Responsibilities include:</text:p>
      <text:list text:style-name="L45">
        <text:list-item>
          <text:p text:style-name="P46">Serializing objects.</text:p>
        </text:list-item>
        <text:list-item>
          <text:p text:style-name="P46">Formatting dates.</text:p>
        </text:list-item>
        <text:list-item>
          <text:p text:style-name="P46">Removing unsupported values.</text:p>
        </text:list-item>
        <text:list-item>
          <text:p text:style-name="P46">Ensuring valid JSON output.</text:p>
        </text:list-item>
      </text:list>
      <text:p text:style-name="Text_20_body">The resulting payload is ready for network transmission.</text:p>
      <text:p text:style-name="Horizontal_20_Line"/>
      <text:h text:style-name="Heading_20_3" text:outline-level="3">Step 8 – Send Response</text:h>
      <text:p text:style-name="Text_20_body">Express sends the HTTP response back to the frontend.</text:p>
      <text:p text:style-name="Text_20_body">Example flow:</text:p>
      <text:p text:style-name="Preformatted_20_Text"><text:span text:style-name="Source_20_Text">Express Respons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HTTP Statu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JSON Payload</text:span></text:p>
      <text:p text:style-name="Preformatted_20_Text"><text:span text:style-name="Source_20_Text"><text:s text:c="8"/>│</text:span></text:p>
      <text:p text:style-name="Preformatted_20_Text"><text:span text:style-name="Source_20_Text"><text:s text:c="8"/>▼</text:span></text:p>
      <text:p text:style-name="P1"><text:span text:style-name="Source_20_Text">Browser Receives Response</text:span></text:p>
      <text:p text:style-name="Text_20_body">The backend request lifecycle is now complete.</text:p>
      <text:p text:style-name="Horizontal_20_Line"/>
      <text:h text:style-name="Heading_20_3" text:outline-level="3">Step 9 – Logging and Monitoring</text:h>
      <text:p text:style-name="Text_20_body">Before completion, response information may be logged.</text:p>
      <text:p text:style-name="Text_20_body"><text:soft-page-break/>Typical information includes:</text:p>
      <text:list text:style-name="L46">
        <text:list-item>
          <text:p text:style-name="P47">Response time</text:p>
        </text:list-item>
        <text:list-item>
          <text:p text:style-name="P47">Endpoint</text:p>
        </text:list-item>
        <text:list-item>
          <text:p text:style-name="P47">Status code</text:p>
        </text:list-item>
        <text:list-item>
          <text:p text:style-name="P47">Request identifier</text:p>
        </text:list-item>
        <text:list-item>
          <text:p text:style-name="P47">Error details (if applicable)</text:p>
        </text:list-item>
      </text:list>
      <text:p text:style-name="Text_20_body">These logs support debugging and monitoring.</text:p>
      <text:p text:style-name="Horizontal_20_Line"/>
      <text:h text:style-name="Heading_20_2" text:outline-level="2">Response Architecture</text:h>
      <text:p text:style-name="Preformatted_20_Text"><text:span text:style-name="Source_20_Text">Business Resul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esponse Formatt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text:s text:c="14"/>│</text:span></text:p>
      <text:p text:style-name="Preformatted_20_Text"><text:span text:style-name="Source_20_Text"><text:s text:c="8"/>▼ <text:s text:c="14"/>▼</text:span></text:p>
      <text:p text:style-name="Preformatted_20_Text"><text:span text:style-name="Source_20_Text">Success Builder <text:s text:c="2"/>Error Builder</text:span></text:p>
      <text:p text:style-name="Preformatted_20_Text"><text:span text:style-name="Source_20_Text"><text:s text:c="8"/>│ <text:s text:c="14"/>│</text:span></text:p>
      <text:p text:style-name="Preformatted_20_Text"><text:span text:style-name="Source_20_Text"><text:s text:c="8"/>└──────┬────────┘</text:span></text:p>
      <text:p text:style-name="Preformatted_20_Text"><text:span text:style-name="Source_20_Text"><text:s text:c="15"/>▼</text:span></text:p>
      <text:p text:style-name="Preformatted_20_Text"><text:span text:style-name="Source_20_Text">Metadata Builder</text:span></text:p>
      <text:p text:style-name="Preformatted_20_Text"><text:span text:style-name="Source_20_Text"><text:s text:c="15"/>│</text:span></text:p>
      <text:p text:style-name="Preformatted_20_Text"><text:span text:style-name="Source_20_Text"><text:s text:c="15"/>▼</text:span></text:p>
      <text:p text:style-name="Preformatted_20_Text"><text:span text:style-name="Source_20_Text">JSON Serializer</text:span></text:p>
      <text:p text:style-name="Preformatted_20_Text"><text:span text:style-name="Source_20_Text"><text:s text:c="15"/>│</text:span></text:p>
      <text:p text:style-name="Preformatted_20_Text"><text:span text:style-name="Source_20_Text"><text:s text:c="15"/>▼</text:span></text:p>
      <text:p text:style-name="P1"><text:span text:style-name="Source_20_Text">HTTP Response</text:span></text:p>
      <text:p text:style-name="Text_20_body">This architecture ensures all API responses are uniform regardless of the originating module.</text:p>
      <text:p text:style-name="Horizontal_20_Line"/>
      <text:h text:style-name="Heading_20_2" text:outline-level="2">Data Produced</text:h>
      <text:p text:style-name="Text_20_body">The Response Processing Engine generates the following outputs:</text:p>
      <table:table table:name="Table18" table:style-name="Table18">
        <table:table-column table:style-name="Table18.A"/>
        <table:table-column table:style-name="Table18.B"/>
        <table:table-header-rows>
          <table:table-row>
            <table:table-cell table:style-name="Table18.A1" office:value-type="string">
              <text:p text:style-name="Table_20_Heading">Resource</text:p>
            </table:table-cell>
            <table:table-cell table:style-name="Table18.A1" office:value-type="string">
              <text:p text:style-name="Table_20_Heading">Purpose</text:p>
            </table:table-cell>
          </table:table-row>
        </table:table-header-rows>
        <table:table-row>
          <table:table-cell table:style-name="Table18.A1" office:value-type="string">
            <text:p text:style-name="Table_20_Contents">JSON Payload</text:p>
          </table:table-cell>
          <table:table-cell table:style-name="Table18.A1" office:value-type="string">
            <text:p text:style-name="Table_20_Contents">Final API response</text:p>
          </table:table-cell>
        </table:table-row>
        <table:table-row>
          <table:table-cell table:style-name="Table18.A1" office:value-type="string">
            <text:p text:style-name="Table_20_Contents">HTTP Status Code</text:p>
          </table:table-cell>
          <table:table-cell table:style-name="Table18.A1" office:value-type="string">
            <text:p text:style-name="Table_20_Contents">Indicates request outcome</text:p>
          </table:table-cell>
        </table:table-row>
        <table:table-row>
          <table:table-cell table:style-name="Table18.A1" office:value-type="string">
            <text:p text:style-name="Table_20_Contents">Success/Error Message</text:p>
          </table:table-cell>
          <table:table-cell table:style-name="Table18.A1" office:value-type="string">
            <text:p text:style-name="Table_20_Contents">User and developer feedback</text:p>
          </table:table-cell>
        </table:table-row>
        <table:table-row>
          <table:table-cell table:style-name="Table18.A1" office:value-type="string">
            <text:p text:style-name="Table_20_Contents">Metadata</text:p>
          </table:table-cell>
          <table:table-cell table:style-name="Table18.A1" office:value-type="string">
            <text:p text:style-name="Table_20_Contents">Pagination and additional information</text:p>
          </table:table-cell>
        </table:table-row>
        <table:table-row>
          <table:table-cell table:style-name="Table18.A1" office:value-type="string">
            <text:p text:style-name="Table_20_Contents">Serialized Response</text:p>
          </table:table-cell>
          <table:table-cell table:style-name="Table18.A1" office:value-type="string">
            <text:p text:style-name="Table_20_Contents">Network-ready output</text:p>
          </table:table-cell>
        </table:table-row>
        <table:table-row>
          <table:table-cell table:style-name="Table18.A1" office:value-type="string">
            <text:p text:style-name="Table_20_Contents">Response Logs</text:p>
          </table:table-cell>
          <table:table-cell table:style-name="Table18.A1" office:value-type="string">
            <text:p text:style-name="Table_20_Contents">Monitoring and diagnostics</text:p>
          </table:table-cell>
        </table:table-row>
      </table:table>
      <text:p text:style-name="Text_20_body">These outputs are delivered to the frontend application.</text:p>
      <text:p text:style-name="Horizontal_20_Line"/>
      <text:h text:style-name="Heading_20_2" text:outline-level="2"><text:soft-page-break/>Failure Handling</text:h>
      <text:p text:style-name="Text_20_body">Possible response-processing failures include:</text:p>
      <table:table table:name="Table19" table:style-name="Table19">
        <table:table-column table:style-name="Table19.A"/>
        <table:table-column table:style-name="Table19.B"/>
        <table:table-header-rows>
          <table:table-row>
            <table:table-cell table:style-name="Table19.A1" office:value-type="string">
              <text:p text:style-name="Table_20_Heading">Failure</text:p>
            </table:table-cell>
            <table:table-cell table:style-name="Table19.A1" office:value-type="string">
              <text:p text:style-name="Table_20_Heading">Handling Strategy</text:p>
            </table:table-cell>
          </table:table-row>
        </table:table-header-rows>
        <table:table-row>
          <table:table-cell table:style-name="Table19.A1" office:value-type="string">
            <text:p text:style-name="Table_20_Contents">Serialization failure</text:p>
          </table:table-cell>
          <table:table-cell table:style-name="Table19.A1" office:value-type="string">
            <text:p text:style-name="Table_20_Contents">Return server error</text:p>
          </table:table-cell>
        </table:table-row>
        <table:table-row>
          <table:table-cell table:style-name="Table19.A1" office:value-type="string">
            <text:p text:style-name="Table_20_Contents">Invalid response object</text:p>
          </table:table-cell>
          <table:table-cell table:style-name="Table19.A1" office:value-type="string">
            <text:p text:style-name="Table_20_Contents">Generate fallback response</text:p>
          </table:table-cell>
        </table:table-row>
        <table:table-row>
          <table:table-cell table:style-name="Table19.A1" office:value-type="string">
            <text:p text:style-name="Table_20_Contents">Missing metadata</text:p>
          </table:table-cell>
          <table:table-cell table:style-name="Table19.A1" office:value-type="string">
            <text:p text:style-name="Table_20_Contents">Use default values</text:p>
          </table:table-cell>
        </table:table-row>
        <table:table-row>
          <table:table-cell table:style-name="Table19.A1" office:value-type="string">
            <text:p text:style-name="Table_20_Contents">Unexpected exception</text:p>
          </table:table-cell>
          <table:table-cell table:style-name="Table19.A1" office:value-type="string">
            <text:p text:style-name="Table_20_Contents">Return standardized error</text:p>
          </table:table-cell>
        </table:table-row>
        <table:table-row>
          <table:table-cell table:style-name="Table19.A1" office:value-type="string">
            <text:p text:style-name="Table_20_Contents">Network interruption</text:p>
          </table:table-cell>
          <table:table-cell table:style-name="Table19.A1" office:value-type="string">
            <text:p text:style-name="Table_20_Contents">Client retries if appropriate</text:p>
          </table:table-cell>
        </table:table-row>
        <table:table-row>
          <table:table-cell table:style-name="Table19.A1" office:value-type="string">
            <text:p text:style-name="Table_20_Contents">Logging failure</text:p>
          </table:table-cell>
          <table:table-cell table:style-name="Table19.A1" office:value-type="string">
            <text:p text:style-name="Table_20_Contents">Continue response without interruption</text:p>
          </table:table-cell>
        </table:table-row>
      </table:table>
      <text:p text:style-name="Text_20_body">Even unexpected failures are returned in a predictable format.</text:p>
      <text:p text:style-name="Horizontal_20_Line"/>
      <text:h text:style-name="Heading_20_2" text:outline-level="2">Stage Output</text:h>
      <text:p text:style-name="Text_20_body">After successful completion, the Response Processing Engine provides:</text:p>
      <text:p text:style-name="Preformatted_20_Text"><text:span text:style-name="Source_20_Text">✓ Response Standardized</text:span></text:p>
      <text:p text:style-name="Preformatted_20_Text"/>
      <text:p text:style-name="Preformatted_20_Text"><text:span text:style-name="Source_20_Text">✓ HTTP Status Assigned</text:span></text:p>
      <text:p text:style-name="Preformatted_20_Text"/>
      <text:p text:style-name="Preformatted_20_Text"><text:span text:style-name="Source_20_Text">✓ Metadata Attached</text:span></text:p>
      <text:p text:style-name="Preformatted_20_Text"/>
      <text:p text:style-name="Preformatted_20_Text"><text:span text:style-name="Source_20_Text">✓ JSON Serialized</text:span></text:p>
      <text:p text:style-name="Preformatted_20_Text"/>
      <text:p text:style-name="Preformatted_20_Text"><text:span text:style-name="Source_20_Text">✓ Response Sent</text:span></text:p>
      <text:p text:style-name="Preformatted_20_Text"/>
      <text:p text:style-name="Preformatted_20_Text"><text:span text:style-name="Source_20_Text">✓ Request Completed</text:span></text:p>
      <text:p text:style-name="Preformatted_20_Text"/>
      <text:p text:style-name="P1"><text:span text:style-name="Source_20_Text">✓ Frontend Notified</text:span></text:p>
      <text:p text:style-name="Text_20_body">This response becomes the input for <text:span text:style-name="Strong_20_Emphasis">Stage 8 – UI Rendering Engine</text:span>, where the frontend receives the data, updates application state, and renders the appropriate user interface.</text:p>
      <text:p text:style-name="Horizontal_20_Line"/>
      <text:h text:style-name="Heading_20_2" text:outline-level="2">Next Stage</text:h>
      <text:p text:style-name="Text_20_body"><text:span text:style-name="Strong_20_Emphasis">Stage 8 – UI Rendering Engine</text:span></text:p>
      <text:p text:style-name="Text_20_body">The next stage receives the API response on the frontend, updates TanStack Query and Zustand state, triggers React component re-rendering, refreshes charts and dashboards where necessary, and presents the latest application data to the user.</text:p>
      <text:h text:style-name="Heading_20_1" text:outline-level="1"><text:soft-page-break/>9. Stage 8 – UI Rendering Engine</text:h>
      <text:h text:style-name="Heading_20_2" text:outline-level="2">Overview</text:h>
      <text:p text:style-name="Text_20_body">The <text:span text:style-name="Strong_20_Emphasis">UI Rendering Engine</text:span> is responsible for presenting the processed application data to the user. After the frontend receives the API response, it updates the application state, synchronizes cached data, and re-renders only the affected React components.</text:p>
      <text:p text:style-name="Text_20_body">This stage bridges the gap between backend processing and user interaction by transforming structured data into an interactive, responsive, and visually consistent user interface.</text:p>
      <text:p text:style-name="Horizontal_20_Line"/>
      <text:h text:style-name="Heading_20_2" text:outline-level="2">Primary Responsibilities</text:h>
      <text:p text:style-name="Text_20_body">The UI Rendering Engine is responsible for:</text:p>
      <text:list text:style-name="L47">
        <text:list-item>
          <text:p text:style-name="P48">Receiving API responses.</text:p>
        </text:list-item>
        <text:list-item>
          <text:p text:style-name="P48">Updating application state.</text:p>
        </text:list-item>
        <text:list-item>
          <text:p text:style-name="P48">Synchronizing query cache.</text:p>
        </text:list-item>
        <text:list-item>
          <text:p text:style-name="P48">Re-rendering React components.</text:p>
        </text:list-item>
        <text:list-item>
          <text:p text:style-name="P48">Refreshing dashboards and charts.</text:p>
        </text:list-item>
        <text:list-item>
          <text:p text:style-name="P48">Displaying loading and error states.</text:p>
        </text:list-item>
        <text:list-item>
          <text:p text:style-name="P48">Optimizing rendering performance.</text:p>
        </text:list-item>
        <text:list-item>
          <text:p text:style-name="P48">Presenting updated information to the user.</text:p>
        </text:list-item>
      </text:list>
      <text:p text:style-name="Horizontal_20_Line"/>
      <text:h text:style-name="Heading_20_2" text:outline-level="2">Runtime Components</text:h>
      <text:p text:style-name="Preformatted_20_Text"><text:span text:style-name="Source_20_Text">UI Rendering Engine</text:span></text:p>
      <text:p text:style-name="Preformatted_20_Text"><text:span text:style-name="Source_20_Text">│</text:span></text:p>
      <text:p text:style-name="Preformatted_20_Text"><text:span text:style-name="Source_20_Text">├── React Renderer</text:span></text:p>
      <text:p text:style-name="Preformatted_20_Text"><text:span text:style-name="Source_20_Text">├── Component Tree</text:span></text:p>
      <text:p text:style-name="Preformatted_20_Text"><text:span text:style-name="Source_20_Text">├── Zustand Store</text:span></text:p>
      <text:p text:style-name="Preformatted_20_Text"><text:span text:style-name="Source_20_Text">├── TanStack Query Cache</text:span></text:p>
      <text:p text:style-name="Preformatted_20_Text"><text:span text:style-name="Source_20_Text">├── Recharts Renderer</text:span></text:p>
      <text:p text:style-name="Preformatted_20_Text"><text:span text:style-name="Source_20_Text">├── Layout Manager</text:span></text:p>
      <text:p text:style-name="Preformatted_20_Text"><text:span text:style-name="Source_20_Text">├── Loading/Error Components</text:span></text:p>
      <text:p text:style-name="P1"><text:span text:style-name="Source_20_Text">└── Event Handlers</text:span></text:p>
      <text:p text:style-name="Horizontal_20_Line"/>
      <text:h text:style-name="Heading_20_2" text:outline-level="2">Execution Workflow</text:h>
      <text:p text:style-name="Preformatted_20_Text"><text:span text:style-name="Source_20_Text">HTTP Response Received</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Update Query Cache</text:span></text:p>
      <text:p text:style-name="Preformatted_20_Text"><text:span text:style-name="Source_20_Text"><text:s text:c="9"/>│</text:span></text:p>
      <text:p text:style-name="Preformatted_20_Text"><text:soft-page-break/><text:span text:style-name="Source_20_Text"><text:s text:c="9"/>▼</text:span></text:p>
      <text:p text:style-name="Preformatted_20_Text"><text:span text:style-name="Source_20_Text">Update Zustand Store</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Determine Affected Components</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React Reconciliation</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Render Updated UI</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Display to User</text:span></text:p>
      <text:p text:style-name="Preformatted_20_Text"><text:span text:style-name="Source_20_Text"><text:s text:c="9"/>│</text:span></text:p>
      <text:p text:style-name="Preformatted_20_Text"><text:span text:style-name="Source_20_Text"><text:s text:c="9"/>▼</text:span></text:p>
      <text:p text:style-name="P1"><text:span text:style-name="Source_20_Text">Wait for Next Interaction</text:span></text:p>
      <text:p text:style-name="Horizontal_20_Line"/>
      <text:h text:style-name="Heading_20_2" text:outline-level="2">Internal Processing</text:h>
      <text:h text:style-name="Heading_20_3" text:outline-level="3">Step 1 – Receive API Response</text:h>
      <text:p text:style-name="Text_20_body">The frontend receives the standardized JSON response from the backend.</text:p>
      <text:p text:style-name="Text_20_body">The response may contain:</text:p>
      <text:list text:style-name="L48">
        <text:list-item>
          <text:p text:style-name="P49">Search results</text:p>
        </text:list-item>
        <text:list-item>
          <text:p text:style-name="P49">Dashboard statistics</text:p>
        </text:list-item>
        <text:list-item>
          <text:p text:style-name="P49">Project data</text:p>
        </text:list-item>
        <text:list-item>
          <text:p text:style-name="P49">Analytics reports</text:p>
        </text:list-item>
        <text:list-item>
          <text:p text:style-name="P49">User profile</text:p>
        </text:list-item>
        <text:list-item>
          <text:p text:style-name="P49">Settings updates</text:p>
        </text:list-item>
      </text:list>
      <text:p text:style-name="Text_20_body">The data is now ready for presentation.</text:p>
      <text:p text:style-name="Horizontal_20_Line"/>
      <text:h text:style-name="Heading_20_3" text:outline-level="3">Step 2 – Update TanStack Query Cache</text:h>
      <text:p text:style-name="Text_20_body">Server-side data is stored in the Query Cache.</text:p>
      <text:p text:style-name="Text_20_body">Responsibilities include:</text:p>
      <text:list text:style-name="L49">
        <text:list-item>
          <text:p text:style-name="P50">Updating cached queries.</text:p>
        </text:list-item>
        <text:list-item>
          <text:p text:style-name="P50">Replacing stale data.</text:p>
        </text:list-item>
        <text:list-item>
          <text:p text:style-name="P50">Synchronizing related queries.</text:p>
        </text:list-item>
        <text:list-item>
          <text:p text:style-name="P50">Triggering automatic component updates.</text:p>
        </text:list-item>
      </text:list>
      <text:p text:style-name="Text_20_body">Components using the same query receive updated data immediately.</text:p>
      <text:p text:style-name="Horizontal_20_Line"/>
      <text:h text:style-name="Heading_20_3" text:outline-level="3"><text:soft-page-break/>Step 3 – Update Client State</text:h>
      <text:p text:style-name="Text_20_body">Client-side state managed by Zustand is updated where necessary.</text:p>
      <text:p text:style-name="Text_20_body">Examples include:</text:p>
      <text:list text:style-name="L50">
        <text:list-item>
          <text:p text:style-name="P51">Current search filters</text:p>
        </text:list-item>
        <text:list-item>
          <text:p text:style-name="P51">Selected project</text:p>
        </text:list-item>
        <text:list-item>
          <text:p text:style-name="P51">Sidebar status</text:p>
        </text:list-item>
        <text:list-item>
          <text:p text:style-name="P51">Active tab</text:p>
        </text:list-item>
        <text:list-item>
          <text:p text:style-name="P51">Theme preference</text:p>
        </text:list-item>
        <text:list-item>
          <text:p text:style-name="P51">Notification visibility</text:p>
        </text:list-item>
      </text:list>
      <text:p text:style-name="Text_20_body">These updates occur without additional API requests.</text:p>
      <text:p text:style-name="Horizontal_20_Line"/>
      <text:h text:style-name="Heading_20_3" text:outline-level="3">Step 4 – React Reconciliation</text:h>
      <text:p text:style-name="Text_20_body">React compares the previous virtual DOM with the updated state.</text:p>
      <text:p text:style-name="Text_20_body">Only components whose data has changed are marked for re-rendering.</text:p>
      <text:p text:style-name="Text_20_body">Benefits include:</text:p>
      <text:list text:style-name="L51">
        <text:list-item>
          <text:p text:style-name="P52">Reduced rendering cost.</text:p>
        </text:list-item>
        <text:list-item>
          <text:p text:style-name="P52">Improved responsiveness.</text:p>
        </text:list-item>
        <text:list-item>
          <text:p text:style-name="P52">Efficient UI updates.</text:p>
        </text:list-item>
        <text:list-item>
          <text:p text:style-name="P52">Better user experience.</text:p>
        </text:list-item>
      </text:list>
      <text:p text:style-name="Horizontal_20_Line"/>
      <text:h text:style-name="Heading_20_3" text:outline-level="3">Step 5 – Component Rendering</text:h>
      <text:p text:style-name="Text_20_body">Affected components generate the updated interface.</text:p>
      <text:p text:style-name="Text_20_body">Examples:</text:p>
      <text:p text:style-name="Preformatted_20_Text"><text:span text:style-name="Source_20_Text">Component Tree</text:span></text:p>
      <text:p text:style-name="Preformatted_20_Text"><text:span text:style-name="Source_20_Text">│</text:span></text:p>
      <text:p text:style-name="Preformatted_20_Text"><text:span text:style-name="Source_20_Text">├── Navbar</text:span></text:p>
      <text:p text:style-name="Preformatted_20_Text"><text:span text:style-name="Source_20_Text">├── Sidebar</text:span></text:p>
      <text:p text:style-name="Preformatted_20_Text"><text:span text:style-name="Source_20_Text">├── Dashboard</text:span></text:p>
      <text:p text:style-name="Preformatted_20_Text"><text:span text:style-name="Source_20_Text">├── Search Results</text:span></text:p>
      <text:p text:style-name="Preformatted_20_Text"><text:span text:style-name="Source_20_Text">├── Analytics Charts</text:span></text:p>
      <text:p text:style-name="Preformatted_20_Text"><text:span text:style-name="Source_20_Text">├── Projects List</text:span></text:p>
      <text:p text:style-name="Preformatted_20_Text"><text:span text:style-name="Source_20_Text">├── Profile</text:span></text:p>
      <text:p text:style-name="P1"><text:span text:style-name="Source_20_Text">└── Settings</text:span></text:p>
      <text:p text:style-name="Text_20_body">Only changed components are re-rendered.</text:p>
      <text:p text:style-name="Horizontal_20_Line"/>
      <text:h text:style-name="Heading_20_3" text:outline-level="3"><text:soft-page-break/>Step 6 – Chart and Dashboard Updates</text:h>
      <text:p text:style-name="Text_20_body">When analytics data changes, visualization components are refreshed.</text:p>
      <text:p text:style-name="Text_20_body">Examples include:</text:p>
      <text:list text:style-name="L52">
        <text:list-item>
          <text:p text:style-name="P53">Line charts</text:p>
        </text:list-item>
        <text:list-item>
          <text:p text:style-name="P53">Bar charts</text:p>
        </text:list-item>
        <text:list-item>
          <text:p text:style-name="P53">Pie charts</text:p>
        </text:list-item>
        <text:list-item>
          <text:p text:style-name="P53">Summary cards</text:p>
        </text:list-item>
        <text:list-item>
          <text:p text:style-name="P53">Activity graphs</text:p>
        </text:list-item>
        <text:list-item>
          <text:p text:style-name="P53">Performance metrics</text:p>
        </text:list-item>
      </text:list>
      <text:p text:style-name="Text_20_body">Recharts redraws only the necessary visualizations.</text:p>
      <text:p text:style-name="Horizontal_20_Line"/>
      <text:h text:style-name="Heading_20_3" text:outline-level="3">Step 7 – Loading and Error States</text:h>
      <text:p text:style-name="Text_20_body">The interface reflects the current request state.</text:p>
      <text:p text:style-name="Text_20_body">Possible UI states include:</text:p>
      <table:table table:name="Table20" table:style-name="Table20">
        <table:table-column table:style-name="Table20.A"/>
        <table:table-column table:style-name="Table20.B"/>
        <table:table-header-rows>
          <table:table-row>
            <table:table-cell table:style-name="Table20.A1" office:value-type="string">
              <text:p text:style-name="Table_20_Heading">State</text:p>
            </table:table-cell>
            <table:table-cell table:style-name="Table20.A1" office:value-type="string">
              <text:p text:style-name="Table_20_Heading">Display</text:p>
            </table:table-cell>
          </table:table-row>
        </table:table-header-rows>
        <table:table-row>
          <table:table-cell table:style-name="Table20.A1" office:value-type="string">
            <text:p text:style-name="Table_20_Contents">Loading</text:p>
          </table:table-cell>
          <table:table-cell table:style-name="Table20.A1" office:value-type="string">
            <text:p text:style-name="Table_20_Contents">Spinner or skeleton UI</text:p>
          </table:table-cell>
        </table:table-row>
        <table:table-row>
          <table:table-cell table:style-name="Table20.A1" office:value-type="string">
            <text:p text:style-name="Table_20_Contents">Success</text:p>
          </table:table-cell>
          <table:table-cell table:style-name="Table20.A1" office:value-type="string">
            <text:p text:style-name="Table_20_Contents">Updated content</text:p>
          </table:table-cell>
        </table:table-row>
        <table:table-row>
          <table:table-cell table:style-name="Table20.A1" office:value-type="string">
            <text:p text:style-name="Table_20_Contents">Empty</text:p>
          </table:table-cell>
          <table:table-cell table:style-name="Table20.A1" office:value-type="string">
            <text:p text:style-name="Table_20_Contents">No results found</text:p>
          </table:table-cell>
        </table:table-row>
        <table:table-row>
          <table:table-cell table:style-name="Table20.A1" office:value-type="string">
            <text:p text:style-name="Table_20_Contents">Validation Error</text:p>
          </table:table-cell>
          <table:table-cell table:style-name="Table20.A1" office:value-type="string">
            <text:p text:style-name="Table_20_Contents">User-friendly message</text:p>
          </table:table-cell>
        </table:table-row>
        <table:table-row>
          <table:table-cell table:style-name="Table20.A1" office:value-type="string">
            <text:p text:style-name="Table_20_Contents">Server Error</text:p>
          </table:table-cell>
          <table:table-cell table:style-name="Table20.A1" office:value-type="string">
            <text:p text:style-name="Table_20_Contents">Retry or error notification</text:p>
          </table:table-cell>
        </table:table-row>
      </table:table>
      <text:p text:style-name="Text_20_body">This keeps users informed throughout the interaction.</text:p>
      <text:p text:style-name="Horizontal_20_Line"/>
      <text:h text:style-name="Heading_20_3" text:outline-level="3">Step 8 – Performance Optimization</text:h>
      <text:p text:style-name="Text_20_body">React applies rendering optimizations.</text:p>
      <text:p text:style-name="Text_20_body">Examples include:</text:p>
      <text:list text:style-name="L53">
        <text:list-item>
          <text:p text:style-name="P54">Component memoization.</text:p>
        </text:list-item>
        <text:list-item>
          <text:p text:style-name="P54">Lazy loading.</text:p>
        </text:list-item>
        <text:list-item>
          <text:p text:style-name="P54">Code splitting.</text:p>
        </text:list-item>
        <text:list-item>
          <text:p text:style-name="P54">Virtualized lists.</text:p>
        </text:list-item>
        <text:list-item>
          <text:p text:style-name="P54">Cached query rendering.</text:p>
        </text:list-item>
      </text:list>
      <text:p text:style-name="Text_20_body">These optimizations improve responsiveness, especially for large datasets.</text:p>
      <text:p text:style-name="Horizontal_20_Line"/>
      <text:h text:style-name="Heading_20_3" text:outline-level="3"><text:soft-page-break/>Step 9 – User Presentation</text:h>
      <text:p text:style-name="Text_20_body">The updated interface is displayed to the user.</text:p>
      <text:p text:style-name="Text_20_body">At this point:</text:p>
      <text:list text:style-name="L54">
        <text:list-item>
          <text:p text:style-name="P55">Business processing is complete.</text:p>
        </text:list-item>
        <text:list-item>
          <text:p text:style-name="P55">State is synchronized.</text:p>
        </text:list-item>
        <text:list-item>
          <text:p text:style-name="P55">Components are refreshed.</text:p>
        </text:list-item>
        <text:list-item>
          <text:p text:style-name="P55">Visualizations are updated.</text:p>
        </text:list-item>
        <text:list-item>
          <text:p text:style-name="P55">The application is ready for the next interaction.</text:p>
        </text:list-item>
      </text:list>
      <text:p text:style-name="Horizontal_20_Line"/>
      <text:h text:style-name="Heading_20_2" text:outline-level="2">Rendering Architecture</text:h>
      <text:p text:style-name="Preformatted_20_Text"><text:span text:style-name="Source_20_Text">API Respons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anStack Query</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Zustand Stor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React Reconciliatio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Component Rendering</text:span></text:p>
      <text:p text:style-name="Preformatted_20_Text"><text:span text:style-name="Source_20_Text"><text:s text:c="6"/>│</text:span></text:p>
      <text:p text:style-name="Preformatted_20_Text"><text:span text:style-name="Source_20_Text"><text:s text:c="6"/>▼</text:span></text:p>
      <text:p text:style-name="P1"><text:span text:style-name="Source_20_Text">Updated User Interface</text:span></text:p>
      <text:p text:style-name="Text_20_body">This architecture ensures efficient and predictable rendering across the application.</text:p>
      <text:p text:style-name="Horizontal_20_Line"/>
      <text:h text:style-name="Heading_20_2" text:outline-level="2">Data Produced</text:h>
      <text:p text:style-name="Text_20_body">The UI Rendering Engine produces the following outputs:</text:p>
      <table:table table:name="Table21" table:style-name="Table21">
        <table:table-column table:style-name="Table21.A"/>
        <table:table-column table:style-name="Table21.B"/>
        <table:table-header-rows>
          <table:table-row>
            <table:table-cell table:style-name="Table21.A1" office:value-type="string">
              <text:p text:style-name="Table_20_Heading">Resource</text:p>
            </table:table-cell>
            <table:table-cell table:style-name="Table21.A1" office:value-type="string">
              <text:p text:style-name="Table_20_Heading">Purpose</text:p>
            </table:table-cell>
          </table:table-row>
        </table:table-header-rows>
        <table:table-row>
          <table:table-cell table:style-name="Table21.A1" office:value-type="string">
            <text:p text:style-name="Table_20_Contents">Updated Components</text:p>
          </table:table-cell>
          <table:table-cell table:style-name="Table21.A1" office:value-type="string">
            <text:p text:style-name="Table_20_Contents">Refreshed interface</text:p>
          </table:table-cell>
        </table:table-row>
        <table:table-row>
          <table:table-cell table:style-name="Table21.A1" office:value-type="string">
            <text:p text:style-name="Table_20_Contents">Synchronized State</text:p>
          </table:table-cell>
          <table:table-cell table:style-name="Table21.A1" office:value-type="string">
            <text:p text:style-name="Table_20_Contents">Current application data</text:p>
          </table:table-cell>
        </table:table-row>
        <table:table-row>
          <table:table-cell table:style-name="Table21.A1" office:value-type="string">
            <text:p text:style-name="Table_20_Contents">Rendered Charts</text:p>
          </table:table-cell>
          <table:table-cell table:style-name="Table21.A1" office:value-type="string">
            <text:p text:style-name="Table_20_Contents">Visual analytics</text:p>
          </table:table-cell>
        </table:table-row>
        <table:table-row>
          <table:table-cell table:style-name="Table21.A1" office:value-type="string">
            <text:p text:style-name="Table_20_Contents">UI Feedback</text:p>
          </table:table-cell>
          <table:table-cell table:style-name="Table21.A1" office:value-type="string">
            <text:p text:style-name="Table_20_Contents">Loading and error indicators</text:p>
          </table:table-cell>
        </table:table-row>
        <table:table-row>
          <table:table-cell table:style-name="Table21.A1" office:value-type="string">
            <text:p text:style-name="Table_20_Contents">Interactive Elements</text:p>
          </table:table-cell>
          <table:table-cell table:style-name="Table21.A1" office:value-type="string">
            <text:p text:style-name="Table_20_Contents">Ready for user actions</text:p>
          </table:table-cell>
        </table:table-row>
        <table:table-row>
          <table:table-cell table:style-name="Table21.A1" office:value-type="string">
            <text:p text:style-name="Table_20_Contents">Visual Output</text:p>
          </table:table-cell>
          <table:table-cell table:style-name="Table21.A1" office:value-type="string">
            <text:p text:style-name="Table_20_Contents">Final rendered application</text:p>
          </table:table-cell>
        </table:table-row>
      </table:table>
      <text:p text:style-name="Text_20_body">These outputs are presented directly to the user.</text:p>
      <text:p text:style-name="Horizontal_20_Line"/>
      <text:h text:style-name="Heading_20_2" text:outline-level="2"><text:soft-page-break/>Failure Handling</text:h>
      <text:p text:style-name="Text_20_body">Possible rendering failures include:</text:p>
      <table:table table:name="Table22" table:style-name="Table22">
        <table:table-column table:style-name="Table22.A"/>
        <table:table-column table:style-name="Table22.B"/>
        <table:table-header-rows>
          <table:table-row>
            <table:table-cell table:style-name="Table22.A1" office:value-type="string">
              <text:p text:style-name="Table_20_Heading">Failure</text:p>
            </table:table-cell>
            <table:table-cell table:style-name="Table22.A1" office:value-type="string">
              <text:p text:style-name="Table_20_Heading">Handling Strategy</text:p>
            </table:table-cell>
          </table:table-row>
        </table:table-header-rows>
        <table:table-row>
          <table:table-cell table:style-name="Table22.A1" office:value-type="string">
            <text:p text:style-name="Table_20_Contents">Component rendering error</text:p>
          </table:table-cell>
          <table:table-cell table:style-name="Table22.A1" office:value-type="string">
            <text:p text:style-name="Table_20_Contents">Error Boundary fallback</text:p>
          </table:table-cell>
        </table:table-row>
        <table:table-row>
          <table:table-cell table:style-name="Table22.A1" office:value-type="string">
            <text:p text:style-name="Table_20_Contents">Missing data</text:p>
          </table:table-cell>
          <table:table-cell table:style-name="Table22.A1" office:value-type="string">
            <text:p text:style-name="Table_20_Contents">Display placeholder or empty state</text:p>
          </table:table-cell>
        </table:table-row>
        <table:table-row>
          <table:table-cell table:style-name="Table22.A1" office:value-type="string">
            <text:p text:style-name="Table_20_Contents">Query update failure</text:p>
          </table:table-cell>
          <table:table-cell table:style-name="Table22.A1" office:value-type="string">
            <text:p text:style-name="Table_20_Contents">Retry or show cached data</text:p>
          </table:table-cell>
        </table:table-row>
        <table:table-row>
          <table:table-cell table:style-name="Table22.A1" office:value-type="string">
            <text:p text:style-name="Table_20_Contents">Chart rendering issue</text:p>
          </table:table-cell>
          <table:table-cell table:style-name="Table22.A1" office:value-type="string">
            <text:p text:style-name="Table_20_Contents">Render fallback visualization</text:p>
          </table:table-cell>
        </table:table-row>
        <table:table-row>
          <table:table-cell table:style-name="Table22.A1" office:value-type="string">
            <text:p text:style-name="Table_20_Contents">Client-side exception</text:p>
          </table:table-cell>
          <table:table-cell table:style-name="Table22.A1" office:value-type="string">
            <text:p text:style-name="Table_20_Contents">Log error and recover gracefully</text:p>
          </table:table-cell>
        </table:table-row>
        <table:table-row>
          <table:table-cell table:style-name="Table22.A1" office:value-type="string">
            <text:p text:style-name="Table_20_Contents">Rendering performance issue</text:p>
          </table:table-cell>
          <table:table-cell table:style-name="Table22.A1" office:value-type="string">
            <text:p text:style-name="Table_20_Contents">Apply optimization strategies</text:p>
          </table:table-cell>
        </table:table-row>
      </table:table>
      <text:p text:style-name="Text_20_body">The rendering layer ensures isolated failures do not affect the entire application.</text:p>
      <text:p text:style-name="Horizontal_20_Line"/>
      <text:h text:style-name="Heading_20_2" text:outline-level="2">Stage Output</text:h>
      <text:p text:style-name="Text_20_body">After successful completion, the UI Rendering Engine provides:</text:p>
      <text:p text:style-name="Preformatted_20_Text"><text:span text:style-name="Source_20_Text">✓ Query Cache Updated</text:span></text:p>
      <text:p text:style-name="Preformatted_20_Text"/>
      <text:p text:style-name="Preformatted_20_Text"><text:span text:style-name="Source_20_Text">✓ Client State Synchronized</text:span></text:p>
      <text:p text:style-name="Preformatted_20_Text"/>
      <text:p text:style-name="Preformatted_20_Text"><text:span text:style-name="Source_20_Text">✓ Components Re-rendered</text:span></text:p>
      <text:p text:style-name="Preformatted_20_Text"/>
      <text:p text:style-name="Preformatted_20_Text"><text:span text:style-name="Source_20_Text">✓ Charts Refreshed</text:span></text:p>
      <text:p text:style-name="Preformatted_20_Text"/>
      <text:p text:style-name="Preformatted_20_Text"><text:span text:style-name="Source_20_Text">✓ User Interface Updated</text:span></text:p>
      <text:p text:style-name="Preformatted_20_Text"/>
      <text:p text:style-name="Preformatted_20_Text"><text:span text:style-name="Source_20_Text">✓ Interactive Elements Ready</text:span></text:p>
      <text:p text:style-name="Preformatted_20_Text"/>
      <text:p text:style-name="P1"><text:span text:style-name="Source_20_Text">✓ Application Ready for User</text:span></text:p>
      <text:p text:style-name="Text_20_body">This rendered interface becomes the input for <text:span text:style-name="Strong_20_Emphasis">Stage 9 – Continuous Interaction Engine</text:span>, where the application listens for new user actions, manages real-time interactions, and restarts the execution pipeline whenever necessary.</text:p>
      <text:p text:style-name="Horizontal_20_Line"/>
      <text:h text:style-name="Heading_20_2" text:outline-level="2">Next Stage</text:h>
      <text:p text:style-name="Text_20_body"><text:span text:style-name="Strong_20_Emphasis">Stage 9 – Continuous Interaction Engine</text:span></text:p>
      <text:p text:style-name="Text_20_body">The final stage maintains the application's interactive lifecycle. It listens for user events, manages ongoing interactions, triggers new requests, performs background synchronization, and continuously restarts the execution pipeline without requiring the application to reload.</text:p>
      <text:h text:style-name="Heading_20_1" text:outline-level="1"><text:soft-page-break/>10. Stage 9 – Continuous Interaction Engine</text:h>
      <text:h text:style-name="Heading_20_2" text:outline-level="2">Overview</text:h>
      <text:p text:style-name="Text_20_body">The <text:span text:style-name="Strong_20_Emphasis">Continuous Interaction Engine</text:span> manages the application's runtime after the initial request has been completed. Modern web applications are event-driven, meaning the application remains active and continuously responds to user interactions without requiring a full page reload.</text:p>
      <text:p text:style-name="Text_20_body">This stage listens for user events, triggers new execution pipelines, manages background synchronization, and ensures that the application remains responsive throughout the user's session.</text:p>
      <text:p text:style-name="Text_20_body">Rather than representing the end of execution, this stage creates a continuous execution loop where every new interaction begins another journey through the pipeline.</text:p>
      <text:p text:style-name="Horizontal_20_Line"/>
      <text:h text:style-name="Heading_20_2" text:outline-level="2">Primary Responsibilities</text:h>
      <text:p text:style-name="Text_20_body">The Continuous Interaction Engine is responsible for:</text:p>
      <text:list text:style-name="L55">
        <text:list-item>
          <text:p text:style-name="P56">Listening for user interactions.</text:p>
        </text:list-item>
        <text:list-item>
          <text:p text:style-name="P56">Triggering new application requests.</text:p>
        </text:list-item>
        <text:list-item>
          <text:p text:style-name="P56">Managing client-side navigation.</text:p>
        </text:list-item>
        <text:list-item>
          <text:p text:style-name="P56">Handling background data synchronization.</text:p>
        </text:list-item>
        <text:list-item>
          <text:p text:style-name="P56">Refreshing stale information.</text:p>
        </text:list-item>
        <text:list-item>
          <text:p text:style-name="P56">Processing real-time UI updates.</text:p>
        </text:list-item>
        <text:list-item>
          <text:p text:style-name="P56">Maintaining application responsiveness.</text:p>
        </text:list-item>
        <text:list-item>
          <text:p text:style-name="P56">Restarting the execution pipeline when required.</text:p>
        </text:list-item>
      </text:list>
      <text:p text:style-name="Horizontal_20_Line"/>
      <text:h text:style-name="Heading_20_2" text:outline-level="2">Runtime Components</text:h>
      <text:p text:style-name="Preformatted_20_Text"><text:span text:style-name="Source_20_Text">Continuous Interaction Engine</text:span></text:p>
      <text:p text:style-name="Preformatted_20_Text"><text:span text:style-name="Source_20_Text">│</text:span></text:p>
      <text:p text:style-name="Preformatted_20_Text"><text:span text:style-name="Source_20_Text">├── Event Listener</text:span></text:p>
      <text:p text:style-name="Preformatted_20_Text"><text:span text:style-name="Source_20_Text">├── React Event System</text:span></text:p>
      <text:p text:style-name="Preformatted_20_Text"><text:span text:style-name="Source_20_Text">├── Next.js Router</text:span></text:p>
      <text:p text:style-name="Preformatted_20_Text"><text:span text:style-name="Source_20_Text">├── TanStack Query Observer</text:span></text:p>
      <text:p text:style-name="Preformatted_20_Text"><text:span text:style-name="Source_20_Text">├── Background Sync Manager</text:span></text:p>
      <text:p text:style-name="Preformatted_20_Text"><text:span text:style-name="Source_20_Text">├── Notification Handler</text:span></text:p>
      <text:p text:style-name="Preformatted_20_Text"><text:span text:style-name="Source_20_Text">├── UI Update Scheduler</text:span></text:p>
      <text:p text:style-name="P1"><text:span text:style-name="Source_20_Text">└── Interaction Loop</text:span></text:p>
      <text:p text:style-name="Horizontal_20_Line"/>
      <text:h text:style-name="Heading_20_2" text:outline-level="2">Execution Workflow</text:h>
      <text:p text:style-name="Preformatted_20_Text"><text:span text:style-name="Source_20_Text">User Interaction</text:span></text:p>
      <text:p text:style-name="Preformatted_20_Text"><text:soft-page-break/><text:span text:style-name="Source_20_Text"><text:s text:c="8"/>│</text:span></text:p>
      <text:p text:style-name="Preformatted_20_Text"><text:span text:style-name="Source_20_Text"><text:s text:c="8"/>▼</text:span></text:p>
      <text:p text:style-name="Preformatted_20_Text"><text:span text:style-name="Source_20_Text">React Event Trigger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Determine Ac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Update Local Stat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API Request Needed?</text:span></text:p>
      <text:p text:style-name="Preformatted_20_Text"><text:span text:style-name="Source_20_Text"><text:s text:c="6"/>│ <text:s text:c="12"/>│</text:span></text:p>
      <text:p text:style-name="Preformatted_20_Text"><text:span text:style-name="Source_20_Text"><text:s text:c="5"/>Yes <text:s text:c="11"/>No</text:span></text:p>
      <text:p text:style-name="Preformatted_20_Text"><text:span text:style-name="Source_20_Text"><text:s text:c="6"/>│ <text:s text:c="12"/>│</text:span></text:p>
      <text:p text:style-name="Preformatted_20_Text"><text:span text:style-name="Source_20_Text"><text:s text:c="6"/>▼ <text:s text:c="12"/>▼</text:span></text:p>
      <text:p text:style-name="Preformatted_20_Text"><text:span text:style-name="Source_20_Text">Restart Pipeline <text:s text:c="2"/>Update UI</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Background Synchronization</text:span></text:p>
      <text:p text:style-name="Preformatted_20_Text"><text:span text:style-name="Source_20_Text"><text:s text:c="6"/>│</text:span></text:p>
      <text:p text:style-name="Preformatted_20_Text"><text:span text:style-name="Source_20_Text"><text:s text:c="6"/>▼</text:span></text:p>
      <text:p text:style-name="P1"><text:span text:style-name="Source_20_Text">Wait for Next Interaction</text:span></text:p>
      <text:p text:style-name="Horizontal_20_Line"/>
      <text:h text:style-name="Heading_20_2" text:outline-level="2">Internal Processing</text:h>
      <text:h text:style-name="Heading_20_3" text:outline-level="3">Step 1 – Event Detection</text:h>
      <text:p text:style-name="Text_20_body">The application continuously listens for user interactions.</text:p>
      <text:p text:style-name="Text_20_body">Examples include:</text:p>
      <text:list text:style-name="L56">
        <text:list-item>
          <text:p text:style-name="P57">Button clicks</text:p>
        </text:list-item>
        <text:list-item>
          <text:p text:style-name="P57">Form submissions</text:p>
        </text:list-item>
        <text:list-item>
          <text:p text:style-name="P57">Search input</text:p>
        </text:list-item>
        <text:list-item>
          <text:p text:style-name="P57">Filter changes</text:p>
        </text:list-item>
        <text:list-item>
          <text:p text:style-name="P57">Navigation</text:p>
        </text:list-item>
        <text:list-item>
          <text:p text:style-name="P57">Sorting</text:p>
        </text:list-item>
        <text:list-item>
          <text:p text:style-name="P57">Pagination</text:p>
        </text:list-item>
        <text:list-item>
          <text:p text:style-name="P57">Keyboard shortcuts</text:p>
        </text:list-item>
      </text:list>
      <text:p text:style-name="Text_20_body">Each event is evaluated independently.</text:p>
      <text:p text:style-name="Horizontal_20_Line"/>
      <text:h text:style-name="Heading_20_3" text:outline-level="3">Step 2 – Event Processing</text:h>
      <text:p text:style-name="Text_20_body">The React event system processes the detected interaction.</text:p>
      <text:p text:style-name="Text_20_body">Typical actions include:</text:p>
      <text:list text:style-name="L57">
        <text:list-item>
          <text:p text:style-name="P58">Updating local state.</text:p>
        </text:list-item>
        <text:list-item>
          <text:p text:style-name="P58"><text:soft-page-break/>Executing component callbacks.</text:p>
        </text:list-item>
        <text:list-item>
          <text:p text:style-name="P58">Triggering navigation.</text:p>
        </text:list-item>
        <text:list-item>
          <text:p text:style-name="P58">Initiating API requests.</text:p>
        </text:list-item>
        <text:list-item>
          <text:p text:style-name="P58">Opening dialogs.</text:p>
        </text:list-item>
        <text:list-item>
          <text:p text:style-name="P58">Displaying notifications.</text:p>
        </text:list-item>
      </text:list>
      <text:p text:style-name="Text_20_body">Not every interaction requires communication with the backend.</text:p>
      <text:p text:style-name="Horizontal_20_Line"/>
      <text:h text:style-name="Heading_20_3" text:outline-level="3">Step 3 – Client-Side Updates</text:h>
      <text:p text:style-name="Text_20_body">Some interactions affect only the user interface.</text:p>
      <text:p text:style-name="Text_20_body">Examples:</text:p>
      <text:p text:style-name="Preformatted_20_Text"><text:span text:style-name="Source_20_Text">UI Actions</text:span></text:p>
      <text:p text:style-name="Preformatted_20_Text"><text:span text:style-name="Source_20_Text">│</text:span></text:p>
      <text:p text:style-name="Preformatted_20_Text"><text:span text:style-name="Source_20_Text">├── Open Sidebar</text:span></text:p>
      <text:p text:style-name="Preformatted_20_Text"><text:span text:style-name="Source_20_Text">├── Change Theme</text:span></text:p>
      <text:p text:style-name="Preformatted_20_Text"><text:span text:style-name="Source_20_Text">├── Switch Tabs</text:span></text:p>
      <text:p text:style-name="Preformatted_20_Text"><text:span text:style-name="Source_20_Text">├── Expand Menu</text:span></text:p>
      <text:p text:style-name="Preformatted_20_Text"><text:span text:style-name="Source_20_Text">├── Open Modal</text:span></text:p>
      <text:p text:style-name="P1"><text:span text:style-name="Source_20_Text">└── Collapse Panel</text:span></text:p>
      <text:p text:style-name="Text_20_body">These updates occur instantly using Zustand and React state.</text:p>
      <text:p text:style-name="Horizontal_20_Line"/>
      <text:h text:style-name="Heading_20_3" text:outline-level="3">Step 4 – Request Generation</text:h>
      <text:p text:style-name="Text_20_body">When server data is required, a new request is generated.</text:p>
      <text:p text:style-name="Text_20_body">Examples include:</text:p>
      <text:list text:style-name="L58">
        <text:list-item>
          <text:p text:style-name="P59">New search query</text:p>
        </text:list-item>
        <text:list-item>
          <text:p text:style-name="P59">Create project</text:p>
        </text:list-item>
        <text:list-item>
          <text:p text:style-name="P59">Update profile</text:p>
        </text:list-item>
        <text:list-item>
          <text:p text:style-name="P59">Load dashboard</text:p>
        </text:list-item>
        <text:list-item>
          <text:p text:style-name="P59">Delete record</text:p>
        </text:list-item>
        <text:list-item>
          <text:p text:style-name="P59">Save settings</text:p>
        </text:list-item>
      </text:list>
      <text:p text:style-name="Text_20_body">Each request restarts the execution pipeline from the Request &amp; Module Orchestrator.</text:p>
      <text:p text:style-name="Horizontal_20_Line"/>
      <text:h text:style-name="Heading_20_3" text:outline-level="3">Step 5 – Background Synchronization</text:h>
      <text:p text:style-name="Text_20_body">While users continue interacting, background processes keep application data fresh.</text:p>
      <text:p text:style-name="Text_20_body">Examples include:</text:p>
      <text:list text:style-name="L59">
        <text:list-item>
          <text:p text:style-name="P60">Automatic query refetching.</text:p>
        </text:list-item>
        <text:list-item>
          <text:p text:style-name="P60"><text:soft-page-break/>Window focus synchronization.</text:p>
        </text:list-item>
        <text:list-item>
          <text:p text:style-name="P60">Network reconnection.</text:p>
        </text:list-item>
        <text:list-item>
          <text:p text:style-name="P60">Cache invalidation.</text:p>
        </text:list-item>
        <text:list-item>
          <text:p text:style-name="P60">Scheduled refreshes.</text:p>
        </text:list-item>
      </text:list>
      <text:p text:style-name="Text_20_body">These updates occur without interrupting the user.</text:p>
      <text:p text:style-name="Horizontal_20_Line"/>
      <text:h text:style-name="Heading_20_3" text:outline-level="3">Step 6 – Navigation Management</text:h>
      <text:p text:style-name="Text_20_body">The Next.js App Router enables seamless navigation.</text:p>
      <text:p text:style-name="Text_20_body">Example flow:</text:p>
      <text:p text:style-name="Preformatted_20_Text"><text:span text:style-name="Source_20_Text">Current Pag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User Navigates</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Route Changes</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Load New Components</text:span></text:p>
      <text:p text:style-name="Preformatted_20_Text"><text:span text:style-name="Source_20_Text"><text:s text:c="6"/>│</text:span></text:p>
      <text:p text:style-name="Preformatted_20_Text"><text:span text:style-name="Source_20_Text"><text:s text:c="6"/>▼</text:span></text:p>
      <text:p text:style-name="P1"><text:span text:style-name="Source_20_Text">Fetch Required Data</text:span></text:p>
      <text:p text:style-name="Text_20_body">Navigation occurs without full browser refreshes.</text:p>
      <text:p text:style-name="Horizontal_20_Line"/>
      <text:h text:style-name="Heading_20_3" text:outline-level="3">Step 7 – Notification Handling</text:h>
      <text:p text:style-name="Text_20_body">The engine manages application notifications.</text:p>
      <text:p text:style-name="Text_20_body">Examples include:</text:p>
      <text:list text:style-name="L60">
        <text:list-item>
          <text:p text:style-name="P61">Success messages.</text:p>
        </text:list-item>
        <text:list-item>
          <text:p text:style-name="P61">Validation errors.</text:p>
        </text:list-item>
        <text:list-item>
          <text:p text:style-name="P61">Background task completion.</text:p>
        </text:list-item>
        <text:list-item>
          <text:p text:style-name="P61">System alerts.</text:p>
        </text:list-item>
        <text:list-item>
          <text:p text:style-name="P61">Future real-time notifications.</text:p>
        </text:list-item>
      </text:list>
      <text:p text:style-name="Text_20_body">Notifications improve user awareness throughout the application.</text:p>
      <text:p text:style-name="Horizontal_20_Line"/>
      <text:h text:style-name="Heading_20_3" text:outline-level="3">Step 8 – Session Continuity</text:h>
      <text:p text:style-name="Text_20_body">The application maintains the active user session.</text:p>
      <text:p text:style-name="Text_20_body">Responsibilities include:</text:p>
      <text:list text:style-name="L61">
        <text:list-item>
          <text:p text:style-name="P62"><text:soft-page-break/>Monitoring authentication status.</text:p>
        </text:list-item>
        <text:list-item>
          <text:p text:style-name="P62">Handling token expiration.</text:p>
        </text:list-item>
        <text:list-item>
          <text:p text:style-name="P62">Refreshing session information.</text:p>
        </text:list-item>
        <text:list-item>
          <text:p text:style-name="P62">Detecting logout events.</text:p>
        </text:list-item>
        <text:list-item>
          <text:p text:style-name="P62">Preserving user preferences.</text:p>
        </text:list-item>
      </text:list>
      <text:p text:style-name="Text_20_body">This ensures uninterrupted usage during extended sessions.</text:p>
      <text:p text:style-name="Horizontal_20_Line"/>
      <text:h text:style-name="Heading_20_3" text:outline-level="3">Step 9 – Continuous Execution Loop</text:h>
      <text:p text:style-name="Text_20_body">After completing an interaction, the application returns to an idle state, waiting for the next event.</text:p>
      <text:p text:style-name="Text_20_body">The execution cycle repeats continuously.</text:p>
      <text:p text:style-name="Preformatted_20_Text"><text:span text:style-name="Source_20_Text">User Action</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Pipeline Executes</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UI Updated</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Wait for Next Action</text:span></text:p>
      <text:p text:style-name="Preformatted_20_Text"><text:span text:style-name="Source_20_Text"><text:s text:c="6"/>│</text:span></text:p>
      <text:p text:style-name="P1"><text:span text:style-name="Source_20_Text"><text:s text:c="6"/>└───────────────► Repeat</text:span></text:p>
      <text:p text:style-name="Text_20_body">This loop continues until the user closes the application or ends the session.</text:p>
      <text:p text:style-name="Horizontal_20_Line"/>
      <text:h text:style-name="Heading_20_2" text:outline-level="2">Continuous Runtime Architecture</text:h>
      <text:p text:style-name="Preformatted_20_Text"><text:span text:style-name="Source_20_Text">User</text:span></text:p>
      <text:p text:style-name="Preformatted_20_Text"><text:span text:style-name="Source_20_Text"><text:s/>│</text:span></text:p>
      <text:p text:style-name="Preformatted_20_Text"><text:span text:style-name="Source_20_Text"><text:s/>▼</text:span></text:p>
      <text:p text:style-name="Preformatted_20_Text"><text:span text:style-name="Source_20_Text">Interaction</text:span></text:p>
      <text:p text:style-name="Preformatted_20_Text"><text:span text:style-name="Source_20_Text"><text:s/>│</text:span></text:p>
      <text:p text:style-name="Preformatted_20_Text"><text:span text:style-name="Source_20_Text"><text:s/>▼</text:span></text:p>
      <text:p text:style-name="Preformatted_20_Text"><text:span text:style-name="Source_20_Text">React Events</text:span></text:p>
      <text:p text:style-name="Preformatted_20_Text"><text:span text:style-name="Source_20_Text"><text:s/>│</text:span></text:p>
      <text:p text:style-name="Preformatted_20_Text"><text:span text:style-name="Source_20_Text"><text:s/>▼</text:span></text:p>
      <text:p text:style-name="Preformatted_20_Text"><text:span text:style-name="Source_20_Text">State Update</text:span></text:p>
      <text:p text:style-name="Preformatted_20_Text"><text:span text:style-name="Source_20_Text"><text:s/>│</text:span></text:p>
      <text:p text:style-name="Preformatted_20_Text"><text:span text:style-name="Source_20_Text"><text:s/>▼</text:span></text:p>
      <text:p text:style-name="Preformatted_20_Text"><text:span text:style-name="Source_20_Text">API Request (if needed)</text:span></text:p>
      <text:p text:style-name="Preformatted_20_Text"><text:span text:style-name="Source_20_Text"><text:s/>│</text:span></text:p>
      <text:p text:style-name="Preformatted_20_Text"><text:span text:style-name="Source_20_Text"><text:s/>▼</text:span></text:p>
      <text:p text:style-name="Preformatted_20_Text"><text:span text:style-name="Source_20_Text">Execution Pipeline</text:span></text:p>
      <text:p text:style-name="Preformatted_20_Text"><text:span text:style-name="Source_20_Text"><text:s/>│</text:span></text:p>
      <text:p text:style-name="Preformatted_20_Text"><text:span text:style-name="Source_20_Text"><text:s/>▼</text:span></text:p>
      <text:p text:style-name="Preformatted_20_Text"><text:span text:style-name="Source_20_Text">Updated UI</text:span></text:p>
      <text:p text:style-name="Preformatted_20_Text"><text:span text:style-name="Source_20_Text"><text:s/>│</text:span></text:p>
      <text:p text:style-name="P1"><text:span text:style-name="Source_20_Text"><text:s/>└──────────────► Repeat</text:span></text:p>
      <text:p text:style-name="Text_20_body"><text:soft-page-break/>This event-driven architecture enables a responsive and interactive user experience.</text:p>
      <text:p text:style-name="Horizontal_20_Line"/>
      <text:h text:style-name="Heading_20_2" text:outline-level="2">Data Produced</text:h>
      <text:p text:style-name="Text_20_body">The Continuous Interaction Engine maintains the following runtime information:</text:p>
      <table:table table:name="Table23" table:style-name="Table23">
        <table:table-column table:style-name="Table23.A"/>
        <table:table-column table:style-name="Table23.B"/>
        <table:table-header-rows>
          <table:table-row>
            <table:table-cell table:style-name="Table23.A1" office:value-type="string">
              <text:p text:style-name="Table_20_Heading">Resource</text:p>
            </table:table-cell>
            <table:table-cell table:style-name="Table23.A1" office:value-type="string">
              <text:p text:style-name="Table_20_Heading">Purpose</text:p>
            </table:table-cell>
          </table:table-row>
        </table:table-header-rows>
        <table:table-row>
          <table:table-cell table:style-name="Table23.A1" office:value-type="string">
            <text:p text:style-name="Table_20_Contents">Active User Session</text:p>
          </table:table-cell>
          <table:table-cell table:style-name="Table23.A1" office:value-type="string">
            <text:p text:style-name="Table_20_Contents">Maintains authentication</text:p>
          </table:table-cell>
        </table:table-row>
        <table:table-row>
          <table:table-cell table:style-name="Table23.A1" office:value-type="string">
            <text:p text:style-name="Table_20_Contents">Current UI State</text:p>
          </table:table-cell>
          <table:table-cell table:style-name="Table23.A1" office:value-type="string">
            <text:p text:style-name="Table_20_Contents">Tracks interface interactions</text:p>
          </table:table-cell>
        </table:table-row>
        <table:table-row>
          <table:table-cell table:style-name="Table23.A1" office:value-type="string">
            <text:p text:style-name="Table_20_Contents">Background Query Status</text:p>
          </table:table-cell>
          <table:table-cell table:style-name="Table23.A1" office:value-type="string">
            <text:p text:style-name="Table_20_Contents">Synchronizes server data</text:p>
          </table:table-cell>
        </table:table-row>
        <table:table-row>
          <table:table-cell table:style-name="Table23.A1" office:value-type="string">
            <text:p text:style-name="Table_20_Contents">Navigation State</text:p>
          </table:table-cell>
          <table:table-cell table:style-name="Table23.A1" office:value-type="string">
            <text:p text:style-name="Table_20_Contents">Current application route</text:p>
          </table:table-cell>
        </table:table-row>
        <table:table-row>
          <table:table-cell table:style-name="Table23.A1" office:value-type="string">
            <text:p text:style-name="Table_20_Contents">Notification Queue</text:p>
          </table:table-cell>
          <table:table-cell table:style-name="Table23.A1" office:value-type="string">
            <text:p text:style-name="Table_20_Contents">User feedback messages</text:p>
          </table:table-cell>
        </table:table-row>
        <table:table-row>
          <table:table-cell table:style-name="Table23.A1" office:value-type="string">
            <text:p text:style-name="Table_20_Contents">Event Queue</text:p>
          </table:table-cell>
          <table:table-cell table:style-name="Table23.A1" office:value-type="string">
            <text:p text:style-name="Table_20_Contents">Pending user interactions</text:p>
          </table:table-cell>
        </table:table-row>
      </table:table>
      <text:p text:style-name="Text_20_body">These resources remain active for the duration of the user's session.</text:p>
      <text:p text:style-name="Horizontal_20_Line"/>
      <text:h text:style-name="Heading_20_2" text:outline-level="2">Failure Handling</text:h>
      <text:p text:style-name="Text_20_body">Possible runtime failures include:</text:p>
      <table:table table:name="Table24" table:style-name="Table24">
        <table:table-column table:style-name="Table24.A"/>
        <table:table-column table:style-name="Table24.B"/>
        <table:table-header-rows>
          <table:table-row>
            <table:table-cell table:style-name="Table24.A1" office:value-type="string">
              <text:p text:style-name="Table_20_Heading">Failure</text:p>
            </table:table-cell>
            <table:table-cell table:style-name="Table24.A1" office:value-type="string">
              <text:p text:style-name="Table_20_Heading">Handling Strategy</text:p>
            </table:table-cell>
          </table:table-row>
        </table:table-header-rows>
        <table:table-row>
          <table:table-cell table:style-name="Table24.A1" office:value-type="string">
            <text:p text:style-name="Table_20_Contents">Session expiration</text:p>
          </table:table-cell>
          <table:table-cell table:style-name="Table24.A1" office:value-type="string">
            <text:p text:style-name="Table_20_Contents">Redirect to login or refresh token</text:p>
          </table:table-cell>
        </table:table-row>
        <table:table-row>
          <table:table-cell table:style-name="Table24.A1" office:value-type="string">
            <text:p text:style-name="Table_20_Contents">Network interruption</text:p>
          </table:table-cell>
          <table:table-cell table:style-name="Table24.A1" office:value-type="string">
            <text:p text:style-name="Table_20_Contents">Retry requests upon reconnection</text:p>
          </table:table-cell>
        </table:table-row>
        <table:table-row>
          <table:table-cell table:style-name="Table24.A1" office:value-type="string">
            <text:p text:style-name="Table_20_Contents">Navigation failure</text:p>
          </table:table-cell>
          <table:table-cell table:style-name="Table24.A1" office:value-type="string">
            <text:p text:style-name="Table_20_Contents">Display error page or fallback route</text:p>
          </table:table-cell>
        </table:table-row>
        <table:table-row>
          <table:table-cell table:style-name="Table24.A1" office:value-type="string">
            <text:p text:style-name="Table_20_Contents">Background sync failure</text:p>
          </table:table-cell>
          <table:table-cell table:style-name="Table24.A1" office:value-type="string">
            <text:p text:style-name="Table_20_Contents">Retry without blocking user interaction</text:p>
          </table:table-cell>
        </table:table-row>
        <table:table-row>
          <table:table-cell table:style-name="Table24.A1" office:value-type="string">
            <text:p text:style-name="Table_20_Contents">Client-side exception</text:p>
          </table:table-cell>
          <table:table-cell table:style-name="Table24.A1" office:value-type="string">
            <text:p text:style-name="Table_20_Contents">Recover using Error Boundaries</text:p>
          </table:table-cell>
        </table:table-row>
        <table:table-row>
          <table:table-cell table:style-name="Table24.A1" office:value-type="string">
            <text:p text:style-name="Table_20_Contents">Notification failure</text:p>
          </table:table-cell>
          <table:table-cell table:style-name="Table24.A1" office:value-type="string">
            <text:p text:style-name="Table_20_Contents">Log error and continue execution</text:p>
          </table:table-cell>
        </table:table-row>
      </table:table>
      <text:p text:style-name="Text_20_body">The application remains operational even when individual interactions fail.</text:p>
      <text:p text:style-name="Horizontal_20_Line"/>
      <text:h text:style-name="Heading_20_2" text:outline-level="2">Stage Output</text:h>
      <text:p text:style-name="Text_20_body">After successful completion, the Continuous Interaction Engine provides:</text:p>
      <text:p text:style-name="Preformatted_20_Text"><text:span text:style-name="Source_20_Text">✓ User Interaction Processed</text:span></text:p>
      <text:p text:style-name="Preformatted_20_Text"/>
      <text:p text:style-name="Preformatted_20_Text"><text:span text:style-name="Source_20_Text">✓ UI State Updated</text:span></text:p>
      <text:p text:style-name="Preformatted_20_Text"/>
      <text:p text:style-name="Preformatted_20_Text"><text:span text:style-name="Source_20_Text">✓ Background Synchronization Active</text:span></text:p>
      <text:p text:style-name="Preformatted_20_Text"/>
      <text:p text:style-name="Preformatted_20_Text"><text:span text:style-name="Source_20_Text">✓ Navigation Managed</text:span></text:p>
      <text:p text:style-name="Preformatted_20_Text"/>
      <text:p text:style-name="Preformatted_20_Text"><text:span text:style-name="Source_20_Text">✓ Session Maintained</text:span></text:p>
      <text:p text:style-name="Preformatted_20_Text"/>
      <text:p text:style-name="Preformatted_20_Text"><text:span text:style-name="Source_20_Text">✓ Application Ready</text:span></text:p>
      <text:p text:style-name="Preformatted_20_Text"/>
      <text:p text:style-name="P1"><text:span text:style-name="Source_20_Text">✓ Execution Pipeline Restarted When Needed</text:span></text:p>
      <text:p text:style-name="Text_20_body"><text:soft-page-break/>The system now returns to an idle state, ready to process the next user interaction, creating a continuous execution lifecycle.</text:p>
      <text:p text:style-name="Horizontal_20_Line"/>
      <text:h text:style-name="Heading_20_1" text:outline-level="1">11. End-to-End Execution Trace</text:h>
      <text:h text:style-name="Heading_20_2" text:outline-level="2">Overview</text:h>
      <text:p text:style-name="Text_20_body">This section summarizes how a typical user request travels through the complete Search System execution pipeline.</text:p>
      <text:p text:style-name="Text_20_body">The example below demonstrates the complete lifecycle of a user searching for information within the application.</text:p>
      <text:p text:style-name="Horizontal_20_Line"/>
      <text:h text:style-name="Heading_20_2" text:outline-level="2">Example Execution Flow</text:h>
      <text:p text:style-name="Preformatted_20_Text"><text:span text:style-name="Source_20_Text">User Searches for "React"</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1</text:span></text:p>
      <text:p text:style-name="Preformatted_20_Text"><text:span text:style-name="Source_20_Text">Application Bootstrap</text:span></text:p>
      <text:p text:style-name="Preformatted_20_Text"><text:span text:style-name="Source_20_Text">(Application Initializ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2</text:span></text:p>
      <text:p text:style-name="Preformatted_20_Text"><text:span text:style-name="Source_20_Text">Authentication &amp; Session Manager</text:span></text:p>
      <text:p text:style-name="Preformatted_20_Text"><text:span text:style-name="Source_20_Text">(User Session Verifi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3</text:span></text:p>
      <text:p text:style-name="Preformatted_20_Text"><text:span text:style-name="Source_20_Text">Application State Engine</text:span></text:p>
      <text:p text:style-name="Preformatted_20_Text"><text:span text:style-name="Source_20_Text">(State &amp; Cache Prepar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4</text:span></text:p>
      <text:p text:style-name="Preformatted_20_Text"><text:span text:style-name="Source_20_Text">Request &amp; Module Orchestrator</text:span></text:p>
      <text:p text:style-name="Preformatted_20_Text"><text:span text:style-name="Source_20_Text">(Search Module Select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5</text:span></text:p>
      <text:p text:style-name="Preformatted_20_Text"><text:span text:style-name="Source_20_Text">Business Processing Engine</text:span></text:p>
      <text:p text:style-name="Preformatted_20_Text"><text:span text:style-name="Source_20_Text">(Search Logic Execut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6</text:span></text:p>
      <text:p text:style-name="Preformatted_20_Text"><text:span text:style-name="Source_20_Text">Data Access Engine</text:span></text:p>
      <text:p text:style-name="Preformatted_20_Text"><text:span text:style-name="Source_20_Text">(Search MongoDB)</text:span></text:p>
      <text:p text:style-name="Preformatted_20_Text"/>
      <text:p text:style-name="Preformatted_20_Text"><text:span text:style-name="Source_20_Text"><text:s text:c="8"/>│</text:span></text:p>
      <text:p text:style-name="Preformatted_20_Text"><text:soft-page-break/><text:span text:style-name="Source_20_Text"><text:s text:c="8"/>▼</text:span></text:p>
      <text:p text:style-name="Preformatted_20_Text"><text:span text:style-name="Source_20_Text">Stage 7</text:span></text:p>
      <text:p text:style-name="Preformatted_20_Text"><text:span text:style-name="Source_20_Text">Response Processing Engine</text:span></text:p>
      <text:p text:style-name="Preformatted_20_Text"><text:span text:style-name="Source_20_Text">(JSON Response Creat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8</text:span></text:p>
      <text:p text:style-name="Preformatted_20_Text"><text:span text:style-name="Source_20_Text">UI Rendering Engine</text:span></text:p>
      <text:p text:style-name="Preformatted_20_Text"><text:span text:style-name="Source_20_Text">(Search Results Displayed)</text:span></text:p>
      <text:p text:style-name="Preformatted_20_Text"/>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ge 9</text:span></text:p>
      <text:p text:style-name="Preformatted_20_Text"><text:span text:style-name="Source_20_Text">Continuous Interaction Engine</text:span></text:p>
      <text:p text:style-name="P1"><text:span text:style-name="Source_20_Text">(Ready for Next User Action)</text:span></text:p>
      <text:p text:style-name="Horizontal_20_Line"/>
      <text:h text:style-name="Heading_20_2" text:outline-level="2">Pipeline Summary</text:h>
      <table:table table:name="Table25" table:style-name="Table25">
        <table:table-column table:style-name="Table25.A"/>
        <table:table-column table:style-name="Table25.B"/>
        <table:table-header-rows>
          <table:table-row>
            <table:table-cell table:style-name="Table25.A1" office:value-type="string">
              <text:p text:style-name="Table_20_Heading">Stage</text:p>
            </table:table-cell>
            <table:table-cell table:style-name="Table25.A1" office:value-type="string">
              <text:p text:style-name="Table_20_Heading">Purpos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Initialize the application runtime</text:p>
          </table:table-cell>
        </table:table-row>
        <table:table-row>
          <table:table-cell table:style-name="Table25.A1" office:value-type="string">
            <text:p text:style-name="Table_20_Contents">2</text:p>
          </table:table-cell>
          <table:table-cell table:style-name="Table25.A1" office:value-type="string">
            <text:p text:style-name="Table_20_Contents">Authenticate and restore the user session</text:p>
          </table:table-cell>
        </table:table-row>
        <table:table-row>
          <table:table-cell table:style-name="Table25.A1" office:value-type="string">
            <text:p text:style-name="Table_20_Contents">3</text:p>
          </table:table-cell>
          <table:table-cell table:style-name="Table25.A1" office:value-type="string">
            <text:p text:style-name="Table_20_Contents">Initialize and synchronize application state</text:p>
          </table:table-cell>
        </table:table-row>
        <table:table-row>
          <table:table-cell table:style-name="Table25.A1" office:value-type="string">
            <text:p text:style-name="Table_20_Contents">4</text:p>
          </table:table-cell>
          <table:table-cell table:style-name="Table25.A1" office:value-type="string">
            <text:p text:style-name="Table_20_Contents">Route and dispatch requests to the correct module</text:p>
          </table:table-cell>
        </table:table-row>
        <table:table-row>
          <table:table-cell table:style-name="Table25.A1" office:value-type="string">
            <text:p text:style-name="Table_20_Contents">5</text:p>
          </table:table-cell>
          <table:table-cell table:style-name="Table25.A1" office:value-type="string">
            <text:p text:style-name="Table_20_Contents">Execute business rules and workflows</text:p>
          </table:table-cell>
        </table:table-row>
        <table:table-row>
          <table:table-cell table:style-name="Table25.A1" office:value-type="string">
            <text:p text:style-name="Table_20_Contents">6</text:p>
          </table:table-cell>
          <table:table-cell table:style-name="Table25.A1" office:value-type="string">
            <text:p text:style-name="Table_20_Contents">Perform database operations</text:p>
          </table:table-cell>
        </table:table-row>
        <table:table-row>
          <table:table-cell table:style-name="Table25.A1" office:value-type="string">
            <text:p text:style-name="Table_20_Contents">7</text:p>
          </table:table-cell>
          <table:table-cell table:style-name="Table25.A1" office:value-type="string">
            <text:p text:style-name="Table_20_Contents">Build standardized API responses</text:p>
          </table:table-cell>
        </table:table-row>
        <table:table-row>
          <table:table-cell table:style-name="Table25.A1" office:value-type="string">
            <text:p text:style-name="Table_20_Contents">8</text:p>
          </table:table-cell>
          <table:table-cell table:style-name="Table25.A1" office:value-type="string">
            <text:p text:style-name="Table_20_Contents">Update application state and render the UI</text:p>
          </table:table-cell>
        </table:table-row>
        <table:table-row>
          <table:table-cell table:style-name="Table25.A1" office:value-type="string">
            <text:p text:style-name="Table_20_Contents">9</text:p>
          </table:table-cell>
          <table:table-cell table:style-name="Table25.A1" office:value-type="string">
            <text:p text:style-name="Table_20_Contents">Maintain continuous user interaction and restart the pipeline</text:p>
          </table:table-cell>
        </table:table-row>
      </table:table>
      <text:p text:style-name="Horizontal_20_Line"/>
      <text:h text:style-name="Heading_20_2" text:outline-level="2">Next Section</text:h>
      <text:p text:style-name="Text_20_body">The following section provides a concise summary of the technologies used throughout the execution pipeline and the role each technology plays within the Search System.</text:p>
      <text:h text:style-name="Heading_20_1" text:outline-level="1">12. Technology Summary</text:h>
      <text:h text:style-name="Heading_20_2" text:outline-level="2">Overview</text:h>
      <text:p text:style-name="Text_20_body">The Search System is built using a modern full-stack technology stack where each technology has a clearly defined responsibility within the execution pipeline.</text:p>
      <text:p text:style-name="Text_20_body">Rather than overlapping responsibilities, each framework or library focuses on a specific layer of the application, resulting in a modular, scalable, and maintainable architecture.</text:p>
      <text:p text:style-name="Horizontal_20_Line"/>
      <text:h text:style-name="Heading_20_2" text:outline-level="2"><text:soft-page-break/>Frontend Technologie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Technology</text:p>
            </table:table-cell>
            <table:table-cell table:style-name="Table26.A1" office:value-type="string">
              <text:p text:style-name="Table_20_Heading">Primary Role</text:p>
            </table:table-cell>
            <table:table-cell table:style-name="Table26.A1" office:value-type="string">
              <text:p text:style-name="Table_20_Heading">Used In</text:p>
            </table:table-cell>
          </table:table-row>
        </table:table-header-rows>
        <table:table-row>
          <table:table-cell table:style-name="Table26.A1" office:value-type="string">
            <text:p text:style-name="Table_20_Contents">Next.js (App Router)</text:p>
          </table:table-cell>
          <table:table-cell table:style-name="Table26.A1" office:value-type="string">
            <text:p text:style-name="Table_20_Contents">Application framework, routing, rendering</text:p>
          </table:table-cell>
          <table:table-cell table:style-name="Table26.A1" office:value-type="string">
            <text:p text:style-name="Table_20_Contents">Stage 1, Stage 4, Stage 8, Stage 9</text:p>
          </table:table-cell>
        </table:table-row>
        <table:table-row>
          <table:table-cell table:style-name="Table26.A1" office:value-type="string">
            <text:p text:style-name="Table_20_Contents">React</text:p>
          </table:table-cell>
          <table:table-cell table:style-name="Table26.A1" office:value-type="string">
            <text:p text:style-name="Table_20_Contents">Component rendering and event handling</text:p>
          </table:table-cell>
          <table:table-cell table:style-name="Table26.A1" office:value-type="string">
            <text:p text:style-name="Table_20_Contents">Stage 1, Stage 8, Stage 9</text:p>
          </table:table-cell>
        </table:table-row>
        <table:table-row>
          <table:table-cell table:style-name="Table26.A1" office:value-type="string">
            <text:p text:style-name="Table_20_Contents">TypeScript</text:p>
          </table:table-cell>
          <table:table-cell table:style-name="Table26.A1" office:value-type="string">
            <text:p text:style-name="Table_20_Contents">Type safety across frontend</text:p>
          </table:table-cell>
          <table:table-cell table:style-name="Table26.A1" office:value-type="string">
            <text:p text:style-name="Table_20_Contents">All Stages</text:p>
          </table:table-cell>
        </table:table-row>
        <table:table-row>
          <table:table-cell table:style-name="Table26.A1" office:value-type="string">
            <text:p text:style-name="Table_20_Contents">Tailwind CSS</text:p>
          </table:table-cell>
          <table:table-cell table:style-name="Table26.A1" office:value-type="string">
            <text:p text:style-name="Table_20_Contents">User interface styling</text:p>
          </table:table-cell>
          <table:table-cell table:style-name="Table26.A1" office:value-type="string">
            <text:p text:style-name="Table_20_Contents">Stage 8</text:p>
          </table:table-cell>
        </table:table-row>
        <table:table-row>
          <table:table-cell table:style-name="Table26.A1" office:value-type="string">
            <text:p text:style-name="Table_20_Contents">Zustand</text:p>
          </table:table-cell>
          <table:table-cell table:style-name="Table26.A1" office:value-type="string">
            <text:p text:style-name="Table_20_Contents">Client-side state management</text:p>
          </table:table-cell>
          <table:table-cell table:style-name="Table26.A1" office:value-type="string">
            <text:p text:style-name="Table_20_Contents">Stage 3, Stage 8, Stage 9</text:p>
          </table:table-cell>
        </table:table-row>
        <table:table-row>
          <table:table-cell table:style-name="Table26.A1" office:value-type="string">
            <text:p text:style-name="Table_20_Contents">TanStack Query</text:p>
          </table:table-cell>
          <table:table-cell table:style-name="Table26.A1" office:value-type="string">
            <text:p text:style-name="Table_20_Contents">Server-state management and caching</text:p>
          </table:table-cell>
          <table:table-cell table:style-name="Table26.A1" office:value-type="string">
            <text:p text:style-name="Table_20_Contents">Stage 3, Stage 8, Stage 9</text:p>
          </table:table-cell>
        </table:table-row>
        <table:table-row>
          <table:table-cell table:style-name="Table26.A1" office:value-type="string">
            <text:p text:style-name="Table_20_Contents">Recharts</text:p>
          </table:table-cell>
          <table:table-cell table:style-name="Table26.A1" office:value-type="string">
            <text:p text:style-name="Table_20_Contents">Data visualization</text:p>
          </table:table-cell>
          <table:table-cell table:style-name="Table26.A1" office:value-type="string">
            <text:p text:style-name="Table_20_Contents">Stage 8</text:p>
          </table:table-cell>
        </table:table-row>
      </table:table>
      <text:p text:style-name="Horizontal_20_Line"/>
      <text:h text:style-name="Heading_20_2" text:outline-level="2">Backend Technologies</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Technology</text:p>
            </table:table-cell>
            <table:table-cell table:style-name="Table27.A1" office:value-type="string">
              <text:p text:style-name="Table_20_Heading">Primary Role</text:p>
            </table:table-cell>
            <table:table-cell table:style-name="Table27.A1" office:value-type="string">
              <text:p text:style-name="Table_20_Heading">Used In</text:p>
            </table:table-cell>
          </table:table-row>
        </table:table-header-rows>
        <table:table-row>
          <table:table-cell table:style-name="Table27.A1" office:value-type="string">
            <text:p text:style-name="Table_20_Contents">Node.js</text:p>
          </table:table-cell>
          <table:table-cell table:style-name="Table27.A1" office:value-type="string">
            <text:p text:style-name="Table_20_Contents">Runtime environment</text:p>
          </table:table-cell>
          <table:table-cell table:style-name="Table27.A1" office:value-type="string">
            <text:p text:style-name="Table_20_Contents">Stage 4 – Stage 7</text:p>
          </table:table-cell>
        </table:table-row>
        <table:table-row>
          <table:table-cell table:style-name="Table27.A1" office:value-type="string">
            <text:p text:style-name="Table_20_Contents">Express.js</text:p>
          </table:table-cell>
          <table:table-cell table:style-name="Table27.A1" office:value-type="string">
            <text:p text:style-name="Table_20_Contents">API routing and middleware</text:p>
          </table:table-cell>
          <table:table-cell table:style-name="Table27.A1" office:value-type="string">
            <text:p text:style-name="Table_20_Contents">Stage 2, Stage 4, Stage 7</text:p>
          </table:table-cell>
        </table:table-row>
        <table:table-row>
          <table:table-cell table:style-name="Table27.A1" office:value-type="string">
            <text:p text:style-name="Table_20_Contents">TypeScript</text:p>
          </table:table-cell>
          <table:table-cell table:style-name="Table27.A1" office:value-type="string">
            <text:p text:style-name="Table_20_Contents">Type-safe backend development</text:p>
          </table:table-cell>
          <table:table-cell table:style-name="Table27.A1" office:value-type="string">
            <text:p text:style-name="Table_20_Contents">Stage 2 – Stage 7</text:p>
          </table:table-cell>
        </table:table-row>
        <table:table-row>
          <table:table-cell table:style-name="Table27.A1" office:value-type="string">
            <text:p text:style-name="Table_20_Contents">JWT</text:p>
          </table:table-cell>
          <table:table-cell table:style-name="Table27.A1" office:value-type="string">
            <text:p text:style-name="Table_20_Contents">Authentication and authorization</text:p>
          </table:table-cell>
          <table:table-cell table:style-name="Table27.A1" office:value-type="string">
            <text:p text:style-name="Table_20_Contents">Stage 2</text:p>
          </table:table-cell>
        </table:table-row>
        <table:table-row>
          <table:table-cell table:style-name="Table27.A1" office:value-type="string">
            <text:p text:style-name="Table_20_Contents">Mongoose</text:p>
          </table:table-cell>
          <table:table-cell table:style-name="Table27.A1" office:value-type="string">
            <text:p text:style-name="Table_20_Contents">Object Data Modeling (ODM)</text:p>
          </table:table-cell>
          <table:table-cell table:style-name="Table27.A1" office:value-type="string">
            <text:p text:style-name="Table_20_Contents">Stage 6</text:p>
          </table:table-cell>
        </table:table-row>
      </table:table>
      <text:p text:style-name="Horizontal_20_Line"/>
      <text:h text:style-name="Heading_20_2" text:outline-level="2">Database Technologies</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Technology</text:p>
            </table:table-cell>
            <table:table-cell table:style-name="Table28.A1" office:value-type="string">
              <text:p text:style-name="Table_20_Heading">Primary Role</text:p>
            </table:table-cell>
            <table:table-cell table:style-name="Table28.A1" office:value-type="string">
              <text:p text:style-name="Table_20_Heading">Used In</text:p>
            </table:table-cell>
          </table:table-row>
        </table:table-header-rows>
        <table:table-row>
          <table:table-cell table:style-name="Table28.A1" office:value-type="string">
            <text:p text:style-name="Table_20_Contents">MongoDB</text:p>
          </table:table-cell>
          <table:table-cell table:style-name="Table28.A1" office:value-type="string">
            <text:p text:style-name="Table_20_Contents">Persistent data storage</text:p>
          </table:table-cell>
          <table:table-cell table:style-name="Table28.A1" office:value-type="string">
            <text:p text:style-name="Table_20_Contents">Stage 6</text:p>
          </table:table-cell>
        </table:table-row>
      </table:table>
      <text:p text:style-name="Horizontal_20_Line"/>
      <text:h text:style-name="Heading_20_2" text:outline-level="2">DevOps Technologies</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Technology</text:p>
            </table:table-cell>
            <table:table-cell table:style-name="Table29.A1" office:value-type="string">
              <text:p text:style-name="Table_20_Heading">Primary Role</text:p>
            </table:table-cell>
            <table:table-cell table:style-name="Table29.A1" office:value-type="string">
              <text:p text:style-name="Table_20_Heading">Used In</text:p>
            </table:table-cell>
          </table:table-row>
        </table:table-header-rows>
        <table:table-row>
          <table:table-cell table:style-name="Table29.A1" office:value-type="string">
            <text:p text:style-name="Table_20_Contents">Docker</text:p>
          </table:table-cell>
          <table:table-cell table:style-name="Table29.A1" office:value-type="string">
            <text:p text:style-name="Table_20_Contents">Containerized development and deployment</text:p>
          </table:table-cell>
          <table:table-cell table:style-name="Table29.A1" office:value-type="string">
            <text:p text:style-name="Table_20_Contents">Entire System</text:p>
          </table:table-cell>
        </table:table-row>
        <table:table-row>
          <table:table-cell table:style-name="Table29.A1" office:value-type="string">
            <text:p text:style-name="Table_20_Contents">GitHub Actions</text:p>
          </table:table-cell>
          <table:table-cell table:style-name="Table29.A1" office:value-type="string">
            <text:p text:style-name="Table_20_Contents">Continuous Integration &amp; Continuous Deployment</text:p>
          </table:table-cell>
          <table:table-cell table:style-name="Table29.A1" office:value-type="string">
            <text:p text:style-name="Table_20_Contents">Development Lifecycle</text:p>
          </table:table-cell>
        </table:table-row>
        <table:table-row>
          <table:table-cell table:style-name="Table29.A1" office:value-type="string">
            <text:p text:style-name="Table_20_Contents">AWS</text:p>
          </table:table-cell>
          <table:table-cell table:style-name="Table29.A1" office:value-type="string">
            <text:p text:style-name="Table_20_Contents">Production hosting and infrastructure</text:p>
          </table:table-cell>
          <table:table-cell table:style-name="Table29.A1" office:value-type="string">
            <text:p text:style-name="Table_20_Contents">Production Environment</text:p>
          </table:table-cell>
        </table:table-row>
      </table:table>
      <text:p text:style-name="Horizontal_20_Line"/>
      <text:h text:style-name="Heading_20_2" text:outline-level="2">Technology Interaction</text:h>
      <text:p text:style-name="Preformatted_20_Text"><text:span text:style-name="Source_20_Text">Frontend</text:span></text:p>
      <text:p text:style-name="Preformatted_20_Text"><text:span text:style-name="Source_20_Text">│</text:span></text:p>
      <text:p text:style-name="Preformatted_20_Text"><text:span text:style-name="Source_20_Text">├── Next.js</text:span></text:p>
      <text:p text:style-name="Preformatted_20_Text"><text:span text:style-name="Source_20_Text">├── React</text:span></text:p>
      <text:p text:style-name="Preformatted_20_Text"><text:span text:style-name="Source_20_Text">├── Tailwind CSS</text:span></text:p>
      <text:p text:style-name="Preformatted_20_Text"><text:span text:style-name="Source_20_Text">├── Zustand</text:span></text:p>
      <text:p text:style-name="Preformatted_20_Text"><text:span text:style-name="Source_20_Text">├── TanStack Query</text:span></text:p>
      <text:p text:style-name="Preformatted_20_Text"><text:span text:style-name="Source_20_Text">└── Rechart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EST API</text:span></text:p>
      <text:p text:style-name="Preformatted_20_Text"><text:span text:style-name="Source_20_Text"><text:s text:c="8"/>│</text:span></text:p>
      <text:p text:style-name="Preformatted_20_Text"><text:soft-page-break/><text:span text:style-name="Source_20_Text"><text:s text:c="8"/>▼</text:span></text:p>
      <text:p text:style-name="Preformatted_20_Text"><text:span text:style-name="Source_20_Text">Backend</text:span></text:p>
      <text:p text:style-name="Preformatted_20_Text"><text:span text:style-name="Source_20_Text">│</text:span></text:p>
      <text:p text:style-name="Preformatted_20_Text"><text:span text:style-name="Source_20_Text">├── Node.js</text:span></text:p>
      <text:p text:style-name="Preformatted_20_Text"><text:span text:style-name="Source_20_Text">├── Express.js</text:span></text:p>
      <text:p text:style-name="Preformatted_20_Text"><text:span text:style-name="Source_20_Text">├── JWT</text:span></text:p>
      <text:p text:style-name="Preformatted_20_Text"><text:span text:style-name="Source_20_Text">├── TypeScript</text:span></text:p>
      <text:p text:style-name="Preformatted_20_Text"><text:span text:style-name="Source_20_Text">└── Mongoos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MongoDB</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Deployment</text:span></text:p>
      <text:p text:style-name="Preformatted_20_Text"><text:span text:style-name="Source_20_Text">│</text:span></text:p>
      <text:p text:style-name="Preformatted_20_Text"><text:span text:style-name="Source_20_Text">├── Docker</text:span></text:p>
      <text:p text:style-name="Preformatted_20_Text"><text:span text:style-name="Source_20_Text">├── GitHub Actions</text:span></text:p>
      <text:p text:style-name="P1"><text:span text:style-name="Source_20_Text">└── AWS</text:span></text:p>
      <text:p text:style-name="Text_20_body">This layered interaction ensures that each technology operates within its designated responsibility while collaborating seamlessly with the others.</text:p>
      <text:p text:style-name="Horizontal_20_Line"/>
      <text:h text:style-name="Heading_20_2" text:outline-level="2">Technology Responsibility Matrix</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Layer</text:p>
            </table:table-cell>
            <table:table-cell table:style-name="Table30.A1" office:value-type="string">
              <text:p text:style-name="Table_20_Heading">Primary Technology</text:p>
            </table:table-cell>
            <table:table-cell table:style-name="Table30.A1" office:value-type="string">
              <text:p text:style-name="Table_20_Heading">Responsibility</text:p>
            </table:table-cell>
          </table:table-row>
        </table:table-header-rows>
        <table:table-row>
          <table:table-cell table:style-name="Table30.A1" office:value-type="string">
            <text:p text:style-name="Table_20_Contents">Presentation</text:p>
          </table:table-cell>
          <table:table-cell table:style-name="Table30.A1" office:value-type="string">
            <text:p text:style-name="Table_20_Contents">React</text:p>
          </table:table-cell>
          <table:table-cell table:style-name="Table30.A1" office:value-type="string">
            <text:p text:style-name="Table_20_Contents">Render UI components</text:p>
          </table:table-cell>
        </table:table-row>
        <table:table-row>
          <table:table-cell table:style-name="Table30.A1" office:value-type="string">
            <text:p text:style-name="Table_20_Contents">Application Framework</text:p>
          </table:table-cell>
          <table:table-cell table:style-name="Table30.A1" office:value-type="string">
            <text:p text:style-name="Table_20_Contents">Next.js</text:p>
          </table:table-cell>
          <table:table-cell table:style-name="Table30.A1" office:value-type="string">
            <text:p text:style-name="Table_20_Contents">Routing and application lifecycle</text:p>
          </table:table-cell>
        </table:table-row>
        <table:table-row>
          <table:table-cell table:style-name="Table30.A1" office:value-type="string">
            <text:p text:style-name="Table_20_Contents">Styling</text:p>
          </table:table-cell>
          <table:table-cell table:style-name="Table30.A1" office:value-type="string">
            <text:p text:style-name="Table_20_Contents">Tailwind CSS</text:p>
          </table:table-cell>
          <table:table-cell table:style-name="Table30.A1" office:value-type="string">
            <text:p text:style-name="Table_20_Contents">Responsive UI design</text:p>
          </table:table-cell>
        </table:table-row>
        <table:table-row>
          <table:table-cell table:style-name="Table30.A1" office:value-type="string">
            <text:p text:style-name="Table_20_Contents">Client State</text:p>
          </table:table-cell>
          <table:table-cell table:style-name="Table30.A1" office:value-type="string">
            <text:p text:style-name="Table_20_Contents">Zustand</text:p>
          </table:table-cell>
          <table:table-cell table:style-name="Table30.A1" office:value-type="string">
            <text:p text:style-name="Table_20_Contents">UI and local application state</text:p>
          </table:table-cell>
        </table:table-row>
        <table:table-row>
          <table:table-cell table:style-name="Table30.A1" office:value-type="string">
            <text:p text:style-name="Table_20_Contents">Server State</text:p>
          </table:table-cell>
          <table:table-cell table:style-name="Table30.A1" office:value-type="string">
            <text:p text:style-name="Table_20_Contents">TanStack Query</text:p>
          </table:table-cell>
          <table:table-cell table:style-name="Table30.A1" office:value-type="string">
            <text:p text:style-name="Table_20_Contents">API data fetching and caching</text:p>
          </table:table-cell>
        </table:table-row>
        <table:table-row>
          <table:table-cell table:style-name="Table30.A1" office:value-type="string">
            <text:p text:style-name="Table_20_Contents">Visualization</text:p>
          </table:table-cell>
          <table:table-cell table:style-name="Table30.A1" office:value-type="string">
            <text:p text:style-name="Table_20_Contents">Recharts</text:p>
          </table:table-cell>
          <table:table-cell table:style-name="Table30.A1" office:value-type="string">
            <text:p text:style-name="Table_20_Contents">Charts and analytics</text:p>
          </table:table-cell>
        </table:table-row>
        <table:table-row>
          <table:table-cell table:style-name="Table30.A1" office:value-type="string">
            <text:p text:style-name="Table_20_Contents">API Layer</text:p>
          </table:table-cell>
          <table:table-cell table:style-name="Table30.A1" office:value-type="string">
            <text:p text:style-name="Table_20_Contents">Express.js</text:p>
          </table:table-cell>
          <table:table-cell table:style-name="Table30.A1" office:value-type="string">
            <text:p text:style-name="Table_20_Contents">Handle HTTP requests</text:p>
          </table:table-cell>
        </table:table-row>
        <table:table-row>
          <table:table-cell table:style-name="Table30.A1" office:value-type="string">
            <text:p text:style-name="Table_20_Contents">Business Logic</text:p>
          </table:table-cell>
          <table:table-cell table:style-name="Table30.A1" office:value-type="string">
            <text:p text:style-name="Table_20_Contents">Node.js + TypeScript</text:p>
          </table:table-cell>
          <table:table-cell table:style-name="Table30.A1" office:value-type="string">
            <text:p text:style-name="Table_20_Contents">Execute application logic</text:p>
          </table:table-cell>
        </table:table-row>
        <table:table-row>
          <table:table-cell table:style-name="Table30.A1" office:value-type="string">
            <text:p text:style-name="Table_20_Contents">Authentication</text:p>
          </table:table-cell>
          <table:table-cell table:style-name="Table30.A1" office:value-type="string">
            <text:p text:style-name="Table_20_Contents">JWT</text:p>
          </table:table-cell>
          <table:table-cell table:style-name="Table30.A1" office:value-type="string">
            <text:p text:style-name="Table_20_Contents">Secure user authentication</text:p>
          </table:table-cell>
        </table:table-row>
        <table:table-row>
          <table:table-cell table:style-name="Table30.A1" office:value-type="string">
            <text:p text:style-name="Table_20_Contents">Data Access</text:p>
          </table:table-cell>
          <table:table-cell table:style-name="Table30.A1" office:value-type="string">
            <text:p text:style-name="Table_20_Contents">Mongoose</text:p>
          </table:table-cell>
          <table:table-cell table:style-name="Table30.A1" office:value-type="string">
            <text:p text:style-name="Table_20_Contents">Database abstraction</text:p>
          </table:table-cell>
        </table:table-row>
        <table:table-row>
          <table:table-cell table:style-name="Table30.A1" office:value-type="string">
            <text:p text:style-name="Table_20_Contents">Database</text:p>
          </table:table-cell>
          <table:table-cell table:style-name="Table30.A1" office:value-type="string">
            <text:p text:style-name="Table_20_Contents">MongoDB</text:p>
          </table:table-cell>
          <table:table-cell table:style-name="Table30.A1" office:value-type="string">
            <text:p text:style-name="Table_20_Contents">Persistent storage</text:p>
          </table:table-cell>
        </table:table-row>
        <table:table-row>
          <table:table-cell table:style-name="Table30.A1" office:value-type="string">
            <text:p text:style-name="Table_20_Contents">Deployment</text:p>
          </table:table-cell>
          <table:table-cell table:style-name="Table30.A1" office:value-type="string">
            <text:p text:style-name="Table_20_Contents">Docker + AWS</text:p>
          </table:table-cell>
          <table:table-cell table:style-name="Table30.A1" office:value-type="string">
            <text:p text:style-name="Table_20_Contents">Hosting and infrastructure</text:p>
          </table:table-cell>
        </table:table-row>
        <table:table-row>
          <table:table-cell table:style-name="Table30.A1" office:value-type="string">
            <text:p text:style-name="Table_20_Contents">Automation</text:p>
          </table:table-cell>
          <table:table-cell table:style-name="Table30.A1" office:value-type="string">
            <text:p text:style-name="Table_20_Contents">GitHub Actions</text:p>
          </table:table-cell>
          <table:table-cell table:style-name="Table30.A1" office:value-type="string">
            <text:p text:style-name="Table_20_Contents">CI/CD pipeline</text:p>
          </table:table-cell>
        </table:table-row>
      </table:table>
      <text:p text:style-name="Horizontal_20_Line"/>
      <text:h text:style-name="Heading_20_2" text:outline-level="2">Design Principles Supported</text:h>
      <text:p text:style-name="Text_20_body">The selected technology stack supports the following architectural principles:</text:p>
      <text:list text:style-name="L69">
        <text:list-item>
          <text:p text:style-name="P63"><text:span text:style-name="Strong_20_Emphasis">Separation of Concerns</text:span> – Each technology focuses on a dedicated responsibility.</text:p>
        </text:list-item>
        <text:list-item>
          <text:p text:style-name="P63"><text:span text:style-name="Strong_20_Emphasis">Scalability</text:span> – Independent modules can grow without major architectural changes.</text:p>
        </text:list-item>
        <text:list-item>
          <text:p text:style-name="P63"><text:span text:style-name="Strong_20_Emphasis">Maintainability</text:span> – Layered architecture simplifies debugging and future development.</text:p>
        </text:list-item>
        <text:list-item>
          <text:p text:style-name="P63"><text:span text:style-name="Strong_20_Emphasis">Performance</text:span> – Client-side caching and optimized rendering reduce unnecessary work.</text:p>
        </text:list-item>
        <text:list-item>
          <text:p text:style-name="P63"><text:soft-page-break/><text:span text:style-name="Strong_20_Emphasis">Security</text:span> – JWT authentication and backend validation protect application resources.</text:p>
        </text:list-item>
        <text:list-item>
          <text:p text:style-name="P63"><text:span text:style-name="Strong_20_Emphasis">Extensibility</text:span> – New modules and services can be added with minimal impact on existing components.</text:p>
        </text:list-item>
      </text:list>
      <text:p text:style-name="Horizontal_20_Line"/>
      <text:h text:style-name="Heading_20_2" text:outline-level="2">Technology Lifecycle</text:h>
      <text:p text:style-name="Preformatted_20_Text"><text:span text:style-name="Source_20_Text">Application Startup</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Next.js + Reac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Authentication (JW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State Management</text:span></text:p>
      <text:p text:style-name="Preformatted_20_Text"><text:span text:style-name="Source_20_Text">(Zustand + TanStack Query)</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API Processing</text:span></text:p>
      <text:p text:style-name="Preformatted_20_Text"><text:span text:style-name="Source_20_Text">(Node.js + Expres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Database Access</text:span></text:p>
      <text:p text:style-name="Preformatted_20_Text"><text:span text:style-name="Source_20_Text">(Mongoose + MongoDB)</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Response Processing</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UI Rendering</text:span></text:p>
      <text:p text:style-name="Preformatted_20_Text"><text:span text:style-name="Source_20_Text">(React + Recharts)</text:span></text:p>
      <text:p text:style-name="Preformatted_20_Text"><text:span text:style-name="Source_20_Text"><text:s text:c="8"/>│</text:span></text:p>
      <text:p text:style-name="Preformatted_20_Text"><text:span text:style-name="Source_20_Text"><text:s text:c="8"/>▼</text:span></text:p>
      <text:p text:style-name="P1"><text:span text:style-name="Source_20_Text">Continuous Interaction</text:span></text:p>
      <text:p text:style-name="Text_20_body">The lifecycle demonstrates how the technologies collaborate during a complete request cycle.</text:p>
      <text:p text:style-name="Horizontal_20_Line"/>
      <text:h text:style-name="Heading_20_1" text:outline-level="1">13. Future Evolution</text:h>
      <text:h text:style-name="Heading_20_2" text:outline-level="2">Overview</text:h>
      <text:p text:style-name="Text_20_body">The Search System has been designed with scalability and extensibility as core architectural goals. The execution pipeline is modular, allowing new features and technologies to be introduced without requiring significant redesign.</text:p>
      <text:p text:style-name="Text_20_body">Future enhancements will build upon the existing nine-stage pipeline while preserving the separation of responsibilities between application layers.</text:p>
      <text:p text:style-name="Horizontal_20_Line"/>
      <text:h text:style-name="Heading_20_2" text:outline-level="2"><text:soft-page-break/>Planned Feature Expansion</text:h>
      <text:p text:style-name="Text_20_body">Future business modules may include:</text:p>
      <text:p text:style-name="Preformatted_20_Text"><text:span text:style-name="Source_20_Text">Business Processing Engine</text:span></text:p>
      <text:p text:style-name="Preformatted_20_Text"><text:span text:style-name="Source_20_Text">│</text:span></text:p>
      <text:p text:style-name="Preformatted_20_Text"><text:span text:style-name="Source_20_Text">├── Authentication</text:span></text:p>
      <text:p text:style-name="Preformatted_20_Text"><text:span text:style-name="Source_20_Text">├── Search</text:span></text:p>
      <text:p text:style-name="Preformatted_20_Text"><text:span text:style-name="Source_20_Text">├── Dashboard</text:span></text:p>
      <text:p text:style-name="Preformatted_20_Text"><text:span text:style-name="Source_20_Text">├── Analytics</text:span></text:p>
      <text:p text:style-name="Preformatted_20_Text"><text:span text:style-name="Source_20_Text">├── Projects</text:span></text:p>
      <text:p text:style-name="Preformatted_20_Text"><text:span text:style-name="Source_20_Text">├── User Profile</text:span></text:p>
      <text:p text:style-name="Preformatted_20_Text"><text:span text:style-name="Source_20_Text">├── Settings</text:span></text:p>
      <text:p text:style-name="Preformatted_20_Text"><text:span text:style-name="Source_20_Text">├── Notifications</text:span></text:p>
      <text:p text:style-name="Preformatted_20_Text"><text:span text:style-name="Source_20_Text">├── Activity Logs</text:span></text:p>
      <text:p text:style-name="Preformatted_20_Text"><text:span text:style-name="Source_20_Text">├── Team Collaboration</text:span></text:p>
      <text:p text:style-name="Preformatted_20_Text"><text:span text:style-name="Source_20_Text">├── File Management</text:span></text:p>
      <text:p text:style-name="Preformatted_20_Text"><text:span text:style-name="Source_20_Text">├── AI Assistant</text:span></text:p>
      <text:p text:style-name="P1"><text:span text:style-name="Source_20_Text">└── Reporting</text:span></text:p>
      <text:p text:style-name="Text_20_body">Each new module can integrate into the existing Business Processing Engine without affecting the surrounding stages.</text:p>
      <text:p text:style-name="Horizontal_20_Line"/>
      <text:h text:style-name="Heading_20_2" text:outline-level="2">Infrastructure Enhancements</text:h>
      <text:p text:style-name="Text_20_body">Potential infrastructure improvements include:</text:p>
      <text:list text:style-name="L70">
        <text:list-item>
          <text:p text:style-name="P64">Redis for distributed caching.</text:p>
        </text:list-item>
        <text:list-item>
          <text:p text:style-name="P64">WebSockets for real-time notifications.</text:p>
        </text:list-item>
        <text:list-item>
          <text:p text:style-name="P64">Elasticsearch for advanced search capabilities.</text:p>
        </text:list-item>
        <text:list-item>
          <text:p text:style-name="P64">Message queues for asynchronous processing.</text:p>
        </text:list-item>
        <text:list-item>
          <text:p text:style-name="P64">CDN integration for static asset delivery.</text:p>
        </text:list-item>
        <text:list-item>
          <text:p text:style-name="P64">Horizontal scaling with load balancers.</text:p>
        </text:list-item>
        <text:list-item>
          <text:p text:style-name="P64">Database replication and backup strategies.</text:p>
        </text:list-item>
      </text:list>
      <text:p text:style-name="Text_20_body">These enhancements improve scalability and performance while maintaining the current architecture.</text:p>
      <text:p text:style-name="Horizontal_20_Line"/>
      <text:h text:style-name="Heading_20_2" text:outline-level="2">Development Roadmap</text:h>
      <text:p text:style-name="Text_20_body">Future development priorities include:</text:p>
      <table:table table:name="Table31" table:style-name="Table31">
        <table:table-column table:style-name="Table31.A"/>
        <table:table-column table:style-name="Table31.B"/>
        <table:table-header-rows>
          <table:table-row>
            <table:table-cell table:style-name="Table31.A1" office:value-type="string">
              <text:p text:style-name="Table_20_Heading">Phase</text:p>
            </table:table-cell>
            <table:table-cell table:style-name="Table31.A1" office:value-type="string">
              <text:p text:style-name="Table_20_Heading">Focus Area</text:p>
            </table:table-cell>
          </table:table-row>
        </table:table-header-rows>
        <table:table-row>
          <table:table-cell table:style-name="Table31.A1" office:value-type="string">
            <text:p text:style-name="Table_20_Contents">Phase 1</text:p>
          </table:table-cell>
          <table:table-cell table:style-name="Table31.A1" office:value-type="string">
            <text:p text:style-name="Table_20_Contents">Core Search Platform</text:p>
          </table:table-cell>
        </table:table-row>
        <table:table-row>
          <table:table-cell table:style-name="Table31.A1" office:value-type="string">
            <text:p text:style-name="Table_20_Contents">Phase 2</text:p>
          </table:table-cell>
          <table:table-cell table:style-name="Table31.A1" office:value-type="string">
            <text:p text:style-name="Table_20_Contents">Analytics &amp; Dashboards</text:p>
          </table:table-cell>
        </table:table-row>
        <table:table-row>
          <table:table-cell table:style-name="Table31.A1" office:value-type="string">
            <text:p text:style-name="Table_20_Contents">Phase 3</text:p>
          </table:table-cell>
          <table:table-cell table:style-name="Table31.A1" office:value-type="string">
            <text:p text:style-name="Table_20_Contents">Collaboration Features</text:p>
          </table:table-cell>
        </table:table-row>
        <table:table-row>
          <table:table-cell table:style-name="Table31.A1" office:value-type="string">
            <text:p text:style-name="Table_20_Contents">Phase 4</text:p>
          </table:table-cell>
          <table:table-cell table:style-name="Table31.A1" office:value-type="string">
            <text:p text:style-name="Table_20_Contents">Real-Time Communication</text:p>
          </table:table-cell>
        </table:table-row>
        <text:soft-page-break/>
        <table:table-row>
          <table:table-cell table:style-name="Table31.A1" office:value-type="string">
            <text:p text:style-name="Table_20_Contents">Phase 5</text:p>
          </table:table-cell>
          <table:table-cell table:style-name="Table31.A1" office:value-type="string">
            <text:p text:style-name="Table_20_Contents">AI-Powered Search &amp; Insights</text:p>
          </table:table-cell>
        </table:table-row>
        <table:table-row>
          <table:table-cell table:style-name="Table31.A1" office:value-type="string">
            <text:p text:style-name="Table_20_Contents">Phase 6</text:p>
          </table:table-cell>
          <table:table-cell table:style-name="Table31.A1" office:value-type="string">
            <text:p text:style-name="Table_20_Contents">Enterprise Scaling &amp; Optimization</text:p>
          </table:table-cell>
        </table:table-row>
      </table:table>
      <text:p text:style-name="Text_20_body">Each phase builds upon the existing architecture without requiring structural redesign.</text:p>
      <text:p text:style-name="Horizontal_20_Line"/>
      <text:h text:style-name="Heading_20_2" text:outline-level="2">Long-Term Architectural Vision</text:h>
      <text:p text:style-name="Preformatted_20_Text"><text:span text:style-name="Source_20_Text">Users</text:span></text:p>
      <text:p text:style-name="Preformatted_20_Text"><text:span text:style-name="Source_20_Text"><text:s text:c="3"/>│</text:span></text:p>
      <text:p text:style-name="Preformatted_20_Text"><text:span text:style-name="Source_20_Text"><text:s text:c="3"/>▼</text:span></text:p>
      <text:p text:style-name="Preformatted_20_Text"><text:span text:style-name="Source_20_Text">Frontend Applications</text:span></text:p>
      <text:p text:style-name="Preformatted_20_Text"><text:span text:style-name="Source_20_Text"><text:s text:c="3"/>│</text:span></text:p>
      <text:p text:style-name="Preformatted_20_Text"><text:span text:style-name="Source_20_Text"><text:s text:c="3"/>▼</text:span></text:p>
      <text:p text:style-name="Preformatted_20_Text"><text:span text:style-name="Source_20_Text">API Gateway (Future)</text:span></text:p>
      <text:p text:style-name="Preformatted_20_Text"><text:span text:style-name="Source_20_Text"><text:s text:c="3"/>│</text:span></text:p>
      <text:p text:style-name="Preformatted_20_Text"><text:span text:style-name="Source_20_Text"><text:s text:c="3"/>▼</text:span></text:p>
      <text:p text:style-name="Preformatted_20_Text"><text:span text:style-name="Source_20_Text">Business Services</text:span></text:p>
      <text:p text:style-name="Preformatted_20_Text"><text:span text:style-name="Source_20_Text"><text:s text:c="3"/>│</text:span></text:p>
      <text:p text:style-name="Preformatted_20_Text"><text:span text:style-name="Source_20_Text"><text:s text:c="3"/>├── Search</text:span></text:p>
      <text:p text:style-name="Preformatted_20_Text"><text:span text:style-name="Source_20_Text"><text:s text:c="3"/>├── Analytics</text:span></text:p>
      <text:p text:style-name="Preformatted_20_Text"><text:span text:style-name="Source_20_Text"><text:s text:c="3"/>├── Projects</text:span></text:p>
      <text:p text:style-name="Preformatted_20_Text"><text:span text:style-name="Source_20_Text"><text:s text:c="3"/>├── AI Services</text:span></text:p>
      <text:p text:style-name="Preformatted_20_Text"><text:span text:style-name="Source_20_Text"><text:s text:c="3"/>├── Notifications</text:span></text:p>
      <text:p text:style-name="Preformatted_20_Text"><text:span text:style-name="Source_20_Text"><text:s text:c="3"/>└── Reporting</text:span></text:p>
      <text:p text:style-name="Preformatted_20_Text"><text:span text:style-name="Source_20_Text"><text:s text:c="3"/>│</text:span></text:p>
      <text:p text:style-name="Preformatted_20_Text"><text:span text:style-name="Source_20_Text"><text:s text:c="3"/>▼</text:span></text:p>
      <text:p text:style-name="Preformatted_20_Text"><text:span text:style-name="Source_20_Text">Shared Data Layer</text:span></text:p>
      <text:p text:style-name="Preformatted_20_Text"><text:span text:style-name="Source_20_Text"><text:s text:c="3"/>│</text:span></text:p>
      <text:p text:style-name="Preformatted_20_Text"><text:span text:style-name="Source_20_Text"><text:s text:c="3"/>▼</text:span></text:p>
      <text:p text:style-name="P1"><text:span text:style-name="Source_20_Text">MongoDB + Future Data Services</text:span></text:p>
      <text:p text:style-name="Text_20_body">This evolution supports increasing application complexity while preserving maintainability.</text:p>
      <text:p text:style-name="Horizontal_20_Line"/>
      <text:h text:style-name="Heading_20_2" text:outline-level="2">Final Summary</text:h>
      <text:p text:style-name="Text_20_body">The <text:span text:style-name="Strong_20_Emphasis">Search System Workflow Deep Dive</text:span> defines the complete runtime execution model of the application. Starting from application initialization, progressing through authentication, state management, request orchestration, business processing, data access, response generation, UI rendering, and continuous interaction, each stage has a clearly defined responsibility.</text:p>
      <text:p text:style-name="Text_20_body">This workflow serves as:</text:p>
      <text:list text:style-name="L71">
        <text:list-item>
          <text:p text:style-name="P65">A reference for implementation.</text:p>
        </text:list-item>
        <text:list-item>
          <text:p text:style-name="P65">A guide for debugging and testing.</text:p>
        </text:list-item>
        <text:list-item>
          <text:p text:style-name="P65">A foundation for future feature development.</text:p>
        </text:list-item>
        <text:list-item>
          <text:p text:style-name="P65">A blueprint for onboarding new developers.</text:p>
        </text:list-item>
        <text:list-item>
          <text:p text:style-name="P65">A roadmap for architectural evolution.</text:p>
        </text:list-item>
      </text:list>
      <text:p text:style-name="Text_20_body"><text:soft-page-break/>By following this structured execution pipeline, the Search System remains modular, scalable, secure, and maintainable as it evolves from a core search platform into a comprehensive full-stack analytics application.</text:p>
      <text:p text:style-name="Horizontal_20_Line"/>
      <text:p text:style-name="Text_20_body"><text:span text:style-name="Strong_20_Emphasis">End of Document</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22:04:41.240061324</meta:creation-date>
    <dc:date>2026-07-09T22:40:35.234460071</dc:date>
    <meta:editing-duration>PT8M45S</meta:editing-duration>
    <meta:editing-cycles>1</meta:editing-cycles>
    <meta:document-statistic meta:table-count="31" meta:image-count="0" meta:object-count="0" meta:page-count="69" meta:paragraph-count="2510" meta:word-count="9447" meta:character-count="67521" meta:non-whitespace-character-count="57686"/>
    <meta:generator>LibreOffice/24.2.7.2$Linux_X86_64 LibreOffice_project/420$Build-2</meta:generator>
  </office:meta>
</office:document-meta>
</file>