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Yes. Instead of explaining the internal architecture, imagine you're standing beside a user who is opening your application for the first time. Explain exactly what they will do from the moment the website loads until they finish using it.</text:p>
      <text:p text:style-name="Text_20_body">For your <text:span text:style-name="Strong_20_Emphasis">MERN Project Management SaaS</text:span>, it can be written like this.</text:p>
      <text:p text:style-name="Horizontal_20_Line"/>
      <text:h text:style-name="Heading_20_1" text:outline-level="1">5. How to Use the System (User Guide)</text:h>
      <text:h text:style-name="Heading_20_2" text:outline-level="2">First Time Opening the Application</text:h>
      <text:list text:style-name="L1">
        <text:list-item>
          <text:p text:style-name="P1">Open the website in your browser.</text:p>
        </text:list-item>
        <text:list-item>
          <text:p text:style-name="P1">The Home page will appear.</text:p>
        </text:list-item>
        <text:list-item>
          <text:p text:style-name="P1">Click <text:span text:style-name="Strong_20_Emphasis">Get Started</text:span> or <text:span text:style-name="Strong_20_Emphasis">Sign Up</text:span>.</text:p>
        </text:list-item>
        <text:list-item>
          <text:p text:style-name="P1">Enter your name, email address, and password.</text:p>
        </text:list-item>
        <text:list-item>
          <text:p text:style-name="P1">Click <text:span text:style-name="Strong_20_Emphasis">Create Account</text:span>.</text:p>
        </text:list-item>
        <text:list-item>
          <text:p text:style-name="P1">Your account is created and your information is securely stored in the database.</text:p>
        </text:list-item>
      </text:list>
      <text:p text:style-name="Horizontal_20_Line"/>
      <text:h text:style-name="Heading_20_2" text:outline-level="2">Logging Into the System</text:h>
      <text:list text:style-name="L2">
        <text:list-item>
          <text:p text:style-name="P2">Open the Login page.</text:p>
        </text:list-item>
        <text:list-item>
          <text:p text:style-name="P2">Enter your registered email and password.</text:p>
        </text:list-item>
        <text:list-item>
          <text:p text:style-name="P2">Click <text:span text:style-name="Strong_20_Emphasis">Login</text:span>.</text:p>
        </text:list-item>
        <text:list-item>
          <text:p text:style-name="P2">The system verifies your credentials.</text:p>
        </text:list-item>
        <text:list-item>
          <text:p text:style-name="P2">If they are correct, you are redirected to your personal dashboard.</text:p>
        </text:list-item>
      </text:list>
      <text:p text:style-name="Horizontal_20_Line"/>
      <text:h text:style-name="Heading_20_2" text:outline-level="2">Viewing the Dashboard</text:h>
      <text:list text:style-name="L3">
        <text:list-item>
          <text:p text:style-name="P3">After logging in, the Dashboard is displayed.</text:p>
        </text:list-item>
        <text:list-item>
          <text:p text:style-name="P3">The dashboard provides an overview of your workspace.</text:p>
        </text:list-item>
        <text:list-item>
          <text:p text:style-name="P3">You can quickly view:</text:p>
          <text:list>
            <text:list-item>
              <text:p text:style-name="P3">Total Projects</text:p>
            </text:list-item>
            <text:list-item>
              <text:p text:style-name="P3">Active Tasks</text:p>
            </text:list-item>
            <text:list-item>
              <text:p text:style-name="P3">Completed Tasks</text:p>
            </text:list-item>
            <text:list-item>
              <text:p text:style-name="P3">Pending Tasks</text:p>
            </text:list-item>
            <text:list-item>
              <text:p text:style-name="P3">Recent Activity</text:p>
            </text:list-item>
          </text:list>
        </text:list-item>
        <text:list-item>
          <text:p text:style-name="P3"><text:soft-page-break/>From here, you can navigate to every module in the application.</text:p>
        </text:list-item>
      </text:list>
      <text:p text:style-name="Horizontal_20_Line"/>
      <text:h text:style-name="Heading_20_2" text:outline-level="2">Creating Your First Project</text:h>
      <text:list text:style-name="L4">
        <text:list-item>
          <text:p text:style-name="P4">Click <text:span text:style-name="Strong_20_Emphasis">Projects</text:span> from the navigation menu.</text:p>
        </text:list-item>
        <text:list-item>
          <text:p text:style-name="P4">Click <text:span text:style-name="Strong_20_Emphasis">Create Project</text:span>.</text:p>
        </text:list-item>
        <text:list-item>
          <text:p text:style-name="P4">Enter:</text:p>
          <text:list>
            <text:list-item>
              <text:p text:style-name="P4">Project Name</text:p>
            </text:list-item>
            <text:list-item>
              <text:p text:style-name="P4">Description</text:p>
            </text:list-item>
            <text:list-item>
              <text:p text:style-name="P4">Start Date</text:p>
            </text:list-item>
            <text:list-item>
              <text:p text:style-name="P4">Due Date</text:p>
            </text:list-item>
          </text:list>
        </text:list-item>
        <text:list-item>
          <text:p text:style-name="P4">Click <text:span text:style-name="Strong_20_Emphasis">Save</text:span>.</text:p>
        </text:list-item>
        <text:list-item>
          <text:p text:style-name="P4">The project is stored in the database and appears in your project list.</text:p>
        </text:list-item>
      </text:list>
      <text:p text:style-name="Horizontal_20_Line"/>
      <text:h text:style-name="Heading_20_2" text:outline-level="2">Managing Projects</text:h>
      <text:list text:style-name="L5">
        <text:list-item>
          <text:p text:style-name="P5">Open the Projects page.</text:p>
        </text:list-item>
        <text:list-item>
          <text:p text:style-name="P5">View all available projects.</text:p>
        </text:list-item>
        <text:list-item>
          <text:p text:style-name="P5">Select a project to see its details.</text:p>
        </text:list-item>
        <text:list-item>
          <text:p text:style-name="P5">You can:</text:p>
          <text:list>
            <text:list-item>
              <text:p text:style-name="P5">Edit project information</text:p>
            </text:list-item>
            <text:list-item>
              <text:p text:style-name="P5">Delete a project</text:p>
            </text:list-item>
            <text:list-item>
              <text:p text:style-name="P5">Search projects</text:p>
            </text:list-item>
            <text:list-item>
              <text:p text:style-name="P5">Filter projects</text:p>
            </text:list-item>
            <text:list-item>
              <text:p text:style-name="P5">Sort projects</text:p>
            </text:list-item>
          </text:list>
        </text:list-item>
        <text:list-item>
          <text:p text:style-name="P5">Every change is immediately updated in the database.</text:p>
        </text:list-item>
      </text:list>
      <text:p text:style-name="Horizontal_20_Line"/>
      <text:h text:style-name="Heading_20_2" text:outline-level="2">Creating Tasks</text:h>
      <text:list text:style-name="L6">
        <text:list-item>
          <text:p text:style-name="P6">Open a project.</text:p>
        </text:list-item>
        <text:list-item>
          <text:p text:style-name="P6">Click <text:span text:style-name="Strong_20_Emphasis">Add Task</text:span>.</text:p>
        </text:list-item>
        <text:list-item>
          <text:p text:style-name="P6">Enter:</text:p>
          <text:list>
            <text:list-item>
              <text:p text:style-name="P6">Task Title</text:p>
            </text:list-item>
            <text:list-item>
              <text:p text:style-name="P6"><text:soft-page-break/>Description</text:p>
            </text:list-item>
            <text:list-item>
              <text:p text:style-name="P6">Priority</text:p>
            </text:list-item>
            <text:list-item>
              <text:p text:style-name="P6">Due Date</text:p>
            </text:list-item>
            <text:list-item>
              <text:p text:style-name="P6">Status</text:p>
            </text:list-item>
          </text:list>
        </text:list-item>
        <text:list-item>
          <text:p text:style-name="P6">Click <text:span text:style-name="Strong_20_Emphasis">Create Task</text:span>.</text:p>
        </text:list-item>
        <text:list-item>
          <text:p text:style-name="P6">The task is added to the selected project.</text:p>
        </text:list-item>
      </text:list>
      <text:p text:style-name="Horizontal_20_Line"/>
      <text:h text:style-name="Heading_20_2" text:outline-level="2">Updating Task Progress</text:h>
      <text:list text:style-name="L7">
        <text:list-item>
          <text:p text:style-name="P7">Open the task list.</text:p>
        </text:list-item>
        <text:list-item>
          <text:p text:style-name="P7">Select a task.</text:p>
        </text:list-item>
        <text:list-item>
          <text:p text:style-name="P7">Update its status, such as:</text:p>
          <text:list>
            <text:list-item>
              <text:p text:style-name="P7">To Do</text:p>
            </text:list-item>
            <text:list-item>
              <text:p text:style-name="P7">In Progress</text:p>
            </text:list-item>
            <text:list-item>
              <text:p text:style-name="P7">Completed</text:p>
            </text:list-item>
          </text:list>
        </text:list-item>
        <text:list-item>
          <text:p text:style-name="P7">Save the changes.</text:p>
        </text:list-item>
        <text:list-item>
          <text:p text:style-name="P7">The dashboard statistics are automatically updated.</text:p>
        </text:list-item>
      </text:list>
      <text:p text:style-name="Horizontal_20_Line"/>
      <text:h text:style-name="Heading_20_2" text:outline-level="2">Searching for Projects or Tasks</text:h>
      <text:list text:style-name="L8">
        <text:list-item>
          <text:p text:style-name="P8">Open the Search bar.</text:p>
        </text:list-item>
        <text:list-item>
          <text:p text:style-name="P8">Enter a project name or task name.</text:p>
        </text:list-item>
        <text:list-item>
          <text:p text:style-name="P8">Matching results are displayed instantly.</text:p>
        </text:list-item>
        <text:list-item>
          <text:p text:style-name="P8">Click any result to open it.</text:p>
        </text:list-item>
      </text:list>
      <text:p text:style-name="Horizontal_20_Line"/>
      <text:h text:style-name="Heading_20_2" text:outline-level="2">Using Filters</text:h>
      <text:p text:style-name="Text_20_body">Users can organize their work by applying filters such as:</text:p>
      <text:list text:style-name="L9">
        <text:list-item>
          <text:p text:style-name="P9">Status</text:p>
        </text:list-item>
        <text:list-item>
          <text:p text:style-name="P9">Priority</text:p>
        </text:list-item>
        <text:list-item>
          <text:p text:style-name="P9">Due Date</text:p>
        </text:list-item>
        <text:list-item>
          <text:p text:style-name="P9">Project Category</text:p>
        </text:list-item>
      </text:list>
      <text:p text:style-name="Text_20_body">This helps users quickly locate specific projects or tasks.</text:p>
      <text:p text:style-name="Horizontal_20_Line"><text:soft-page-break/></text:p>
      <text:h text:style-name="Heading_20_2" text:outline-level="2">Viewing Analytics</text:h>
      <text:list text:style-name="L10">
        <text:list-item>
          <text:p text:style-name="P10">Open the Analytics page.</text:p>
        </text:list-item>
        <text:list-item>
          <text:p text:style-name="P10">The system displays visual charts showing:</text:p>
          <text:list>
            <text:list-item>
              <text:p text:style-name="P10">Completed Tasks</text:p>
            </text:list-item>
            <text:list-item>
              <text:p text:style-name="P10">Pending Tasks</text:p>
            </text:list-item>
            <text:list-item>
              <text:p text:style-name="P10">Project Progress</text:p>
            </text:list-item>
            <text:list-item>
              <text:p text:style-name="P10">Productivity Overview</text:p>
            </text:list-item>
          </text:list>
        </text:list-item>
        <text:list-item>
          <text:p text:style-name="P10">Charts update automatically whenever project data changes.</text:p>
        </text:list-item>
      </text:list>
      <text:p text:style-name="Horizontal_20_Line"/>
      <text:h text:style-name="Heading_20_2" text:outline-level="2">Notifications</text:h>
      <text:p text:style-name="Text_20_body">Whenever important actions occur, the system displays notifications, such as:</text:p>
      <text:list text:style-name="L11">
        <text:list-item>
          <text:p text:style-name="P11">Project Created Successfully</text:p>
        </text:list-item>
        <text:list-item>
          <text:p text:style-name="P11">Task Updated</text:p>
        </text:list-item>
        <text:list-item>
          <text:p text:style-name="P11">Project Deleted</text:p>
        </text:list-item>
        <text:list-item>
          <text:p text:style-name="P11">Login Successful</text:p>
        </text:list-item>
        <text:list-item>
          <text:p text:style-name="P11">Error Messages (if any)</text:p>
        </text:list-item>
      </text:list>
      <text:p text:style-name="Text_20_body">These notifications help users understand whether an operation was successful.</text:p>
      <text:p text:style-name="Horizontal_20_Line"/>
      <text:h text:style-name="Heading_20_2" text:outline-level="2">Editing User Profile</text:h>
      <text:list text:style-name="L12">
        <text:list-item>
          <text:p text:style-name="P12">Open the Profile page.</text:p>
        </text:list-item>
        <text:list-item>
          <text:p text:style-name="P12">Update personal information such as:</text:p>
          <text:list>
            <text:list-item>
              <text:p text:style-name="P12">Name</text:p>
            </text:list-item>
            <text:list-item>
              <text:p text:style-name="P12">Email</text:p>
            </text:list-item>
            <text:list-item>
              <text:p text:style-name="P12">Profile Picture (if supported)</text:p>
            </text:list-item>
          </text:list>
        </text:list-item>
        <text:list-item>
          <text:p text:style-name="P12">Click <text:span text:style-name="Strong_20_Emphasis">Save Changes</text:span>.</text:p>
        </text:list-item>
        <text:list-item>
          <text:p text:style-name="P12">The updated information is stored in the database.</text:p>
        </text:list-item>
      </text:list>
      <text:p text:style-name="Horizontal_20_Line"/>
      <text:h text:style-name="Heading_20_2" text:outline-level="2">Application Settings</text:h>
      <text:p text:style-name="Text_20_body">Users can customize application settings, including:</text:p>
      <text:list text:style-name="L13">
        <text:list-item>
          <text:p text:style-name="P13"><text:soft-page-break/>Theme (Light/Dark Mode)</text:p>
        </text:list-item>
        <text:list-item>
          <text:p text:style-name="P13">Notification Preferences</text:p>
        </text:list-item>
        <text:list-item>
          <text:p text:style-name="P13">Account Information</text:p>
        </text:list-item>
        <text:list-item>
          <text:p text:style-name="P13">Security Settings</text:p>
        </text:list-item>
      </text:list>
      <text:p text:style-name="Horizontal_20_Line"/>
      <text:h text:style-name="Heading_20_2" text:outline-level="2">Logging Out</text:h>
      <text:list text:style-name="L14">
        <text:list-item>
          <text:p text:style-name="P14">Click the profile icon.</text:p>
        </text:list-item>
        <text:list-item>
          <text:p text:style-name="P14">Select <text:span text:style-name="Strong_20_Emphasis">Logout</text:span>.</text:p>
        </text:list-item>
        <text:list-item>
          <text:p text:style-name="P14">Your session is securely ended.</text:p>
        </text:list-item>
        <text:list-item>
          <text:p text:style-name="P14">You are redirected to the Login page.</text:p>
        </text:list-item>
      </text:list>
      <text:p text:style-name="Horizontal_20_Line"/>
      <text:h text:style-name="Heading_20_1" text:outline-level="1">Overall System Workflow</text:h>
      <text:list text:style-name="L15">
        <text:list-item>
          <text:p text:style-name="P15">User opens the application.</text:p>
        </text:list-item>
        <text:list-item>
          <text:p text:style-name="P15">User creates an account or logs in.</text:p>
        </text:list-item>
        <text:list-item>
          <text:p text:style-name="P15">The system authenticates the user.</text:p>
        </text:list-item>
        <text:list-item>
          <text:p text:style-name="P15">The Dashboard loads with project statistics.</text:p>
        </text:list-item>
        <text:list-item>
          <text:p text:style-name="P15">The user creates one or more projects.</text:p>
        </text:list-item>
        <text:list-item>
          <text:p text:style-name="P15">Tasks are added to each project.</text:p>
        </text:list-item>
        <text:list-item>
          <text:p text:style-name="P15">Task progress is updated throughout the project lifecycle.</text:p>
        </text:list-item>
        <text:list-item>
          <text:p text:style-name="P15">The Dashboard and Analytics automatically reflect the latest changes.</text:p>
        </text:list-item>
        <text:list-item>
          <text:p text:style-name="P15">The user searches, filters, and manages projects as needed.</text:p>
        </text:list-item>
        <text:list-item>
          <text:p text:style-name="P15">All information is securely stored in the database.</text:p>
        </text:list-item>
        <text:list-item>
          <text:p text:style-name="P15">The user logs out, ending the session securely.</text:p>
        </text:list-item>
      </text:list>
      <text:p text:style-name="Horizontal_20_Line"/>
      <text:p text:style-name="Text_20_body">This style is ideal for documentation because it is written from the <text:span text:style-name="Strong_20_Emphasis">end user's perspective</text:span>. A beginner can follow it step by step without needing to understand the underlying code or architecture. It explains exactly what happens from the moment the application is opened until the user finishes using it, making it suitable for project reports, documentation, and viva presentatio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22:40:42.219803487</meta:creation-date>
    <dc:date>2026-07-09T22:40:52.076028855</dc:date>
    <meta:editing-duration>PT11S</meta:editing-duration>
    <meta:editing-cycles>1</meta:editing-cycles>
    <meta:document-statistic meta:table-count="0" meta:image-count="0" meta:object-count="0" meta:page-count="5" meta:paragraph-count="127" meta:word-count="734" meta:character-count="4190" meta:non-whitespace-character-count="3686"/>
    <meta:generator>LibreOffice/24.2.7.2$Linux_X86_64 LibreOffice_project/420$Build-2</meta:generator>
  </office:meta>
</office:document-meta>
</file>