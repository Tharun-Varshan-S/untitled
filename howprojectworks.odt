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. For a project like <text:span text:style-name="Strong_20_Emphasis">LogLens AI</text:span>, don't start with APIs or databases. Imagine you're explaining it to a new intern on their first day who has never heard of log management. First explain <text:span text:style-name="Strong_20_Emphasis">what the system is</text:span>, <text:span text:style-name="Strong_20_Emphasis">who uses it</text:span>, and then walk through the entire lifecycle of a log.</text:p>
      <text:p text:style-name="Horizontal_20_Line"/>
      <text:h text:style-name="Heading_20_1" text:outline-level="1">5. How LogLens AI Works (Complete Step-by-Step Flow)</text:h>
      <text:h text:style-name="Heading_20_2" text:outline-level="2">Step 1 – Applications Start Running</text:h>
      <text:p text:style-name="Text_20_body">Imagine a company has many applications running at the same time.</text:p>
      <text:p text:style-name="Text_20_body">For example:</text:p>
      <text:list text:style-name="L1">
        <text:list-item>
          <text:p text:style-name="P2">User Authentication Service</text:p>
        </text:list-item>
        <text:list-item>
          <text:p text:style-name="P2">Payment Service</text:p>
        </text:list-item>
        <text:list-item>
          <text:p text:style-name="P2">Order Service</text:p>
        </text:list-item>
        <text:list-item>
          <text:p text:style-name="P2">Notification Service</text:p>
        </text:list-item>
        <text:list-item>
          <text:p text:style-name="P2">Inventory Service</text:p>
        </text:list-item>
        <text:list-item>
          <text:p text:style-name="P2">Recommendation Service</text:p>
        </text:list-item>
      </text:list>
      <text:p text:style-name="Text_20_body">Each application performs thousands of operations every minute.</text:p>
      <text:p text:style-name="Text_20_body">Whenever something important happens, the application creates a <text:span text:style-name="Strong_20_Emphasis">log</text:span>.</text:p>
      <text:p text:style-name="Text_20_body">Examples:</text:p>
      <text:p text:style-name="Preformatted_20_Text"><text:span text:style-name="Source_20_Text">User logged in successfully.</text:span></text:p>
      <text:p text:style-name="Preformatted_20_Text"/>
      <text:p text:style-name="Preformatted_20_Text"><text:span text:style-name="Source_20_Text">Payment completed.</text:span></text:p>
      <text:p text:style-name="Preformatted_20_Text"/>
      <text:p text:style-name="Preformatted_20_Text"><text:span text:style-name="Source_20_Text">Database connection established.</text:span></text:p>
      <text:p text:style-name="Preformatted_20_Text"/>
      <text:p text:style-name="Preformatted_20_Text"><text:span text:style-name="Source_20_Text">Email sent successfully.</text:span></text:p>
      <text:p text:style-name="Preformatted_20_Text"/>
      <text:p text:style-name="Preformatted_20_Text"><text:span text:style-name="Source_20_Text">Order placed.</text:span></text:p>
      <text:p text:style-name="Preformatted_20_Text"/>
      <text:p text:style-name="Preformatted_20_Text"><text:span text:style-name="Source_20_Text">Database timeout.</text:span></text:p>
      <text:p text:style-name="Preformatted_20_Text"/>
      <text:p text:style-name="P1"><text:span text:style-name="Source_20_Text">Server memory usage increased.</text:span></text:p>
      <text:p text:style-name="Text_20_body">These logs are simply records of what happened inside the application.</text:p>
      <text:p text:style-name="Horizontal_20_Line"/>
      <text:h text:style-name="Heading_20_2" text:outline-level="2">Step 2 – Applications Send Logs to LogLens</text:h>
      <text:p text:style-name="Text_20_body">Instead of storing logs separately on every server, every application sends its logs to a central LogLens server.</text:p>
      <text:p text:style-name="Text_20_body"><text:soft-page-break/>Each log is sent through the Log Ingestion API.</text:p>
      <text:p text:style-name="Text_20_body">Example:</text:p>
      <text:p text:style-name="Preformatted_20_Text"><text:span text:style-name="Source_20_Text">Application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POST /logs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1"><text:span text:style-name="Source_20_Text">LogLens Server</text:span></text:p>
      <text:p text:style-name="Text_20_body">Every log contains information such as:</text:p>
      <text:list text:style-name="L2">
        <text:list-item>
          <text:p text:style-name="P3">Timestamp</text:p>
        </text:list-item>
        <text:list-item>
          <text:p text:style-name="P3">Severity Level</text:p>
        </text:list-item>
        <text:list-item>
          <text:p text:style-name="P3">Service Name</text:p>
        </text:list-item>
        <text:list-item>
          <text:p text:style-name="P3">Message</text:p>
        </text:list-item>
        <text:list-item>
          <text:p text:style-name="P3">Metadata</text:p>
        </text:list-item>
      </text:list>
      <text:p text:style-name="Text_20_body">Example:</text:p>
      <text:p text:style-name="Preformatted_20_Text"><text:span text:style-name="Source_20_Text">Time:</text:span></text:p>
      <text:p text:style-name="Preformatted_20_Text"><text:span text:style-name="Source_20_Text">10:45:31 AM</text:span></text:p>
      <text:p text:style-name="Preformatted_20_Text"/>
      <text:p text:style-name="Preformatted_20_Text"><text:span text:style-name="Source_20_Text">Level:</text:span></text:p>
      <text:p text:style-name="Preformatted_20_Text"><text:span text:style-name="Source_20_Text">ERROR</text:span></text:p>
      <text:p text:style-name="Preformatted_20_Text"/>
      <text:p text:style-name="Preformatted_20_Text"><text:span text:style-name="Source_20_Text">Service:</text:span></text:p>
      <text:p text:style-name="Preformatted_20_Text"><text:span text:style-name="Source_20_Text">Payment Service</text:span></text:p>
      <text:p text:style-name="Preformatted_20_Text"/>
      <text:p text:style-name="Preformatted_20_Text"><text:span text:style-name="Source_20_Text">Message:</text:span></text:p>
      <text:p text:style-name="Preformatted_20_Text"><text:span text:style-name="Source_20_Text">Database connection timeout</text:span></text:p>
      <text:p text:style-name="Preformatted_20_Text"/>
      <text:p text:style-name="Preformatted_20_Text"><text:span text:style-name="Source_20_Text">Metadata:</text:span></text:p>
      <text:p text:style-name="Preformatted_20_Text"><text:span text:style-name="Source_20_Text">Host</text:span></text:p>
      <text:p text:style-name="Preformatted_20_Text"><text:span text:style-name="Source_20_Text">Region</text:span></text:p>
      <text:p text:style-name="Preformatted_20_Text"><text:span text:style-name="Source_20_Text">Request ID</text:span></text:p>
      <text:p text:style-name="P1"><text:span text:style-name="Source_20_Text">User ID</text:span></text:p>
      <text:p text:style-name="Horizontal_20_Line"/>
      <text:h text:style-name="Heading_20_2" text:outline-level="2">Step 3 – LogLens Validates Every Log</text:h>
      <text:p text:style-name="Text_20_body">Before storing the log, LogLens checks whether the received data is valid.</text:p>
      <text:p text:style-name="Text_20_body">It verifies:</text:p>
      <text:list text:style-name="L3">
        <text:list-item>
          <text:p text:style-name="P4">Required fields are present.</text:p>
        </text:list-item>
        <text:list-item>
          <text:p text:style-name="P4">Timestamp format is correct.</text:p>
        </text:list-item>
        <text:list-item>
          <text:p text:style-name="P4">Severity level is valid.</text:p>
        </text:list-item>
        <text:list-item>
          <text:p text:style-name="P4">Message is not empty.</text:p>
        </text:list-item>
        <text:list-item>
          <text:p text:style-name="P4">Request is not malformed.</text:p>
        </text:list-item>
      </text:list>
      <text:p text:style-name="Text_20_body"><text:soft-page-break/>If validation fails, the log is rejected and an error response is returned.</text:p>
      <text:p text:style-name="Text_20_body">Only valid logs move to the next stage.</text:p>
      <text:p text:style-name="Horizontal_20_Line"/>
      <text:h text:style-name="Heading_20_2" text:outline-level="2">Step 4 – Store the Logs</text:h>
      <text:p text:style-name="Text_20_body">Validated logs are stored in the database.</text:p>
      <text:p text:style-name="Text_20_body">The database creates indexes on important fields such as:</text:p>
      <text:list text:style-name="L4">
        <text:list-item>
          <text:p text:style-name="P5">Timestamp</text:p>
        </text:list-item>
        <text:list-item>
          <text:p text:style-name="P5">Severity</text:p>
        </text:list-item>
        <text:list-item>
          <text:p text:style-name="P5">Service Name</text:p>
        </text:list-item>
      </text:list>
      <text:p text:style-name="Text_20_body">These indexes make searching extremely fast even when millions of logs exist.</text:p>
      <text:p text:style-name="Horizontal_20_Line"/>
      <text:h text:style-name="Heading_20_2" text:outline-level="2">Step 5 – Live Dashboard Updates</text:h>
      <text:p text:style-name="Text_20_body">As soon as a new log is stored, LogLens immediately updates the dashboard using WebSockets.</text:p>
      <text:p text:style-name="Text_20_body">There is no page refresh.</text:p>
      <text:p text:style-name="Text_20_body">The new log appears instantly.</text:p>
      <text:p text:style-name="Text_20_body">Example:</text:p>
      <text:p text:style-name="Preformatted_20_Text"><text:span text:style-name="Source_20_Text">ERROR</text:span></text:p>
      <text:p text:style-name="Preformatted_20_Text"><text:span text:style-name="Source_20_Text">Payment Service</text:span></text:p>
      <text:p text:style-name="Preformatted_20_Text"><text:span text:style-name="Source_20_Text">Database Timeout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Immediately appears on dashboard</text:span></text:p>
      <text:p text:style-name="Text_20_body">Engineers can watch logs arriving in real time.</text:p>
      <text:p text:style-name="Horizontal_20_Line"/>
      <text:h text:style-name="Heading_20_2" text:outline-level="2">Step 6 – Dashboard Displays the Logs</text:h>
      <text:p text:style-name="Text_20_body">Every received log is displayed as one row inside the log table.</text:p>
      <text:p text:style-name="Text_20_body">Each row contains:</text:p>
      <text:list text:style-name="L5">
        <text:list-item>
          <text:p text:style-name="P6">Time</text:p>
        </text:list-item>
        <text:list-item>
          <text:p text:style-name="P6">Severity</text:p>
        </text:list-item>
        <text:list-item>
          <text:p text:style-name="P6">Service</text:p>
        </text:list-item>
        <text:list-item>
          <text:p text:style-name="P6">Message</text:p>
        </text:list-item>
      </text:list>
      <text:p text:style-name="Text_20_body">Severity levels are color coded.</text:p>
      <text:p text:style-name="Preformatted_20_Text"><text:soft-page-break/><text:span text:style-name="Source_20_Text">DEBUG → Gray</text:span></text:p>
      <text:p text:style-name="Preformatted_20_Text"/>
      <text:p text:style-name="Preformatted_20_Text"><text:span text:style-name="Source_20_Text">INFO → Blue</text:span></text:p>
      <text:p text:style-name="Preformatted_20_Text"/>
      <text:p text:style-name="Preformatted_20_Text"><text:span text:style-name="Source_20_Text">WARN → Yellow</text:span></text:p>
      <text:p text:style-name="Preformatted_20_Text"/>
      <text:p text:style-name="Preformatted_20_Text"><text:span text:style-name="Source_20_Text">ERROR → Red</text:span></text:p>
      <text:p text:style-name="Preformatted_20_Text"/>
      <text:p text:style-name="P1"><text:span text:style-name="Source_20_Text">FATAL → Dark Red</text:span></text:p>
      <text:p text:style-name="Text_20_body">This helps engineers identify critical issues instantly.</text:p>
      <text:p text:style-name="Horizontal_20_Line"/>
      <text:h text:style-name="Heading_20_2" text:outline-level="2">Step 7 – Monitor Overall System Health</text:h>
      <text:p text:style-name="Text_20_body">At the top of the dashboard, LogLens continuously calculates statistics.</text:p>
      <text:p text:style-name="Text_20_body">Examples:</text:p>
      <text:p text:style-name="Preformatted_20_Text"><text:span text:style-name="Source_20_Text">Total Logs</text:span></text:p>
      <text:p text:style-name="Preformatted_20_Text"/>
      <text:p text:style-name="Preformatted_20_Text"><text:span text:style-name="Source_20_Text">Error Count</text:span></text:p>
      <text:p text:style-name="Preformatted_20_Text"/>
      <text:p text:style-name="Preformatted_20_Text"><text:span text:style-name="Source_20_Text">Warning Count</text:span></text:p>
      <text:p text:style-name="Preformatted_20_Text"/>
      <text:p text:style-name="Preformatted_20_Text"><text:span text:style-name="Source_20_Text">Active Services</text:span></text:p>
      <text:p text:style-name="Preformatted_20_Text"/>
      <text:p text:style-name="P1"><text:span text:style-name="Source_20_Text">Logs Per Minute</text:span></text:p>
      <text:p text:style-name="Text_20_body">These values update automatically whenever new logs arrive.</text:p>
      <text:p text:style-name="Horizontal_20_Line"/>
      <text:h text:style-name="Heading_20_2" text:outline-level="2">Step 8 – Visualize Log Activity</text:h>
      <text:p text:style-name="Text_20_body">Instead of reading thousands of logs manually, LogLens generates charts.</text:p>
      <text:p text:style-name="Text_20_body">The dashboard displays:</text:p>
      <text:list text:style-name="L6">
        <text:list-item>
          <text:p text:style-name="P7">Log volume over time</text:p>
        </text:list-item>
        <text:list-item>
          <text:p text:style-name="P7">Error trends</text:p>
        </text:list-item>
        <text:list-item>
          <text:p text:style-name="P7">Warning trends</text:p>
        </text:list-item>
        <text:list-item>
          <text:p text:style-name="P7">Service activity</text:p>
        </text:list-item>
      </text:list>
      <text:p text:style-name="Text_20_body">If an application suddenly starts generating many errors, the chart immediately shows an error spike.</text:p>
      <text:p text:style-name="Text_20_body">Engineers can detect incidents visually within seconds.</text:p>
      <text:p text:style-name="Horizontal_20_Line"/>
      <text:h text:style-name="Heading_20_2" text:outline-level="2">Step 9 – Search for Specific Logs</text:h>
      <text:p text:style-name="Text_20_body">When thousands of logs exist, engineers rarely scroll manually.</text:p>
      <text:p text:style-name="Text_20_body"><text:soft-page-break/>Instead, they search.</text:p>
      <text:p text:style-name="Text_20_body">Examples:</text:p>
      <text:p text:style-name="Preformatted_20_Text"><text:span text:style-name="Source_20_Text">Database</text:span></text:p>
      <text:p text:style-name="Preformatted_20_Text"/>
      <text:p text:style-name="Preformatted_20_Text"><text:span text:style-name="Source_20_Text">Timeout</text:span></text:p>
      <text:p text:style-name="Preformatted_20_Text"/>
      <text:p text:style-name="Preformatted_20_Text"><text:span text:style-name="Source_20_Text">Payment</text:span></text:p>
      <text:p text:style-name="Preformatted_20_Text"/>
      <text:p text:style-name="Preformatted_20_Text"><text:span text:style-name="Source_20_Text">Authentication</text:span></text:p>
      <text:p text:style-name="Preformatted_20_Text"/>
      <text:p text:style-name="P1"><text:span text:style-name="Source_20_Text">Server 01</text:span></text:p>
      <text:p text:style-name="Text_20_body">LogLens instantly returns matching logs.</text:p>
      <text:p text:style-name="Text_20_body">Search can be combined with filters for more accurate results.</text:p>
      <text:p text:style-name="Horizontal_20_Line"/>
      <text:h text:style-name="Heading_20_2" text:outline-level="2">Step 10 – Apply Filters</text:h>
      <text:p text:style-name="Text_20_body">Engineers can narrow down logs using multiple filters.</text:p>
      <text:p text:style-name="Text_20_body">Examples:</text:p>
      <text:p text:style-name="Text_20_body">Severity:</text:p>
      <text:p text:style-name="P1"><text:span text:style-name="Source_20_Text">Only ERROR</text:span></text:p>
      <text:p text:style-name="Text_20_body">Service:</text:p>
      <text:p text:style-name="P1"><text:span text:style-name="Source_20_Text">Payment Service</text:span></text:p>
      <text:p text:style-name="Text_20_body">Time:</text:p>
      <text:p text:style-name="P1"><text:span text:style-name="Source_20_Text">Last 30 Minutes</text:span></text:p>
      <text:p text:style-name="Text_20_body">Keyword:</text:p>
      <text:p text:style-name="P1"><text:span text:style-name="Source_20_Text">Database Timeout</text:span></text:p>
      <text:p text:style-name="Text_20_body">Multiple filters can be applied together to quickly isolate a problem.</text:p>
      <text:p text:style-name="Horizontal_20_Line"/>
      <text:h text:style-name="Heading_20_2" text:outline-level="2">Step 11 – View Complete Log Details</text:h>
      <text:p text:style-name="Text_20_body">Clicking any log opens a detailed panel.</text:p>
      <text:p text:style-name="Text_20_body">This panel displays:</text:p>
      <text:list text:style-name="L7">
        <text:list-item>
          <text:p text:style-name="P8">Complete message</text:p>
        </text:list-item>
        <text:list-item>
          <text:p text:style-name="P8">Timestamp</text:p>
        </text:list-item>
        <text:list-item>
          <text:p text:style-name="P8">Severity</text:p>
        </text:list-item>
        <text:list-item>
          <text:p text:style-name="P8">Service</text:p>
        </text:list-item>
        <text:list-item>
          <text:p text:style-name="P8"><text:soft-page-break/>Metadata</text:p>
        </text:list-item>
        <text:list-item>
          <text:p text:style-name="P8">Raw JSON</text:p>
        </text:list-item>
      </text:list>
      <text:p text:style-name="Text_20_body">Engineers can inspect every piece of information related to that event.</text:p>
      <text:p text:style-name="Horizontal_20_Line"/>
      <text:h text:style-name="Heading_20_2" text:outline-level="2">Step 12 – Upload Existing Log Files</text:h>
      <text:p text:style-name="Text_20_body">Sometimes logs already exist in files.</text:p>
      <text:p text:style-name="Text_20_body">Instead of sending them individually, users can upload:</text:p>
      <text:list text:style-name="L8">
        <text:list-item>
          <text:p text:style-name="P9">JSON files</text:p>
        </text:list-item>
        <text:list-item>
          <text:p text:style-name="P9">TXT files</text:p>
        </text:list-item>
        <text:list-item>
          <text:p text:style-name="P9">CSV files</text:p>
        </text:list-item>
      </text:list>
      <text:p text:style-name="Text_20_body">LogLens reads every entry, validates it, and stores all valid logs automatically.</text:p>
      <text:p text:style-name="Text_20_body">This is useful for historical log analysis.</text:p>
      <text:p text:style-name="Horizontal_20_Line"/>
      <text:h text:style-name="Heading_20_2" text:outline-level="2">Step 13 – Analyze System Behavior</text:h>
      <text:p text:style-name="Text_20_body">After collecting logs, engineers begin analyzing system behavior.</text:p>
      <text:p text:style-name="Text_20_body">Examples:</text:p>
      <text:list text:style-name="L9">
        <text:list-item>
          <text:p text:style-name="P10">Which service produces the most errors?</text:p>
        </text:list-item>
        <text:list-item>
          <text:p text:style-name="P10">Which service generates the highest traffic?</text:p>
        </text:list-item>
        <text:list-item>
          <text:p text:style-name="P10">When do failures occur?</text:p>
        </text:list-item>
        <text:list-item>
          <text:p text:style-name="P10">How many warnings happened today?</text:p>
        </text:list-item>
        <text:list-item>
          <text:p text:style-name="P10">Which application is most unstable?</text:p>
        </text:list-item>
      </text:list>
      <text:p text:style-name="Text_20_body">The dashboard answers these questions through analytics and charts.</text:p>
      <text:p text:style-name="Horizontal_20_Line"/>
      <text:h text:style-name="Heading_20_2" text:outline-level="2">Step 14 – Detect Production Issues</text:h>
      <text:p text:style-name="Text_20_body">If many ERROR or FATAL logs suddenly appear, engineers immediately know something is wrong.</text:p>
      <text:p text:style-name="Text_20_body">Instead of checking every server manually, they monitor one centralized dashboard.</text:p>
      <text:p text:style-name="Text_20_body">This greatly reduces debugging time.</text:p>
      <text:p text:style-name="Horizontal_20_Line"/>
      <text:h text:style-name="Heading_20_2" text:outline-level="2">Step 15 – Future AI Processing (Enhancement Phase)</text:h>
      <text:p text:style-name="Text_20_body">Once the basic platform is complete, AI modules can be integrated.</text:p>
      <text:p text:style-name="Text_20_body"><text:soft-page-break/>Possible enhancements include:</text:p>
      <text:list text:style-name="L10">
        <text:list-item>
          <text:p text:style-name="P11">Automatic anomaly detection</text:p>
        </text:list-item>
        <text:list-item>
          <text:p text:style-name="P11">Similar error clustering</text:p>
        </text:list-item>
        <text:list-item>
          <text:p text:style-name="P11">Root cause prediction</text:p>
        </text:list-item>
        <text:list-item>
          <text:p text:style-name="P11">Incident summarization</text:p>
        </text:list-item>
        <text:list-item>
          <text:p text:style-name="P11">Semantic log search</text:p>
        </text:list-item>
        <text:list-item>
          <text:p text:style-name="P11">AI-powered operations assistant</text:p>
        </text:list-item>
      </text:list>
      <text:p text:style-name="Text_20_body">These modules analyze stored logs and help engineers understand complex production issues much faster.</text:p>
      <text:p text:style-name="Horizontal_20_Line"/>
      <text:h text:style-name="Heading_20_1" text:outline-level="1">Overall Workflow</text:h>
      <text:p text:style-name="Preformatted_20_Text"><text:span text:style-name="Source_20_Text">Applications Generate Log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end Logs to LogLens API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Validate Incoming Data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tore Logs in Database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Update Dashboard in Real Time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Display Logs and Statistic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earch, Filter, and Explore Log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Analyze Trends and Detect Problem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(Optional Future)</text:span></text:p>
      <text:p text:style-name="P1"><text:span text:style-name="Source_20_Text">AI Analyzes Logs and Suggests Root Causes</text:span></text:p>
      <text:p text:style-name="Text_20_body">This flow is intentionally written so that even a beginner can understand <text:span text:style-name="Strong_20_Emphasis">what happens from the moment an application generates a log until an engineer investigates it</text:span>, without needing prior knowledge of backend development or observability tool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23:00:18.625494340</meta:creation-date>
    <dc:date>2026-07-09T23:00:32.883030892</dc:date>
    <meta:editing-duration>PT16S</meta:editing-duration>
    <meta:editing-cycles>1</meta:editing-cycles>
    <meta:document-statistic meta:table-count="0" meta:image-count="0" meta:object-count="0" meta:page-count="7" meta:paragraph-count="205" meta:word-count="940" meta:character-count="5983" meta:non-whitespace-character-count="5064"/>
    <meta:generator>LibreOffice/24.2.7.2$Linux_X86_64 LibreOffice_project/420$Build-2</meta:generator>
  </office:meta>
</office:document-meta>
</file>