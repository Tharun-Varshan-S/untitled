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2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We'll treat <text:span text:style-name="Strong_20_Emphasis">Volume 2</text:span> as a completely separate document from Volume 1.</text:p>
      <text:p text:style-name="Text_20_body">Since Volume 1 covered <text:span text:style-name="Strong_20_Emphasis">what the system is and why it is designed that way</text:span>, Volume 2 will explain <text:span text:style-name="Strong_20_Emphasis">how the system actually works internally at runtime</text:span>.</text:p>
      <text:p text:style-name="Text_20_body">To keep it at an industry level, we'll structure it like internal engineering documentation used by large software companies.</text:p>
      <text:h text:style-name="Heading_20_1" text:outline-level="1">Volume 2</text:h>
      <text:h text:style-name="Heading_20_1" text:outline-level="1">Internal Working</text:h>
      <text:h text:style-name="Heading_20_2" text:outline-level="2">Chapter 1 — Introduction</text:h>
      <text:h text:style-name="Heading_20_1" text:outline-level="1">Volume 2 — Internal Working</text:h>
      <text:h text:style-name="Heading_20_1" text:outline-level="1">Chapter 1 — Introduction</text:h>
      <text:h text:style-name="Heading_20_2" text:outline-level="2">1.1 Purpose of this Document</text:h>
      <text:p text:style-name="Text_20_body">This document provides a comprehensive explanation of the internal behavior of the Search System during execution. While Volume 1 focused on architectural design, component relationships, and high-level decisions, this volume explains how the application behaves at runtime, how requests move through the system, how data is processed, and how different modules interact to produce the final user experience.</text:p>
      <text:p text:style-name="Text_20_body">The objective is to bridge the gap between architecture and implementation by documenting the internal execution flow of every significant component. This document is intended for developers, reviewers, maintainers, and technical interview preparation.</text:p>
      <text:p text:style-name="Horizontal_20_Line"/>
      <text:h text:style-name="Heading_20_2" text:outline-level="2">1.2 Relationship with Volume 1</text:h>
      <text:p text:style-name="Text_20_body">Volume 1 explains the overall architecture and design principles of the project. It answers questions such as:</text:p>
      <text:list text:style-name="L1">
        <text:list-item>
          <text:p text:style-name="P2">Why was the application structured this way?</text:p>
        </text:list-item>
        <text:list-item>
          <text:p text:style-name="P2">Why were specific technologies selected?</text:p>
        </text:list-item>
        <text:list-item>
          <text:p text:style-name="P2">How do the major components interact?</text:p>
        </text:list-item>
        <text:list-item>
          <text:p text:style-name="P2">What are the architectural trade-offs?</text:p>
        </text:list-item>
      </text:list>
      <text:p text:style-name="Text_20_body">Volume 2 answers a different set of questions:</text:p>
      <text:list text:style-name="L2">
        <text:list-item>
          <text:p text:style-name="P3">What happens when the application starts?</text:p>
        </text:list-item>
        <text:list-item>
          <text:p text:style-name="P3"><text:soft-page-break/>How does a request travel through the system?</text:p>
        </text:list-item>
        <text:list-item>
          <text:p text:style-name="P3">How does authentication work internally?</text:p>
        </text:list-item>
        <text:list-item>
          <text:p text:style-name="P3">How is application state maintained?</text:p>
        </text:list-item>
        <text:list-item>
          <text:p text:style-name="P3">How is data fetched, cached, updated, and rendered?</text:p>
        </text:list-item>
        <text:list-item>
          <text:p text:style-name="P3">How are errors handled?</text:p>
        </text:list-item>
        <text:list-item>
          <text:p text:style-name="P3">How do frontend and backend coordinate during runtime?</text:p>
        </text:list-item>
      </text:list>
      <text:p text:style-name="Text_20_body">Together, both volumes provide a complete understanding of the system from architectural planning to runtime execution.</text:p>
      <text:p text:style-name="Horizontal_20_Line"/>
      <text:h text:style-name="Heading_20_1" text:outline-level="1">1.3 Scope</text:h>
      <text:p text:style-name="Text_20_body">This volume documents the runtime behavior of every major subsystem within the project.</text:p>
      <text:p text:style-name="Text_20_body">The following areas are covered:</text:p>
      <text:list text:style-name="L3">
        <text:list-item>
          <text:p text:style-name="P4">Application startup sequence</text:p>
        </text:list-item>
        <text:list-item>
          <text:p text:style-name="P4">Runtime architecture</text:p>
        </text:list-item>
        <text:list-item>
          <text:p text:style-name="P4">Frontend rendering lifecycle</text:p>
        </text:list-item>
        <text:list-item>
          <text:p text:style-name="P4">Backend request lifecycle</text:p>
        </text:list-item>
        <text:list-item>
          <text:p text:style-name="P4">Authentication workflow</text:p>
        </text:list-item>
        <text:list-item>
          <text:p text:style-name="P4">Authorization mechanisms</text:p>
        </text:list-item>
        <text:list-item>
          <text:p text:style-name="P4">API communication</text:p>
        </text:list-item>
        <text:list-item>
          <text:p text:style-name="P4">State management</text:p>
        </text:list-item>
        <text:list-item>
          <text:p text:style-name="P4">Data fetching</text:p>
        </text:list-item>
        <text:list-item>
          <text:p text:style-name="P4">Search execution pipeline</text:p>
        </text:list-item>
        <text:list-item>
          <text:p text:style-name="P4">Dashboard rendering</text:p>
        </text:list-item>
        <text:list-item>
          <text:p text:style-name="P4">Chart generation</text:p>
        </text:list-item>
        <text:list-item>
          <text:p text:style-name="P4">Database interactions</text:p>
        </text:list-item>
        <text:list-item>
          <text:p text:style-name="P4">Error handling</text:p>
        </text:list-item>
        <text:list-item>
          <text:p text:style-name="P4">Logging</text:p>
        </text:list-item>
        <text:list-item>
          <text:p text:style-name="P4">Observability</text:p>
        </text:list-item>
        <text:list-item>
          <text:p text:style-name="P4">Deployment runtime behavior</text:p>
        </text:list-item>
        <text:list-item>
          <text:p text:style-name="P4">Performance considerations</text:p>
        </text:list-item>
        <text:list-item>
          <text:p text:style-name="P4">Future runtime evolution</text:p>
        </text:list-item>
      </text:list>
      <text:p text:style-name="Text_20_body"><text:soft-page-break/>Implementation source code is intentionally discussed only at a conceptual level. Detailed file-by-file explanations are reserved for Volume 3.</text:p>
      <text:p text:style-name="Horizontal_20_Line"/>
      <text:h text:style-name="Heading_20_1" text:outline-level="1">1.4 Intended Audience</text:h>
      <text:p text:style-name="Text_20_body">This document is designed for multiple types of readers.</text:p>
      <text:h text:style-name="Heading_20_3" text:outline-level="3">Developers</text:h>
      <text:p text:style-name="Text_20_body">Developers can understand how features operate internally before modifying existing modules or implementing new functionality.</text:p>
      <text:h text:style-name="Heading_20_3" text:outline-level="3">New Team Members</text:h>
      <text:p text:style-name="Text_20_body">Engineers joining the project can quickly understand runtime behavior without reading the entire source code.</text:p>
      <text:h text:style-name="Heading_20_3" text:outline-level="3">Reviewers</text:h>
      <text:p text:style-name="Text_20_body">Technical reviewers can evaluate execution flow, component interaction, and system consistency.</text:p>
      <text:h text:style-name="Heading_20_3" text:outline-level="3">Students</text:h>
      <text:p text:style-name="Text_20_body">Learners can study how modern full-stack applications execute internally using a real-world MERN-based architecture.</text:p>
      <text:h text:style-name="Heading_20_3" text:outline-level="3">Interview Preparation</text:h>
      <text:p text:style-name="Text_20_body">The runtime explanations provided in this document help prepare for software engineering interviews covering React, Next.js, Node.js, Express, MongoDB, authentication, caching, and system design.</text:p>
      <text:p text:style-name="Horizontal_20_Line"/>
      <text:h text:style-name="Heading_20_1" text:outline-level="1">1.5 Runtime Perspective</text:h>
      <text:p text:style-name="Text_20_body">Throughout this document, the application is analyzed from the perspective of execution rather than implementation.</text:p>
      <text:p text:style-name="Text_20_body">Instead of asking:</text:p>
      <text:p text:style-name="Text_20_body">"Which file contains this code?"</text:p>
      <text:p text:style-name="Text_20_body">we ask:</text:p>
      <text:p text:style-name="Text_20_body">"What happens inside the system when this event occurs?"</text:p>
      <text:p text:style-name="Text_20_body">Examples include:</text:p>
      <text:list text:style-name="L4">
        <text:list-item>
          <text:p text:style-name="P5">User opens the application</text:p>
        </text:list-item>
        <text:list-item>
          <text:p text:style-name="P5">User logs in</text:p>
        </text:list-item>
        <text:list-item>
          <text:p text:style-name="P5"><text:soft-page-break/>Dashboard loads</text:p>
        </text:list-item>
        <text:list-item>
          <text:p text:style-name="P5">Search request is submitted</text:p>
        </text:list-item>
        <text:list-item>
          <text:p text:style-name="P5">Analytics update</text:p>
        </text:list-item>
        <text:list-item>
          <text:p text:style-name="P5">Data is cached</text:p>
        </text:list-item>
        <text:list-item>
          <text:p text:style-name="P5">API request fails</text:p>
        </text:list-item>
        <text:list-item>
          <text:p text:style-name="P5">Token expires</text:p>
        </text:list-item>
        <text:list-item>
          <text:p text:style-name="P5">User refreshes the browser</text:p>
        </text:list-item>
      </text:list>
      <text:p text:style-name="Text_20_body">Each chapter traces the complete sequence of events involved in these scenarios.</text:p>
      <text:p text:style-name="Horizontal_20_Line"/>
      <text:h text:style-name="Heading_20_1" text:outline-level="1">1.6 Documentation Approach</text:h>
      <text:p text:style-name="Text_20_body">Every chapter in this volume follows a consistent structure to ensure clarity and ease of navigation.</text:p>
      <text:p text:style-name="Text_20_body">Typical sections include:</text:p>
      <text:list text:style-name="L5">
        <text:list-item>
          <text:p text:style-name="P6">Overview</text:p>
        </text:list-item>
        <text:list-item>
          <text:p text:style-name="P6">Objectives</text:p>
        </text:list-item>
        <text:list-item>
          <text:p text:style-name="P6">Internal Components</text:p>
        </text:list-item>
        <text:list-item>
          <text:p text:style-name="P6">Execution Flow</text:p>
        </text:list-item>
        <text:list-item>
          <text:p text:style-name="P6">Runtime Sequence</text:p>
        </text:list-item>
        <text:list-item>
          <text:p text:style-name="P6">State Changes</text:p>
        </text:list-item>
        <text:list-item>
          <text:p text:style-name="P6">Data Flow</text:p>
        </text:list-item>
        <text:list-item>
          <text:p text:style-name="P6">Error Scenarios</text:p>
        </text:list-item>
        <text:list-item>
          <text:p text:style-name="P6">Performance Considerations</text:p>
        </text:list-item>
        <text:list-item>
          <text:p text:style-name="P6">Best Practices</text:p>
        </text:list-item>
        <text:list-item>
          <text:p text:style-name="P6">Common Pitfalls</text:p>
        </text:list-item>
        <text:list-item>
          <text:p text:style-name="P6">Future Improvements</text:p>
        </text:list-item>
      </text:list>
      <text:p text:style-name="Text_20_body">This standardized format allows readers to compare different subsystems using a common framework.</text:p>
      <text:p text:style-name="Horizontal_20_Line"/>
      <text:h text:style-name="Heading_20_1" text:outline-level="1">1.7 Key Concepts</text:h>
      <text:p text:style-name="Text_20_body">Several recurring concepts appear throughout this volume.</text:p>
      <text:h text:style-name="Heading_20_3" text:outline-level="3"><text:soft-page-break/>Runtime Lifecycle</text:h>
      <text:p text:style-name="Text_20_body">The sequence of events that occur while the application is executing.</text:p>
      <text:h text:style-name="Heading_20_3" text:outline-level="3">Request Lifecycle</text:h>
      <text:p text:style-name="Text_20_body">The journey of an incoming HTTP request from the client to the backend and back to the user.</text:p>
      <text:h text:style-name="Heading_20_3" text:outline-level="3">Rendering Lifecycle</text:h>
      <text:p text:style-name="Text_20_body">The process through which React and Next.js generate and update the user interface.</text:p>
      <text:h text:style-name="Heading_20_3" text:outline-level="3">State Lifecycle</text:h>
      <text:p text:style-name="Text_20_body">How application state is created, updated, synchronized, persisted, and destroyed.</text:p>
      <text:h text:style-name="Heading_20_3" text:outline-level="3">Data Flow</text:h>
      <text:p text:style-name="Text_20_body">The movement of information between the browser, frontend components, backend services, databases, caches, and external systems.</text:p>
      <text:h text:style-name="Heading_20_3" text:outline-level="3">Event Flow</text:h>
      <text:p text:style-name="Text_20_body">How user actions trigger application behavior through components, state managers, APIs, and persistence layers.</text:p>
      <text:p text:style-name="Horizontal_20_Line"/>
      <text:h text:style-name="Heading_20_1" text:outline-level="1">1.8 Assumptions</text:h>
      <text:p text:style-name="Text_20_body">This document assumes the project is implemented using the following technology stack:</text:p>
      <text:p text:style-name="Text_20_body">Frontend</text:p>
      <text:list text:style-name="L6">
        <text:list-item>
          <text:p text:style-name="P7">React</text:p>
        </text:list-item>
        <text:list-item>
          <text:p text:style-name="P7">Next.js (App Router)</text:p>
        </text:list-item>
        <text:list-item>
          <text:p text:style-name="P7">TypeScript</text:p>
        </text:list-item>
        <text:list-item>
          <text:p text:style-name="P7">Zustand</text:p>
        </text:list-item>
        <text:list-item>
          <text:p text:style-name="P7">TanStack Query</text:p>
        </text:list-item>
        <text:list-item>
          <text:p text:style-name="P7">Recharts</text:p>
        </text:list-item>
        <text:list-item>
          <text:p text:style-name="P7">Tailwind CSS</text:p>
        </text:list-item>
      </text:list>
      <text:p text:style-name="Text_20_body">Backend</text:p>
      <text:list text:style-name="L7">
        <text:list-item>
          <text:p text:style-name="P8">Node.js</text:p>
        </text:list-item>
        <text:list-item>
          <text:p text:style-name="P8">Express.js</text:p>
        </text:list-item>
        <text:list-item>
          <text:p text:style-name="P8">TypeScript</text:p>
        </text:list-item>
        <text:list-item>
          <text:p text:style-name="P8">JWT Authentication</text:p>
        </text:list-item>
        <text:list-item>
          <text:p text:style-name="P8"><text:soft-page-break/>MongoDB</text:p>
        </text:list-item>
        <text:list-item>
          <text:p text:style-name="P8">Mongoose</text:p>
        </text:list-item>
      </text:list>
      <text:p text:style-name="Text_20_body">Infrastructure</text:p>
      <text:list text:style-name="L8">
        <text:list-item>
          <text:p text:style-name="P9">Docker</text:p>
        </text:list-item>
        <text:list-item>
          <text:p text:style-name="P9">GitHub Actions</text:p>
        </text:list-item>
        <text:list-item>
          <text:p text:style-name="P9">AWS</text:p>
        </text:list-item>
        <text:list-item>
          <text:p text:style-name="P9">Nginx</text:p>
        </text:list-item>
      </text:list>
      <text:p text:style-name="Text_20_body">Where implementation details differ, the runtime concepts remain applicable.</text:p>
      <text:p text:style-name="Horizontal_20_Line"/>
      <text:h text:style-name="Heading_20_1" text:outline-level="1">1.9 Reading Strategy</text:h>
      <text:p text:style-name="Text_20_body">Readers are encouraged to follow the chapters sequentially because later chapters build upon concepts introduced earlier.</text:p>
      <text:p text:style-name="Text_20_body">The recommended progression is:</text:p>
      <text:list text:style-name="L9">
        <text:list-item>
          <text:p text:style-name="P10">Runtime Architecture</text:p>
        </text:list-item>
        <text:list-item>
          <text:p text:style-name="P10">Application Startup</text:p>
        </text:list-item>
        <text:list-item>
          <text:p text:style-name="P10">Frontend Execution</text:p>
        </text:list-item>
        <text:list-item>
          <text:p text:style-name="P10">Backend Request Processing</text:p>
        </text:list-item>
        <text:list-item>
          <text:p text:style-name="P10">Authentication</text:p>
        </text:list-item>
        <text:list-item>
          <text:p text:style-name="P10">State Management</text:p>
        </text:list-item>
        <text:list-item>
          <text:p text:style-name="P10">Data Fetching</text:p>
        </text:list-item>
        <text:list-item>
          <text:p text:style-name="P10">Search Pipeline</text:p>
        </text:list-item>
        <text:list-item>
          <text:p text:style-name="P10">Dashboard Rendering</text:p>
        </text:list-item>
        <text:list-item>
          <text:p text:style-name="P10">Database Operations</text:p>
        </text:list-item>
        <text:list-item>
          <text:p text:style-name="P10">Deployment Runtime</text:p>
        </text:list-item>
        <text:list-item>
          <text:p text:style-name="P10">Future Evolution</text:p>
        </text:list-item>
      </text:list>
      <text:p text:style-name="Text_20_body">Following this order provides a gradual understanding of the system, from initialization to advanced runtime behavior.</text:p>
      <text:p text:style-name="Horizontal_20_Line"/>
      <text:h text:style-name="Heading_20_1" text:outline-level="1"><text:soft-page-break/>1.10 Conclusion</text:h>
      <text:p text:style-name="Text_20_body">Volume 2 focuses on the dynamic behavior of the Search System. Rather than describing static architecture, it explains how the application executes, how information flows between components, and how the frontend, backend, and database collaborate during runtime.</text:p>
      <text:p text:style-name="Text_20_body">The following chapters progressively examine each subsystem in detail, beginning with the overall runtime architecture and continuing through the complete execution lifecycle of the application.</text:p>
      <text:p text:style-name="Text_20_body">Next is <text:span text:style-name="Strong_20_Emphasis">Chapter 2 – Runtime Architecture</text:span>, where we'll introduce the complete runtime execution model, including startup, browser initialization, request flow, frontend-backend interaction, database communication, caching, and the end-to-end lifecycle of a user request. This chapter serves as the foundation for all subsequent internal-working chapters.</text:p>
      <text:h text:style-name="Heading_20_3" text:outline-level="3">Volume 2 — Internal Working</text:h>
      <text:h text:style-name="Heading_20_2" text:outline-level="2">Chapter 2 — Runtime Architecture</text:h>
      <text:h text:style-name="Heading_20_1" text:outline-level="1">Chapter 2 — Runtime Architecture</text:h>
      <text:h text:style-name="Heading_20_2" text:outline-level="2">2.1 Purpose</text:h>
      <text:p text:style-name="Text_20_body">This chapter explains how the Search System behaves while it is running. Unlike the architectural diagrams in Volume 1, which describe the static structure of the application, this chapter focuses on the dynamic execution of the system. It follows the application's lifecycle from startup to shutdown, showing how components interact, how requests move through the system, and how data flows between the browser, frontend, backend, and database.</text:p>
      <text:p text:style-name="Text_20_body">Understanding the runtime architecture enables developers to reason about performance, debugging, feature implementation, scalability, and production behavior.</text:p>
      <text:p text:style-name="Horizontal_20_Line"/>
      <text:h text:style-name="Heading_20_1" text:outline-level="1">2.2 Runtime Overview</text:h>
      <text:p text:style-name="Text_20_body">The Search System follows a layered runtime architecture in which each layer has a clearly defined responsibility.</text:p>
      <text:p text:style-name="Text_20_body">The primary runtime layers are:</text:p>
      <text:list text:style-name="L10">
        <text:list-item>
          <text:p text:style-name="P11">Client Environment (Browser)</text:p>
        </text:list-item>
        <text:list-item>
          <text:p text:style-name="P11">Frontend Application (Next.js + React)</text:p>
        </text:list-item>
        <text:list-item>
          <text:p text:style-name="P11">State Management Layer</text:p>
        </text:list-item>
        <text:list-item>
          <text:p text:style-name="P11">Data Fetching Layer</text:p>
        </text:list-item>
        <text:list-item>
          <text:p text:style-name="P11">API Communication Layer</text:p>
        </text:list-item>
        <text:list-item>
          <text:p text:style-name="P11">Backend Server (Express.js)</text:p>
        </text:list-item>
        <text:list-item>
          <text:p text:style-name="P11"><text:soft-page-break/>Business Logic Layer</text:p>
        </text:list-item>
        <text:list-item>
          <text:p text:style-name="P11">Database Layer (MongoDB)</text:p>
        </text:list-item>
        <text:list-item>
          <text:p text:style-name="P11">Infrastructure Layer</text:p>
        </text:list-item>
      </text:list>
      <text:p text:style-name="Text_20_body">Each layer communicates only with adjacent layers, reducing coupling and improving maintainability.</text:p>
      <text:p text:style-name="Horizontal_20_Line"/>
      <text:h text:style-name="Heading_20_1" text:outline-level="1">2.3 High-Level Runtime Flow</text:h>
      <text:p text:style-name="Text_20_body">A typical user interaction follows this sequence:</text:p>
      <text:list text:style-name="L11">
        <text:list-item>
          <text:p text:style-name="P12">The user opens the application in a web browser.</text:p>
        </text:list-item>
        <text:list-item>
          <text:p text:style-name="P12">The browser requests the Next.js application.</text:p>
        </text:list-item>
        <text:list-item>
          <text:p text:style-name="P12">Next.js serves the application shell and JavaScript bundles.</text:p>
        </text:list-item>
        <text:list-item>
          <text:p text:style-name="P12">React initializes the component tree.</text:p>
        </text:list-item>
        <text:list-item>
          <text:p text:style-name="P12">Global state stores are created.</text:p>
        </text:list-item>
        <text:list-item>
          <text:p text:style-name="P12">TanStack Query initializes its cache.</text:p>
        </text:list-item>
        <text:list-item>
          <text:p text:style-name="P12">Authentication status is restored.</text:p>
        </text:list-item>
        <text:list-item>
          <text:p text:style-name="P12">Protected routes verify user access.</text:p>
        </text:list-item>
        <text:list-item>
          <text:p text:style-name="P12">Initial API requests are triggered.</text:p>
        </text:list-item>
        <text:list-item>
          <text:p text:style-name="P12">Express receives incoming requests.</text:p>
        </text:list-item>
        <text:list-item>
          <text:p text:style-name="P12">Middleware processes the request.</text:p>
        </text:list-item>
        <text:list-item>
          <text:p text:style-name="P12">Controllers delegate work to services.</text:p>
        </text:list-item>
        <text:list-item>
          <text:p text:style-name="P12">Services communicate with MongoDB.</text:p>
        </text:list-item>
        <text:list-item>
          <text:p text:style-name="P12">Results are returned to the frontend.</text:p>
        </text:list-item>
        <text:list-item>
          <text:p text:style-name="P12">React updates the UI.</text:p>
        </text:list-item>
        <text:list-item>
          <text:p text:style-name="P12">User interactions generate additional requests.</text:p>
        </text:list-item>
      </text:list>
      <text:p text:style-name="Text_20_body">This cycle continues throughout the application's lifetime.</text:p>
      <text:p text:style-name="Horizontal_20_Line"/>
      <text:h text:style-name="Heading_20_1" text:outline-level="1">2.4 Runtime Components</text:h>
      <text:h text:style-name="Heading_20_2" text:outline-level="2">Browser Runtime</text:h>
      <text:p text:style-name="Text_20_body">The browser provides the execution environment for the frontend application.</text:p>
      <text:p text:style-name="Text_20_body">Responsibilities include:</text:p>
      <text:list text:style-name="L12">
        <text:list-item>
          <text:p text:style-name="P13"><text:soft-page-break/>Rendering HTML</text:p>
        </text:list-item>
        <text:list-item>
          <text:p text:style-name="P13">Executing JavaScript</text:p>
        </text:list-item>
        <text:list-item>
          <text:p text:style-name="P13">Managing browser storage</text:p>
        </text:list-item>
        <text:list-item>
          <text:p text:style-name="P13">Handling cookies</text:p>
        </text:list-item>
        <text:list-item>
          <text:p text:style-name="P13">Processing user input</text:p>
        </text:list-item>
        <text:list-item>
          <text:p text:style-name="P13">Managing network requests</text:p>
        </text:list-item>
        <text:list-item>
          <text:p text:style-name="P13">Rendering CSS</text:p>
        </text:list-item>
        <text:list-item>
          <text:p text:style-name="P13">Maintaining browser history</text:p>
        </text:list-item>
      </text:list>
      <text:p text:style-name="Text_20_body">The browser is responsible only for presentation and communication. Business logic remains on the server.</text:p>
      <text:p text:style-name="Horizontal_20_Line"/>
      <text:h text:style-name="Heading_20_2" text:outline-level="2">Next.js Runtime</text:h>
      <text:p text:style-name="Text_20_body">Next.js initializes the frontend application.</text:p>
      <text:p text:style-name="Text_20_body">Responsibilities include:</text:p>
      <text:list text:style-name="L13">
        <text:list-item>
          <text:p text:style-name="P14">Route resolution</text:p>
        </text:list-item>
        <text:list-item>
          <text:p text:style-name="P14">Layout rendering</text:p>
        </text:list-item>
        <text:list-item>
          <text:p text:style-name="P14">Server Components execution (where applicable)</text:p>
        </text:list-item>
        <text:list-item>
          <text:p text:style-name="P14">Client Component hydration</text:p>
        </text:list-item>
        <text:list-item>
          <text:p text:style-name="P14">Static asset delivery</text:p>
        </text:list-item>
        <text:list-item>
          <text:p text:style-name="P14">Metadata generation</text:p>
        </text:list-item>
        <text:list-item>
          <text:p text:style-name="P14">Navigation handling</text:p>
        </text:list-item>
      </text:list>
      <text:p text:style-name="Text_20_body">Next.js acts as the bridge between the browser and the React application.</text:p>
      <text:p text:style-name="Horizontal_20_Line"/>
      <text:h text:style-name="Heading_20_2" text:outline-level="2">React Runtime</text:h>
      <text:p text:style-name="Text_20_body">React manages the user interface after hydration.</text:p>
      <text:p text:style-name="Text_20_body">Its responsibilities include:</text:p>
      <text:list text:style-name="L14">
        <text:list-item>
          <text:p text:style-name="P15">Component creation</text:p>
        </text:list-item>
        <text:list-item>
          <text:p text:style-name="P15">Rendering</text:p>
        </text:list-item>
        <text:list-item>
          <text:p text:style-name="P15">Re-render scheduling</text:p>
        </text:list-item>
        <text:list-item>
          <text:p text:style-name="P15">State updates</text:p>
        </text:list-item>
        <text:list-item>
          <text:p text:style-name="P15">Event handling</text:p>
        </text:list-item>
        <text:list-item>
          <text:p text:style-name="P15"><text:soft-page-break/>Virtual DOM reconciliation</text:p>
        </text:list-item>
        <text:list-item>
          <text:p text:style-name="P15">UI synchronization</text:p>
        </text:list-item>
      </text:list>
      <text:p text:style-name="Text_20_body">React ensures that only the necessary parts of the interface are updated when application state changes.</text:p>
      <text:p text:style-name="Horizontal_20_Line"/>
      <text:h text:style-name="Heading_20_2" text:outline-level="2">Zustand Runtime</text:h>
      <text:p text:style-name="Text_20_body">Zustand manages client-side application state.</text:p>
      <text:p text:style-name="Text_20_body">Typical responsibilities include:</text:p>
      <text:list text:style-name="L15">
        <text:list-item>
          <text:p text:style-name="P16">User information</text:p>
        </text:list-item>
        <text:list-item>
          <text:p text:style-name="P16">Theme preferences</text:p>
        </text:list-item>
        <text:list-item>
          <text:p text:style-name="P16">Sidebar state</text:p>
        </text:list-item>
        <text:list-item>
          <text:p text:style-name="P16">Selected project</text:p>
        </text:list-item>
        <text:list-item>
          <text:p text:style-name="P16">UI filters</text:p>
        </text:list-item>
        <text:list-item>
          <text:p text:style-name="P16">Notification visibility</text:p>
        </text:list-item>
      </text:list>
      <text:p text:style-name="Text_20_body">Zustand stores data that belongs exclusively to the client.</text:p>
      <text:p text:style-name="Horizontal_20_Line"/>
      <text:h text:style-name="Heading_20_2" text:outline-level="2">TanStack Query Runtime</text:h>
      <text:p text:style-name="Text_20_body">TanStack Query manages server-derived state.</text:p>
      <text:p text:style-name="Text_20_body">Responsibilities include:</text:p>
      <text:list text:style-name="L16">
        <text:list-item>
          <text:p text:style-name="P17">Fetching API data</text:p>
        </text:list-item>
        <text:list-item>
          <text:p text:style-name="P17">Response caching</text:p>
        </text:list-item>
        <text:list-item>
          <text:p text:style-name="P17">Background refetching</text:p>
        </text:list-item>
        <text:list-item>
          <text:p text:style-name="P17">Cache invalidation</text:p>
        </text:list-item>
        <text:list-item>
          <text:p text:style-name="P17">Loading states</text:p>
        </text:list-item>
        <text:list-item>
          <text:p text:style-name="P17">Error handling</text:p>
        </text:list-item>
        <text:list-item>
          <text:p text:style-name="P17">Retry logic</text:p>
        </text:list-item>
        <text:list-item>
          <text:p text:style-name="P17">Synchronization</text:p>
        </text:list-item>
      </text:list>
      <text:p text:style-name="Text_20_body">It reduces unnecessary network requests and keeps server data consistent.</text:p>
      <text:p text:style-name="Horizontal_20_Line"/>
      <text:h text:style-name="Heading_20_2" text:outline-level="2"><text:soft-page-break/>Express Runtime</text:h>
      <text:p text:style-name="Text_20_body">Express manages all backend HTTP requests.</text:p>
      <text:p text:style-name="Text_20_body">Responsibilities include:</text:p>
      <text:list text:style-name="L17">
        <text:list-item>
          <text:p text:style-name="P18">Request routing</text:p>
        </text:list-item>
        <text:list-item>
          <text:p text:style-name="P18">Middleware execution</text:p>
        </text:list-item>
        <text:list-item>
          <text:p text:style-name="P18">Authentication</text:p>
        </text:list-item>
        <text:list-item>
          <text:p text:style-name="P18">Validation</text:p>
        </text:list-item>
        <text:list-item>
          <text:p text:style-name="P18">Controller execution</text:p>
        </text:list-item>
        <text:list-item>
          <text:p text:style-name="P18">Response generation</text:p>
        </text:list-item>
        <text:list-item>
          <text:p text:style-name="P18">Error propagation</text:p>
        </text:list-item>
      </text:list>
      <text:p text:style-name="Text_20_body">Every client request passes through the Express runtime.</text:p>
      <text:p text:style-name="Horizontal_20_Line"/>
      <text:h text:style-name="Heading_20_2" text:outline-level="2">MongoDB Runtime</text:h>
      <text:p text:style-name="Text_20_body">MongoDB stores persistent application data.</text:p>
      <text:p text:style-name="Text_20_body">Responsibilities include:</text:p>
      <text:list text:style-name="L18">
        <text:list-item>
          <text:p text:style-name="P19">User records</text:p>
        </text:list-item>
        <text:list-item>
          <text:p text:style-name="P19">Projects</text:p>
        </text:list-item>
        <text:list-item>
          <text:p text:style-name="P19">Search history</text:p>
        </text:list-item>
        <text:list-item>
          <text:p text:style-name="P19">Analytics</text:p>
        </text:list-item>
        <text:list-item>
          <text:p text:style-name="P19">Dashboard data</text:p>
        </text:list-item>
        <text:list-item>
          <text:p text:style-name="P19">Configuration</text:p>
        </text:list-item>
        <text:list-item>
          <text:p text:style-name="P19">Audit information</text:p>
        </text:list-item>
      </text:list>
      <text:p text:style-name="Text_20_body">MongoDB serves as the system's permanent storage layer.</text:p>
      <text:p text:style-name="Horizontal_20_Line"/>
      <text:h text:style-name="Heading_20_1" text:outline-level="1">2.5 Runtime Lifecycle</text:h>
      <text:p text:style-name="Text_20_body">The runtime lifecycle can be divided into several phases.</text:p>
      <text:h text:style-name="Heading_20_2" text:outline-level="2">Phase 1 — Application Startup</text:h>
      <text:p text:style-name="Text_20_body">When the browser loads the application:</text:p>
      <text:list text:style-name="L19">
        <text:list-item>
          <text:p text:style-name="P20">HTML is downloaded.</text:p>
        </text:list-item>
        <text:list-item>
          <text:p text:style-name="P20">JavaScript bundles are fetched.</text:p>
        </text:list-item>
        <text:list-item>
          <text:p text:style-name="P20"><text:soft-page-break/>CSS files are loaded.</text:p>
        </text:list-item>
        <text:list-item>
          <text:p text:style-name="P20">React initializes.</text:p>
        </text:list-item>
        <text:list-item>
          <text:p text:style-name="P20">Zustand stores are created.</text:p>
        </text:list-item>
        <text:list-item>
          <text:p text:style-name="P20">Query Client initializes.</text:p>
        </text:list-item>
        <text:list-item>
          <text:p text:style-name="P20">Authentication state is restored.</text:p>
        </text:list-item>
      </text:list>
      <text:p text:style-name="Text_20_body">The application is now ready for interaction.</text:p>
      <text:p text:style-name="Horizontal_20_Line"/>
      <text:h text:style-name="Heading_20_2" text:outline-level="2">Phase 2 — User Interaction</text:h>
      <text:p text:style-name="Text_20_body">When a user performs an action:</text:p>
      <text:p text:style-name="Text_20_body">Examples include:</text:p>
      <text:list text:style-name="L20">
        <text:list-item>
          <text:p text:style-name="P21">Clicking a button</text:p>
        </text:list-item>
        <text:list-item>
          <text:p text:style-name="P21">Opening a page</text:p>
        </text:list-item>
        <text:list-item>
          <text:p text:style-name="P21">Searching</text:p>
        </text:list-item>
        <text:list-item>
          <text:p text:style-name="P21">Editing a project</text:p>
        </text:list-item>
        <text:list-item>
          <text:p text:style-name="P21">Logging in</text:p>
        </text:list-item>
        <text:list-item>
          <text:p text:style-name="P21">Updating settings</text:p>
        </text:list-item>
      </text:list>
      <text:p text:style-name="Text_20_body">React captures these events and updates local state or triggers API requests as needed.</text:p>
      <text:p text:style-name="Horizontal_20_Line"/>
      <text:h text:style-name="Heading_20_2" text:outline-level="2">Phase 3 — API Communication</text:h>
      <text:p text:style-name="Text_20_body">If server interaction is required:</text:p>
      <text:list text:style-name="L21">
        <text:list-item>
          <text:p text:style-name="P22">TanStack Query creates an HTTP request.</text:p>
        </text:list-item>
        <text:list-item>
          <text:p text:style-name="P22">Authentication headers are attached.</text:p>
        </text:list-item>
        <text:list-item>
          <text:p text:style-name="P22">The request is sent to Express.</text:p>
        </text:list-item>
        <text:list-item>
          <text:p text:style-name="P22">Middleware validates the request.</text:p>
        </text:list-item>
        <text:list-item>
          <text:p text:style-name="P22">Controllers process the request.</text:p>
        </text:list-item>
        <text:list-item>
          <text:p text:style-name="P22">Services execute business logic.</text:p>
        </text:list-item>
        <text:list-item>
          <text:p text:style-name="P22">MongoDB performs database operations.</text:p>
        </text:list-item>
        <text:list-item>
          <text:p text:style-name="P22">Results return to the frontend.</text:p>
        </text:list-item>
      </text:list>
      <text:p text:style-name="Horizontal_20_Line"/>
      <text:h text:style-name="Heading_20_2" text:outline-level="2"><text:soft-page-break/>Phase 4 — UI Update</text:h>
      <text:p text:style-name="Text_20_body">After receiving the response:</text:p>
      <text:list text:style-name="L22">
        <text:list-item>
          <text:p text:style-name="P23">TanStack Query updates its cache.</text:p>
        </text:list-item>
        <text:list-item>
          <text:p text:style-name="P23">React components subscribe to updated data.</text:p>
        </text:list-item>
        <text:list-item>
          <text:p text:style-name="P23">Only affected components re-render.</text:p>
        </text:list-item>
        <text:list-item>
          <text:p text:style-name="P23">The user sees updated information.</text:p>
        </text:list-item>
      </text:list>
      <text:p text:style-name="Horizontal_20_Line"/>
      <text:h text:style-name="Heading_20_2" text:outline-level="2">Phase 5 — Idle State</text:h>
      <text:p text:style-name="Text_20_body">When no interactions occur:</text:p>
      <text:p text:style-name="Text_20_body">The application waits while:</text:p>
      <text:list text:style-name="L23">
        <text:list-item>
          <text:p text:style-name="P24">Cache remains active.</text:p>
        </text:list-item>
        <text:list-item>
          <text:p text:style-name="P24">Authentication persists.</text:p>
        </text:list-item>
        <text:list-item>
          <text:p text:style-name="P24">Background refetches may occur.</text:p>
        </text:list-item>
        <text:list-item>
          <text:p text:style-name="P24">WebSocket connections (if implemented) remain open.</text:p>
        </text:list-item>
        <text:list-item>
          <text:p text:style-name="P24">Browser events continue to be monitored.</text:p>
        </text:list-item>
      </text:list>
      <text:p text:style-name="Horizontal_20_Line"/>
      <text:h text:style-name="Heading_20_1" text:outline-level="1">2.6 Request Lifecycle</text:h>
      <text:p text:style-name="Text_20_body">Every HTTP request follows the same processing pipeline.</text:p>
      <text:p text:style-name="Text_20_body">Client</text:p>
      <text:p text:style-name="Text_20_body">↓</text:p>
      <text:p text:style-name="Text_20_body">HTTP Request</text:p>
      <text:p text:style-name="Text_20_body">↓</text:p>
      <text:p text:style-name="Text_20_body">Express Router</text:p>
      <text:p text:style-name="Text_20_body">↓</text:p>
      <text:p text:style-name="Text_20_body">Middleware</text:p>
      <text:p text:style-name="Text_20_body">↓</text:p>
      <text:p text:style-name="Text_20_body">Authentication</text:p>
      <text:p text:style-name="Text_20_body">↓</text:p>
      <text:p text:style-name="Text_20_body">Validation</text:p>
      <text:p text:style-name="Text_20_body">↓</text:p>
      <text:p text:style-name="Text_20_body"><text:soft-page-break/>Controller</text:p>
      <text:p text:style-name="Text_20_body">↓</text:p>
      <text:p text:style-name="Text_20_body">Service</text:p>
      <text:p text:style-name="Text_20_body">↓</text:p>
      <text:p text:style-name="Text_20_body">Database</text:p>
      <text:p text:style-name="Text_20_body">↓</text:p>
      <text:p text:style-name="Text_20_body">Service</text:p>
      <text:p text:style-name="Text_20_body">↓</text:p>
      <text:p text:style-name="Text_20_body">Controller</text:p>
      <text:p text:style-name="Text_20_body">↓</text:p>
      <text:p text:style-name="Text_20_body">HTTP Response</text:p>
      <text:p text:style-name="Text_20_body">↓</text:p>
      <text:p text:style-name="Text_20_body">TanStack Query Cache</text:p>
      <text:p text:style-name="Text_20_body">↓</text:p>
      <text:p text:style-name="Text_20_body">React Components</text:p>
      <text:p text:style-name="Text_20_body">↓</text:p>
      <text:p text:style-name="Text_20_body">User Interface</text:p>
      <text:p text:style-name="Text_20_body">This consistent pipeline simplifies debugging and maintenance.</text:p>
      <text:p text:style-name="Horizontal_20_Line"/>
      <text:h text:style-name="Heading_20_1" text:outline-level="1">2.7 State Flow</text:h>
      <text:p text:style-name="Text_20_body">Application state exists in multiple locations.</text:p>
      <text:h text:style-name="Heading_20_2" text:outline-level="2">Local Component State</text:h>
      <text:p text:style-name="Text_20_body">Temporary UI-specific data.</text:p>
      <text:p text:style-name="Text_20_body">Examples:</text:p>
      <text:list text:style-name="L24">
        <text:list-item>
          <text:p text:style-name="P25">Modal visibility</text:p>
        </text:list-item>
        <text:list-item>
          <text:p text:style-name="P25">Input values</text:p>
        </text:list-item>
        <text:list-item>
          <text:p text:style-name="P25">Form validation</text:p>
        </text:list-item>
        <text:list-item>
          <text:p text:style-name="P25">Dropdown state</text:p>
        </text:list-item>
      </text:list>
      <text:p text:style-name="Horizontal_20_Line"/>
      <text:h text:style-name="Heading_20_2" text:outline-level="2"><text:soft-page-break/>Global Client State</text:h>
      <text:p text:style-name="Text_20_body">Managed by Zustand.</text:p>
      <text:p text:style-name="Text_20_body">Examples:</text:p>
      <text:list text:style-name="L25">
        <text:list-item>
          <text:p text:style-name="P26">Theme</text:p>
        </text:list-item>
        <text:list-item>
          <text:p text:style-name="P26">Current project</text:p>
        </text:list-item>
        <text:list-item>
          <text:p text:style-name="P26">Sidebar</text:p>
        </text:list-item>
        <text:list-item>
          <text:p text:style-name="P26">Notifications</text:p>
        </text:list-item>
      </text:list>
      <text:p text:style-name="Horizontal_20_Line"/>
      <text:h text:style-name="Heading_20_2" text:outline-level="2">Server State</text:h>
      <text:p text:style-name="Text_20_body">Managed by TanStack Query.</text:p>
      <text:p text:style-name="Text_20_body">Examples:</text:p>
      <text:list text:style-name="L26">
        <text:list-item>
          <text:p text:style-name="P27">User profile</text:p>
        </text:list-item>
        <text:list-item>
          <text:p text:style-name="P27">Dashboard analytics</text:p>
        </text:list-item>
        <text:list-item>
          <text:p text:style-name="P27">Search results</text:p>
        </text:list-item>
        <text:list-item>
          <text:p text:style-name="P27">Activity logs</text:p>
        </text:list-item>
      </text:list>
      <text:p text:style-name="Horizontal_20_Line"/>
      <text:h text:style-name="Heading_20_2" text:outline-level="2">Persistent State</text:h>
      <text:p text:style-name="Text_20_body">Stored in MongoDB.</text:p>
      <text:p text:style-name="Text_20_body">Examples:</text:p>
      <text:list text:style-name="L27">
        <text:list-item>
          <text:p text:style-name="P28">Accounts</text:p>
        </text:list-item>
        <text:list-item>
          <text:p text:style-name="P28">Projects</text:p>
        </text:list-item>
        <text:list-item>
          <text:p text:style-name="P28">Searches</text:p>
        </text:list-item>
        <text:list-item>
          <text:p text:style-name="P28">Reports</text:p>
        </text:list-item>
        <text:list-item>
          <text:p text:style-name="P28">Settings</text:p>
        </text:list-item>
      </text:list>
      <text:p text:style-name="Text_20_body">Each state category has a different lifecycle and persistence model.</text:p>
      <text:p text:style-name="Horizontal_20_Line"/>
      <text:h text:style-name="Heading_20_1" text:outline-level="1">2.8 Data Flow</text:h>
      <text:p text:style-name="Text_20_body">Data generally flows in one direction.</text:p>
      <text:p text:style-name="Text_20_body">User</text:p>
      <text:p text:style-name="Text_20_body">↓</text:p>
      <text:p text:style-name="Text_20_body"><text:soft-page-break/>React Component</text:p>
      <text:p text:style-name="Text_20_body">↓</text:p>
      <text:p text:style-name="Text_20_body">Event Handler</text:p>
      <text:p text:style-name="Text_20_body">↓</text:p>
      <text:p text:style-name="Text_20_body">State Update or API Call</text:p>
      <text:p text:style-name="Text_20_body">↓</text:p>
      <text:p text:style-name="Text_20_body">Backend</text:p>
      <text:p text:style-name="Text_20_body">↓</text:p>
      <text:p text:style-name="Text_20_body">Database</text:p>
      <text:p text:style-name="Text_20_body">↓</text:p>
      <text:p text:style-name="Text_20_body">Response</text:p>
      <text:p text:style-name="Text_20_body">↓</text:p>
      <text:p text:style-name="Text_20_body">TanStack Query</text:p>
      <text:p text:style-name="Text_20_body">↓</text:p>
      <text:p text:style-name="Text_20_body">React</text:p>
      <text:p text:style-name="Text_20_body">↓</text:p>
      <text:p text:style-name="Text_20_body">Rendered UI</text:p>
      <text:p text:style-name="Text_20_body">This unidirectional flow minimizes unexpected side effects.</text:p>
      <text:p text:style-name="Horizontal_20_Line"/>
      <text:h text:style-name="Heading_20_1" text:outline-level="1">2.9 Authentication Runtime</text:h>
      <text:p text:style-name="Text_20_body">Authentication affects nearly every request.</text:p>
      <text:p text:style-name="Text_20_body">Typical flow:</text:p>
      <text:list text:style-name="L28">
        <text:list-item>
          <text:p text:style-name="P29">User logs in.</text:p>
        </text:list-item>
        <text:list-item>
          <text:p text:style-name="P29">Backend validates credentials.</text:p>
        </text:list-item>
        <text:list-item>
          <text:p text:style-name="P29">JWT is generated.</text:p>
        </text:list-item>
        <text:list-item>
          <text:p text:style-name="P29">Token is stored securely.</text:p>
        </text:list-item>
        <text:list-item>
          <text:p text:style-name="P29">API requests include the token.</text:p>
        </text:list-item>
        <text:list-item>
          <text:p text:style-name="P29">Middleware validates the token.</text:p>
        </text:list-item>
        <text:list-item>
          <text:p text:style-name="P29">User identity is attached to the request.</text:p>
        </text:list-item>
        <text:list-item>
          <text:p text:style-name="P29">Controllers execute authorized operations.</text:p>
        </text:list-item>
      </text:list>
      <text:p text:style-name="Text_20_body">Expired or invalid tokens result in authentication failure and appropriate client-side handling.</text:p>
      <text:p text:style-name="Horizontal_20_Line"><text:soft-page-break/></text:p>
      <text:h text:style-name="Heading_20_1" text:outline-level="1">2.10 Error Propagation</text:h>
      <text:p text:style-name="Text_20_body">Errors are handled in layers.</text:p>
      <text:p text:style-name="Text_20_body">Possible sources include:</text:p>
      <text:list text:style-name="L29">
        <text:list-item>
          <text:p text:style-name="P30">Browser errors</text:p>
        </text:list-item>
        <text:list-item>
          <text:p text:style-name="P30">React rendering errors</text:p>
        </text:list-item>
        <text:list-item>
          <text:p text:style-name="P30">Network failures</text:p>
        </text:list-item>
        <text:list-item>
          <text:p text:style-name="P30">Authentication failures</text:p>
        </text:list-item>
        <text:list-item>
          <text:p text:style-name="P30">Validation failures</text:p>
        </text:list-item>
        <text:list-item>
          <text:p text:style-name="P30">Business logic exceptions</text:p>
        </text:list-item>
        <text:list-item>
          <text:p text:style-name="P30">Database errors</text:p>
        </text:list-item>
        <text:list-item>
          <text:p text:style-name="P30">Infrastructure failures</text:p>
        </text:list-item>
      </text:list>
      <text:p text:style-name="Text_20_body">Each layer either resolves the error or propagates it upward until an appropriate response is generated.</text:p>
      <text:p text:style-name="Horizontal_20_Line"/>
      <text:h text:style-name="Heading_20_1" text:outline-level="1">2.11 Logging Flow</text:h>
      <text:p text:style-name="Text_20_body">Runtime events generate logs throughout the system.</text:p>
      <text:p text:style-name="Text_20_body">Typical events include:</text:p>
      <text:list text:style-name="L30">
        <text:list-item>
          <text:p text:style-name="P31">User login</text:p>
        </text:list-item>
        <text:list-item>
          <text:p text:style-name="P31">API requests</text:p>
        </text:list-item>
        <text:list-item>
          <text:p text:style-name="P31">Failed authentication</text:p>
        </text:list-item>
        <text:list-item>
          <text:p text:style-name="P31">Database errors</text:p>
        </text:list-item>
        <text:list-item>
          <text:p text:style-name="P31">Validation failures</text:p>
        </text:list-item>
        <text:list-item>
          <text:p text:style-name="P31">Search execution</text:p>
        </text:list-item>
        <text:list-item>
          <text:p text:style-name="P31">Deployment events</text:p>
        </text:list-item>
        <text:list-item>
          <text:p text:style-name="P31">System startup</text:p>
        </text:list-item>
        <text:list-item>
          <text:p text:style-name="P31">Unexpected exceptions</text:p>
        </text:list-item>
      </text:list>
      <text:p text:style-name="Text_20_body">Structured logging improves observability and debugging.</text:p>
      <text:p text:style-name="Horizontal_20_Line"/>
      <text:h text:style-name="Heading_20_1" text:outline-level="1"><text:soft-page-break/>2.12 Performance Considerations</text:h>
      <text:p text:style-name="Text_20_body">Several runtime mechanisms improve overall performance.</text:p>
      <text:p text:style-name="Text_20_body">Frontend:</text:p>
      <text:list text:style-name="L31">
        <text:list-item>
          <text:p text:style-name="P32">Component memoization</text:p>
        </text:list-item>
        <text:list-item>
          <text:p text:style-name="P32">Lazy loading</text:p>
        </text:list-item>
        <text:list-item>
          <text:p text:style-name="P32">Route-based code splitting</text:p>
        </text:list-item>
        <text:list-item>
          <text:p text:style-name="P32">Query caching</text:p>
        </text:list-item>
        <text:list-item>
          <text:p text:style-name="P32">Optimistic updates</text:p>
        </text:list-item>
        <text:list-item>
          <text:p text:style-name="P32">Debounced searches</text:p>
        </text:list-item>
      </text:list>
      <text:p text:style-name="Text_20_body">Backend:</text:p>
      <text:list text:style-name="L32">
        <text:list-item>
          <text:p text:style-name="P33">Efficient middleware ordering</text:p>
        </text:list-item>
        <text:list-item>
          <text:p text:style-name="P33">Database indexing</text:p>
        </text:list-item>
        <text:list-item>
          <text:p text:style-name="P33">Connection pooling</text:p>
        </text:list-item>
        <text:list-item>
          <text:p text:style-name="P33">Query optimization</text:p>
        </text:list-item>
        <text:list-item>
          <text:p text:style-name="P33">Response compression</text:p>
        </text:list-item>
      </text:list>
      <text:p text:style-name="Text_20_body">Infrastructure:</text:p>
      <text:list text:style-name="L33">
        <text:list-item>
          <text:p text:style-name="P34">CDN asset delivery</text:p>
        </text:list-item>
        <text:list-item>
          <text:p text:style-name="P34">Reverse proxy caching</text:p>
        </text:list-item>
        <text:list-item>
          <text:p text:style-name="P34">Docker containerization</text:p>
        </text:list-item>
        <text:list-item>
          <text:p text:style-name="P34">Horizontal scalability</text:p>
        </text:list-item>
      </text:list>
      <text:p text:style-name="Text_20_body">These optimizations reduce latency and improve responsiveness.</text:p>
      <text:p text:style-name="Horizontal_20_Line"/>
      <text:h text:style-name="Heading_20_1" text:outline-level="1">2.13 Scalability Considerations</text:h>
      <text:p text:style-name="Text_20_body">The runtime architecture supports future growth through:</text:p>
      <text:list text:style-name="L34">
        <text:list-item>
          <text:p text:style-name="P35">Stateless backend services</text:p>
        </text:list-item>
        <text:list-item>
          <text:p text:style-name="P35">Independent frontend deployment</text:p>
        </text:list-item>
        <text:list-item>
          <text:p text:style-name="P35">Modular service layer</text:p>
        </text:list-item>
        <text:list-item>
          <text:p text:style-name="P35">Cache integration</text:p>
        </text:list-item>
        <text:list-item>
          <text:p text:style-name="P35">Horizontal server scaling</text:p>
        </text:list-item>
        <text:list-item>
          <text:p text:style-name="P35">Database indexing</text:p>
        </text:list-item>
        <text:list-item>
          <text:p text:style-name="P35"><text:soft-page-break/>Load balancing</text:p>
        </text:list-item>
        <text:list-item>
          <text:p text:style-name="P35">Background job processing</text:p>
        </text:list-item>
        <text:list-item>
          <text:p text:style-name="P35">Message queues (future enhancement)</text:p>
        </text:list-item>
      </text:list>
      <text:p text:style-name="Text_20_body">This design enables the application to handle increasing traffic and feature complexity.</text:p>
      <text:p text:style-name="Horizontal_20_Line"/>
      <text:h text:style-name="Heading_20_1" text:outline-level="1">2.14 Runtime Monitoring</text:h>
      <text:p text:style-name="Text_20_body">To maintain operational visibility, the runtime should expose metrics such as:</text:p>
      <text:list text:style-name="L35">
        <text:list-item>
          <text:p text:style-name="P36">API response times</text:p>
        </text:list-item>
        <text:list-item>
          <text:p text:style-name="P36">Request throughput</text:p>
        </text:list-item>
        <text:list-item>
          <text:p text:style-name="P36">Error rates</text:p>
        </text:list-item>
        <text:list-item>
          <text:p text:style-name="P36">Database query duration</text:p>
        </text:list-item>
        <text:list-item>
          <text:p text:style-name="P36">Cache hit ratio</text:p>
        </text:list-item>
        <text:list-item>
          <text:p text:style-name="P36">Memory usage</text:p>
        </text:list-item>
        <text:list-item>
          <text:p text:style-name="P36">CPU utilization</text:p>
        </text:list-item>
        <text:list-item>
          <text:p text:style-name="P36">Active user sessions</text:p>
        </text:list-item>
      </text:list>
      <text:p text:style-name="Text_20_body">These metrics help identify bottlenecks and ensure system reliability.</text:p>
      <text:p text:style-name="Horizontal_20_Line"/>
      <text:h text:style-name="Heading_20_1" text:outline-level="1">2.15 Chapter Summary</text:h>
      <text:p text:style-name="Text_20_body">The runtime architecture describes how the Search System behaves while executing. It explains the interaction between the browser, Next.js, React, Zustand, TanStack Query, Express, MongoDB, and infrastructure components during the lifecycle of every user request.</text:p>
      <text:p text:style-name="Text_20_body">This chapter establishes the execution model that underpins the remainder of Volume 2. Subsequent chapters will examine each runtime subsystem in detail, beginning with the application's startup process and the internal organization of the project structure.</text:p>
      <text:p text:style-name="Text_20_body">The next chapter is <text:span text:style-name="Strong_20_Emphasis">Chapter 3 – Folder Structure Internals</text:span>, where we'll explain <text:span text:style-name="Strong_20_Emphasis">why each top-level directory exists, how modules are organized, dependency rules, import flow, separation of concerns, feature-based architecture, scalability considerations, and how the folder structure supports long-term maintainability</text:span>. This chapter is not just a directory listing—it explains the architectural reasoning behind the project's organization.</text:p>
      <text:h text:style-name="Heading_20_3" text:outline-level="3"><text:soft-page-break/>Volume 2 — Internal Working</text:h>
      <text:h text:style-name="Heading_20_2" text:outline-level="2">Chapter 3 — Folder Structure Internals</text:h>
      <text:h text:style-name="Heading_20_1" text:outline-level="1">Chapter 3 — Folder Structure Internals</text:h>
      <text:h text:style-name="Heading_20_2" text:outline-level="2">3.1 Purpose</text:h>
      <text:p text:style-name="Text_20_body">The folder structure of a software project is more than a method of organizing files. It represents the physical implementation of the application's architecture. A well-designed structure improves maintainability, readability, scalability, onboarding, and long-term evolution.</text:p>
      <text:p text:style-name="Text_20_body">This chapter explains the reasoning behind the organization of the Search System's codebase. Rather than describing individual files, it focuses on how directories relate to one another, how responsibilities are separated, and how the structure supports the runtime architecture introduced in the previous chapter.</text:p>
      <text:p text:style-name="Text_20_body">The detailed implementation of individual files is covered in <text:span text:style-name="Strong_20_Emphasis">Volume 3 – Complete Implementation Guide</text:span>.</text:p>
      <text:p text:style-name="Horizontal_20_Line"/>
      <text:h text:style-name="Heading_20_1" text:outline-level="1">3.2 Design Principles</text:h>
      <text:p text:style-name="Text_20_body">The project structure is designed around several engineering principles.</text:p>
      <text:h text:style-name="Heading_20_3" text:outline-level="3">Separation of Concerns</text:h>
      <text:p text:style-name="Text_20_body">Each directory has a single primary responsibility.</text:p>
      <text:p text:style-name="Text_20_body">Examples include:</text:p>
      <text:list text:style-name="L36">
        <text:list-item>
          <text:p text:style-name="P37">UI rendering</text:p>
        </text:list-item>
        <text:list-item>
          <text:p text:style-name="P37">Business logic</text:p>
        </text:list-item>
        <text:list-item>
          <text:p text:style-name="P37">API communication</text:p>
        </text:list-item>
        <text:list-item>
          <text:p text:style-name="P37">Database access</text:p>
        </text:list-item>
        <text:list-item>
          <text:p text:style-name="P37">Authentication</text:p>
        </text:list-item>
        <text:list-item>
          <text:p text:style-name="P37">State management</text:p>
        </text:list-item>
        <text:list-item>
          <text:p text:style-name="P37">Configuration</text:p>
        </text:list-item>
      </text:list>
      <text:p text:style-name="Text_20_body">This separation minimizes coupling and makes the codebase easier to understand.</text:p>
      <text:p text:style-name="Horizontal_20_Line"/>
      <text:h text:style-name="Heading_20_3" text:outline-level="3">Feature Isolation</text:h>
      <text:p text:style-name="Text_20_body">Features are grouped logically rather than allowing unrelated modules to depend on one another.</text:p>
      <text:p text:style-name="Text_20_body"><text:soft-page-break/>For example:</text:p>
      <text:list text:style-name="L37">
        <text:list-item>
          <text:p text:style-name="P38">Authentication logic remains inside authentication modules.</text:p>
        </text:list-item>
        <text:list-item>
          <text:p text:style-name="P38">Dashboard logic remains inside dashboard modules.</text:p>
        </text:list-item>
        <text:list-item>
          <text:p text:style-name="P38">Search functionality remains independent from analytics.</text:p>
        </text:list-item>
      </text:list>
      <text:p text:style-name="Text_20_body">This isolation simplifies future feature development.</text:p>
      <text:p text:style-name="Horizontal_20_Line"/>
      <text:h text:style-name="Heading_20_3" text:outline-level="3">Layered Organization</text:h>
      <text:p text:style-name="Text_20_body">The application is organized into layers rather than allowing unrestricted communication.</text:p>
      <text:p text:style-name="Text_20_body">Typical layers include:</text:p>
      <text:p text:style-name="Text_20_body">Presentation Layer</text:p>
      <text:p text:style-name="Text_20_body">↓</text:p>
      <text:p text:style-name="Text_20_body">State Layer</text:p>
      <text:p text:style-name="Text_20_body">↓</text:p>
      <text:p text:style-name="Text_20_body">API Layer</text:p>
      <text:p text:style-name="Text_20_body">↓</text:p>
      <text:p text:style-name="Text_20_body">Backend Layer</text:p>
      <text:p text:style-name="Text_20_body">↓</text:p>
      <text:p text:style-name="Text_20_body">Service Layer</text:p>
      <text:p text:style-name="Text_20_body">↓</text:p>
      <text:p text:style-name="Text_20_body">Database Layer</text:p>
      <text:p text:style-name="Text_20_body">Each layer communicates only with adjacent layers whenever possible.</text:p>
      <text:p text:style-name="Horizontal_20_Line"/>
      <text:h text:style-name="Heading_20_3" text:outline-level="3">Scalability</text:h>
      <text:p text:style-name="Text_20_body">The folder hierarchy is designed to accommodate future growth without requiring major restructuring.</text:p>
      <text:p text:style-name="Text_20_body">Adding new features should primarily involve creating new modules rather than modifying existing ones.</text:p>
      <text:p text:style-name="Horizontal_20_Line"/>
      <text:h text:style-name="Heading_20_1" text:outline-level="1">3.3 High-Level Repository Layout</text:h>
      <text:p text:style-name="Text_20_body">The repository is divided into multiple logical sections.</text:p>
      <text:p text:style-name="Text_20_body">Typical structure:</text:p>
      <text:p text:style-name="Preformatted_20_Text"><text:soft-page-break/><text:span text:style-name="Source_20_Text">project-root/</text:span></text:p>
      <text:p text:style-name="Preformatted_20_Text"/>
      <text:p text:style-name="Preformatted_20_Text"><text:span text:style-name="Source_20_Text">frontend/</text:span></text:p>
      <text:p text:style-name="Preformatted_20_Text"><text:span text:style-name="Source_20_Text">backend/</text:span></text:p>
      <text:p text:style-name="Preformatted_20_Text"><text:span text:style-name="Source_20_Text">shared/</text:span></text:p>
      <text:p text:style-name="Preformatted_20_Text"><text:span text:style-name="Source_20_Text">docker/</text:span></text:p>
      <text:p text:style-name="Preformatted_20_Text"><text:span text:style-name="Source_20_Text">.github/</text:span></text:p>
      <text:p text:style-name="Preformatted_20_Text"><text:span text:style-name="Source_20_Text">docs/</text:span></text:p>
      <text:p text:style-name="Preformatted_20_Text"><text:span text:style-name="Source_20_Text">scripts/</text:span></text:p>
      <text:p text:style-name="P1"><text:span text:style-name="Source_20_Text">config/</text:span></text:p>
      <text:p text:style-name="Text_20_body">Each section serves a distinct purpose within the development lifecycle.</text:p>
      <text:p text:style-name="Horizontal_20_Line"/>
      <text:h text:style-name="Heading_20_1" text:outline-level="1">3.4 Frontend Structure</text:h>
      <text:p text:style-name="Text_20_body">The frontend contains everything executed inside the browser.</text:p>
      <text:p text:style-name="Text_20_body">Typical organization:</text:p>
      <text:p text:style-name="Preformatted_20_Text"><text:span text:style-name="Source_20_Text">frontend/</text:span></text:p>
      <text:p text:style-name="Preformatted_20_Text"/>
      <text:p text:style-name="Preformatted_20_Text"><text:span text:style-name="Source_20_Text">app/</text:span></text:p>
      <text:p text:style-name="Preformatted_20_Text"><text:span text:style-name="Source_20_Text">components/</text:span></text:p>
      <text:p text:style-name="Preformatted_20_Text"><text:span text:style-name="Source_20_Text">features/</text:span></text:p>
      <text:p text:style-name="Preformatted_20_Text"><text:span text:style-name="Source_20_Text">hooks/</text:span></text:p>
      <text:p text:style-name="Preformatted_20_Text"><text:span text:style-name="Source_20_Text">store/</text:span></text:p>
      <text:p text:style-name="Preformatted_20_Text"><text:span text:style-name="Source_20_Text">services/</text:span></text:p>
      <text:p text:style-name="Preformatted_20_Text"><text:span text:style-name="Source_20_Text">lib/</text:span></text:p>
      <text:p text:style-name="Preformatted_20_Text"><text:span text:style-name="Source_20_Text">types/</text:span></text:p>
      <text:p text:style-name="Preformatted_20_Text"><text:span text:style-name="Source_20_Text">styles/</text:span></text:p>
      <text:p text:style-name="Preformatted_20_Text"><text:span text:style-name="Source_20_Text">utils/</text:span></text:p>
      <text:p text:style-name="P1"><text:span text:style-name="Source_20_Text">public/</text:span></text:p>
      <text:p text:style-name="Text_20_body">Each directory represents a specific concern.</text:p>
      <text:p text:style-name="Horizontal_20_Line"/>
      <text:h text:style-name="Heading_20_2" text:outline-level="2">app/</text:h>
      <text:p text:style-name="Text_20_body">The <text:span text:style-name="Source_20_Text">app</text:span> directory defines the application's routing structure using the Next.js App Router.</text:p>
      <text:p text:style-name="Text_20_body">Responsibilities include:</text:p>
      <text:list text:style-name="L38">
        <text:list-item>
          <text:p text:style-name="P39">Page definitions</text:p>
        </text:list-item>
        <text:list-item>
          <text:p text:style-name="P39">Layout hierarchy</text:p>
        </text:list-item>
        <text:list-item>
          <text:p text:style-name="P39">Route organization</text:p>
        </text:list-item>
        <text:list-item>
          <text:p text:style-name="P39">Loading states</text:p>
        </text:list-item>
        <text:list-item>
          <text:p text:style-name="P39">Error boundaries</text:p>
        </text:list-item>
        <text:list-item>
          <text:p text:style-name="P39">Metadata</text:p>
        </text:list-item>
      </text:list>
      <text:p text:style-name="Text_20_body">This directory determines how users navigate through the application.</text:p>
      <text:p text:style-name="Horizontal_20_Line"/>
      <text:h text:style-name="Heading_20_2" text:outline-level="2"><text:soft-page-break/>components/</text:h>
      <text:p text:style-name="Text_20_body">Contains reusable UI components.</text:p>
      <text:p text:style-name="Text_20_body">Examples include:</text:p>
      <text:list text:style-name="L39">
        <text:list-item>
          <text:p text:style-name="P40">Buttons</text:p>
        </text:list-item>
        <text:list-item>
          <text:p text:style-name="P40">Cards</text:p>
        </text:list-item>
        <text:list-item>
          <text:p text:style-name="P40">Tables</text:p>
        </text:list-item>
        <text:list-item>
          <text:p text:style-name="P40">Charts</text:p>
        </text:list-item>
        <text:list-item>
          <text:p text:style-name="P40">Forms</text:p>
        </text:list-item>
        <text:list-item>
          <text:p text:style-name="P40">Modals</text:p>
        </text:list-item>
        <text:list-item>
          <text:p text:style-name="P40">Navigation</text:p>
        </text:list-item>
        <text:list-item>
          <text:p text:style-name="P40">Dialogs</text:p>
        </text:list-item>
      </text:list>
      <text:p text:style-name="Text_20_body">Components should remain presentation-focused and avoid business logic where possible.</text:p>
      <text:p text:style-name="Horizontal_20_Line"/>
      <text:h text:style-name="Heading_20_2" text:outline-level="2">features/</text:h>
      <text:p text:style-name="Text_20_body">Feature-specific modules combine UI, state, API interactions, and business rules for a particular domain.</text:p>
      <text:p text:style-name="Text_20_body">Examples:</text:p>
      <text:p text:style-name="Preformatted_20_Text"><text:span text:style-name="Source_20_Text">features/</text:span></text:p>
      <text:p text:style-name="Preformatted_20_Text"/>
      <text:p text:style-name="Preformatted_20_Text"><text:span text:style-name="Source_20_Text">authentication/</text:span></text:p>
      <text:p text:style-name="Preformatted_20_Text"><text:span text:style-name="Source_20_Text">dashboard/</text:span></text:p>
      <text:p text:style-name="Preformatted_20_Text"><text:span text:style-name="Source_20_Text">search/</text:span></text:p>
      <text:p text:style-name="Preformatted_20_Text"><text:span text:style-name="Source_20_Text">analytics/</text:span></text:p>
      <text:p text:style-name="Preformatted_20_Text"><text:span text:style-name="Source_20_Text">projects/</text:span></text:p>
      <text:p text:style-name="P1"><text:span text:style-name="Source_20_Text">settings/</text:span></text:p>
      <text:p text:style-name="Text_20_body">Grouping related functionality together improves discoverability and reduces cross-module dependencies.</text:p>
      <text:p text:style-name="Horizontal_20_Line"/>
      <text:h text:style-name="Heading_20_2" text:outline-level="2">hooks/</text:h>
      <text:p text:style-name="Text_20_body">Custom React hooks encapsulate reusable behavior.</text:p>
      <text:p text:style-name="Text_20_body">Examples:</text:p>
      <text:list text:style-name="L40">
        <text:list-item>
          <text:p text:style-name="P41">Authentication hooks</text:p>
        </text:list-item>
        <text:list-item>
          <text:p text:style-name="P41">API hooks</text:p>
        </text:list-item>
        <text:list-item>
          <text:p text:style-name="P41">Form hooks</text:p>
        </text:list-item>
        <text:list-item>
          <text:p text:style-name="P41">Theme hooks</text:p>
        </text:list-item>
        <text:list-item>
          <text:p text:style-name="P41"><text:soft-page-break/>Search hooks</text:p>
        </text:list-item>
      </text:list>
      <text:p text:style-name="Text_20_body">Hooks prevent duplicated logic across components.</text:p>
      <text:p text:style-name="Horizontal_20_Line"/>
      <text:h text:style-name="Heading_20_2" text:outline-level="2">store/</text:h>
      <text:p text:style-name="Text_20_body">Contains Zustand stores responsible for client-side state.</text:p>
      <text:p text:style-name="Text_20_body">Typical stores include:</text:p>
      <text:list text:style-name="L41">
        <text:list-item>
          <text:p text:style-name="P42">Authentication store</text:p>
        </text:list-item>
        <text:list-item>
          <text:p text:style-name="P42">UI store</text:p>
        </text:list-item>
        <text:list-item>
          <text:p text:style-name="P42">Theme store</text:p>
        </text:list-item>
        <text:list-item>
          <text:p text:style-name="P42">Sidebar store</text:p>
        </text:list-item>
        <text:list-item>
          <text:p text:style-name="P42">Project selection store</text:p>
        </text:list-item>
      </text:list>
      <text:p text:style-name="Text_20_body">Only client-owned state belongs here.</text:p>
      <text:p text:style-name="Horizontal_20_Line"/>
      <text:h text:style-name="Heading_20_2" text:outline-level="2">services/</text:h>
      <text:p text:style-name="Text_20_body">Contains modules responsible for communicating with backend APIs.</text:p>
      <text:p text:style-name="Text_20_body">Responsibilities include:</text:p>
      <text:list text:style-name="L42">
        <text:list-item>
          <text:p text:style-name="P43">HTTP requests</text:p>
        </text:list-item>
        <text:list-item>
          <text:p text:style-name="P43">Request configuration</text:p>
        </text:list-item>
        <text:list-item>
          <text:p text:style-name="P43">Response parsing</text:p>
        </text:list-item>
        <text:list-item>
          <text:p text:style-name="P43">Authentication headers</text:p>
        </text:list-item>
        <text:list-item>
          <text:p text:style-name="P43">Error transformation</text:p>
        </text:list-item>
      </text:list>
      <text:p text:style-name="Text_20_body">Business rules should not reside in service modules.</text:p>
      <text:p text:style-name="Horizontal_20_Line"/>
      <text:h text:style-name="Heading_20_2" text:outline-level="2">lib/</text:h>
      <text:p text:style-name="Text_20_body">Shared utilities and library initialization.</text:p>
      <text:p text:style-name="Text_20_body">Examples:</text:p>
      <text:list text:style-name="L43">
        <text:list-item>
          <text:p text:style-name="P44">Query Client initialization</text:p>
        </text:list-item>
        <text:list-item>
          <text:p text:style-name="P44">Axios instance</text:p>
        </text:list-item>
        <text:list-item>
          <text:p text:style-name="P44">Authentication helpers</text:p>
        </text:list-item>
        <text:list-item>
          <text:p text:style-name="P44">Utility wrappers</text:p>
        </text:list-item>
      </text:list>
      <text:p text:style-name="Text_20_body"><text:soft-page-break/>This directory centralizes reusable infrastructure code.</text:p>
      <text:p text:style-name="Horizontal_20_Line"/>
      <text:h text:style-name="Heading_20_2" text:outline-level="2">types/</text:h>
      <text:p text:style-name="Text_20_body">Contains shared TypeScript type definitions.</text:p>
      <text:p text:style-name="Text_20_body">Examples:</text:p>
      <text:list text:style-name="L44">
        <text:list-item>
          <text:p text:style-name="P45">API models</text:p>
        </text:list-item>
        <text:list-item>
          <text:p text:style-name="P45">User interfaces</text:p>
        </text:list-item>
        <text:list-item>
          <text:p text:style-name="P45">Dashboard types</text:p>
        </text:list-item>
        <text:list-item>
          <text:p text:style-name="P45">Search result types</text:p>
        </text:list-item>
        <text:list-item>
          <text:p text:style-name="P45">Generic utility types</text:p>
        </text:list-item>
      </text:list>
      <text:p text:style-name="Text_20_body">Centralizing types improves consistency across the application.</text:p>
      <text:p text:style-name="Horizontal_20_Line"/>
      <text:h text:style-name="Heading_20_2" text:outline-level="2">utils/</text:h>
      <text:p text:style-name="Text_20_body">General-purpose helper functions.</text:p>
      <text:p text:style-name="Text_20_body">Examples:</text:p>
      <text:list text:style-name="L45">
        <text:list-item>
          <text:p text:style-name="P46">Date formatting</text:p>
        </text:list-item>
        <text:list-item>
          <text:p text:style-name="P46">Number formatting</text:p>
        </text:list-item>
        <text:list-item>
          <text:p text:style-name="P46">String manipulation</text:p>
        </text:list-item>
        <text:list-item>
          <text:p text:style-name="P46">Validation helpers</text:p>
        </text:list-item>
        <text:list-item>
          <text:p text:style-name="P46">Utility calculations</text:p>
        </text:list-item>
      </text:list>
      <text:p text:style-name="Text_20_body">Utilities should remain stateless and reusable.</text:p>
      <text:p text:style-name="Horizontal_20_Line"/>
      <text:h text:style-name="Heading_20_1" text:outline-level="1">3.5 Backend Structure</text:h>
      <text:p text:style-name="Text_20_body">The backend processes HTTP requests and executes business logic.</text:p>
      <text:p text:style-name="Text_20_body">Typical organization:</text:p>
      <text:p text:style-name="Preformatted_20_Text"><text:span text:style-name="Source_20_Text">backend/</text:span></text:p>
      <text:p text:style-name="Preformatted_20_Text"/>
      <text:p text:style-name="Preformatted_20_Text"><text:span text:style-name="Source_20_Text">controllers/</text:span></text:p>
      <text:p text:style-name="Preformatted_20_Text"><text:span text:style-name="Source_20_Text">services/</text:span></text:p>
      <text:p text:style-name="Preformatted_20_Text"><text:span text:style-name="Source_20_Text">models/</text:span></text:p>
      <text:p text:style-name="Preformatted_20_Text"><text:span text:style-name="Source_20_Text">routes/</text:span></text:p>
      <text:p text:style-name="Preformatted_20_Text"><text:span text:style-name="Source_20_Text">middleware/</text:span></text:p>
      <text:p text:style-name="Preformatted_20_Text"><text:span text:style-name="Source_20_Text">config/</text:span></text:p>
      <text:p text:style-name="Preformatted_20_Text"><text:span text:style-name="Source_20_Text">database/</text:span></text:p>
      <text:p text:style-name="Preformatted_20_Text"><text:soft-page-break/><text:span text:style-name="Source_20_Text">utils/</text:span></text:p>
      <text:p text:style-name="Preformatted_20_Text"><text:span text:style-name="Source_20_Text">validators/</text:span></text:p>
      <text:p text:style-name="P1"><text:span text:style-name="Source_20_Text">types/</text:span></text:p>
      <text:p text:style-name="Text_20_body">Each directory represents a layer within the request lifecycle.</text:p>
      <text:p text:style-name="Horizontal_20_Line"/>
      <text:h text:style-name="Heading_20_2" text:outline-level="2">routes/</text:h>
      <text:p text:style-name="Text_20_body">Defines HTTP endpoints.</text:p>
      <text:p text:style-name="Text_20_body">Responsibilities include:</text:p>
      <text:list text:style-name="L46">
        <text:list-item>
          <text:p text:style-name="P47">URL mapping</text:p>
        </text:list-item>
        <text:list-item>
          <text:p text:style-name="P47">Middleware assignment</text:p>
        </text:list-item>
        <text:list-item>
          <text:p text:style-name="P47">Controller selection</text:p>
        </text:list-item>
      </text:list>
      <text:p text:style-name="Text_20_body">Routes should remain lightweight.</text:p>
      <text:p text:style-name="Horizontal_20_Line"/>
      <text:h text:style-name="Heading_20_2" text:outline-level="2">controllers/</text:h>
      <text:p text:style-name="Text_20_body">Controllers receive validated requests.</text:p>
      <text:p text:style-name="Text_20_body">Responsibilities:</text:p>
      <text:list text:style-name="L47">
        <text:list-item>
          <text:p text:style-name="P48">Extract request data</text:p>
        </text:list-item>
        <text:list-item>
          <text:p text:style-name="P48">Invoke services</text:p>
        </text:list-item>
        <text:list-item>
          <text:p text:style-name="P48">Build HTTP responses</text:p>
        </text:list-item>
        <text:list-item>
          <text:p text:style-name="P48">Handle expected errors</text:p>
        </text:list-item>
      </text:list>
      <text:p text:style-name="Text_20_body">Controllers should not contain complex business logic.</text:p>
      <text:p text:style-name="Horizontal_20_Line"/>
      <text:h text:style-name="Heading_20_2" text:outline-level="2">services/</text:h>
      <text:p text:style-name="Text_20_body">The service layer contains the application's core business rules.</text:p>
      <text:p text:style-name="Text_20_body">Examples:</text:p>
      <text:list text:style-name="L48">
        <text:list-item>
          <text:p text:style-name="P49">Authentication processing</text:p>
        </text:list-item>
        <text:list-item>
          <text:p text:style-name="P49">Search execution</text:p>
        </text:list-item>
        <text:list-item>
          <text:p text:style-name="P49">Analytics generation</text:p>
        </text:list-item>
        <text:list-item>
          <text:p text:style-name="P49">Project management</text:p>
        </text:list-item>
        <text:list-item>
          <text:p text:style-name="P49">Dashboard calculations</text:p>
        </text:list-item>
      </text:list>
      <text:p text:style-name="Text_20_body"><text:soft-page-break/>Services coordinate multiple lower-level components while remaining independent of HTTP concerns.</text:p>
      <text:p text:style-name="Horizontal_20_Line"/>
      <text:h text:style-name="Heading_20_2" text:outline-level="2">models/</text:h>
      <text:p text:style-name="Text_20_body">Defines MongoDB schemas and Mongoose models.</text:p>
      <text:p text:style-name="Text_20_body">Responsibilities include:</text:p>
      <text:list text:style-name="L49">
        <text:list-item>
          <text:p text:style-name="P50">Schema validation</text:p>
        </text:list-item>
        <text:list-item>
          <text:p text:style-name="P50">Data structure</text:p>
        </text:list-item>
        <text:list-item>
          <text:p text:style-name="P50">Relationships</text:p>
        </text:list-item>
        <text:list-item>
          <text:p text:style-name="P50">Database constraints</text:p>
        </text:list-item>
        <text:list-item>
          <text:p text:style-name="P50">Default values</text:p>
        </text:list-item>
      </text:list>
      <text:p text:style-name="Text_20_body">Models describe how information is stored persistently.</text:p>
      <text:p text:style-name="Horizontal_20_Line"/>
      <text:h text:style-name="Heading_20_2" text:outline-level="2">middleware/</text:h>
      <text:p text:style-name="Text_20_body">Middleware executes before controllers.</text:p>
      <text:p text:style-name="Text_20_body">Examples:</text:p>
      <text:list text:style-name="L50">
        <text:list-item>
          <text:p text:style-name="P51">Authentication</text:p>
        </text:list-item>
        <text:list-item>
          <text:p text:style-name="P51">Authorization</text:p>
        </text:list-item>
        <text:list-item>
          <text:p text:style-name="P51">Logging</text:p>
        </text:list-item>
        <text:list-item>
          <text:p text:style-name="P51">Validation</text:p>
        </text:list-item>
        <text:list-item>
          <text:p text:style-name="P51">Rate limiting</text:p>
        </text:list-item>
        <text:list-item>
          <text:p text:style-name="P51">Error handling</text:p>
        </text:list-item>
      </text:list>
      <text:p text:style-name="Text_20_body">Middleware enables reusable request processing.</text:p>
      <text:p text:style-name="Horizontal_20_Line"/>
      <text:h text:style-name="Heading_20_2" text:outline-level="2">validators/</text:h>
      <text:p text:style-name="Text_20_body">Contains reusable request validation rules.</text:p>
      <text:p text:style-name="Text_20_body">Typical validation includes:</text:p>
      <text:list text:style-name="L51">
        <text:list-item>
          <text:p text:style-name="P52">Required fields</text:p>
        </text:list-item>
        <text:list-item>
          <text:p text:style-name="P52">Email format</text:p>
        </text:list-item>
        <text:list-item>
          <text:p text:style-name="P52">Password strength</text:p>
        </text:list-item>
        <text:list-item>
          <text:p text:style-name="P52"><text:soft-page-break/>Object identifiers</text:p>
        </text:list-item>
        <text:list-item>
          <text:p text:style-name="P52">Pagination parameters</text:p>
        </text:list-item>
      </text:list>
      <text:p text:style-name="Text_20_body">Centralizing validation ensures consistency across endpoints.</text:p>
      <text:p text:style-name="Horizontal_20_Line"/>
      <text:h text:style-name="Heading_20_2" text:outline-level="2">database/</text:h>
      <text:p text:style-name="Text_20_body">Responsible for database initialization.</text:p>
      <text:p text:style-name="Text_20_body">Responsibilities include:</text:p>
      <text:list text:style-name="L52">
        <text:list-item>
          <text:p text:style-name="P53">Connection creation</text:p>
        </text:list-item>
        <text:list-item>
          <text:p text:style-name="P53">Configuration</text:p>
        </text:list-item>
        <text:list-item>
          <text:p text:style-name="P53">Health checks</text:p>
        </text:list-item>
        <text:list-item>
          <text:p text:style-name="P53">Retry mechanisms</text:p>
        </text:list-item>
        <text:list-item>
          <text:p text:style-name="P53">Connection monitoring</text:p>
        </text:list-item>
      </text:list>
      <text:p text:style-name="Text_20_body">Database connectivity is isolated from business logic.</text:p>
      <text:p text:style-name="Horizontal_20_Line"/>
      <text:h text:style-name="Heading_20_1" text:outline-level="1">3.6 Shared Modules</text:h>
      <text:p text:style-name="Text_20_body">Some functionality is shared across frontend and backend.</text:p>
      <text:p text:style-name="Text_20_body">Typical examples:</text:p>
      <text:p text:style-name="Preformatted_20_Text"><text:span text:style-name="Source_20_Text">shared/</text:span></text:p>
      <text:p text:style-name="Preformatted_20_Text"/>
      <text:p text:style-name="Preformatted_20_Text"><text:span text:style-name="Source_20_Text">types/</text:span></text:p>
      <text:p text:style-name="Preformatted_20_Text"><text:span text:style-name="Source_20_Text">constants/</text:span></text:p>
      <text:p text:style-name="Preformatted_20_Text"><text:span text:style-name="Source_20_Text">enums/</text:span></text:p>
      <text:p text:style-name="P1"><text:span text:style-name="Source_20_Text">schemas/</text:span></text:p>
      <text:p text:style-name="Text_20_body">Sharing definitions reduces duplication and ensures consistency between client and server.</text:p>
      <text:p text:style-name="Horizontal_20_Line"/>
      <text:h text:style-name="Heading_20_1" text:outline-level="1">3.7 Documentation Structure</text:h>
      <text:p text:style-name="Text_20_body">Project documentation remains separate from implementation.</text:p>
      <text:p text:style-name="Text_20_body">Typical layout:</text:p>
      <text:p text:style-name="Preformatted_20_Text"><text:span text:style-name="Source_20_Text">docs/</text:span></text:p>
      <text:p text:style-name="Preformatted_20_Text"/>
      <text:p text:style-name="Preformatted_20_Text"><text:span text:style-name="Source_20_Text">Volume-1/</text:span></text:p>
      <text:p text:style-name="Preformatted_20_Text"><text:span text:style-name="Source_20_Text">Volume-2/</text:span></text:p>
      <text:p text:style-name="Preformatted_20_Text"><text:span text:style-name="Source_20_Text">Volume-3/</text:span></text:p>
      <text:p text:style-name="Preformatted_20_Text"><text:span text:style-name="Source_20_Text">Volume-4/</text:span></text:p>
      <text:p text:style-name="P1"><text:span text:style-name="Source_20_Text">...</text:span></text:p>
      <text:p text:style-name="Text_20_body"><text:soft-page-break/>Separating documentation from source code prevents accidental coupling and simplifies maintenance.</text:p>
      <text:p text:style-name="Horizontal_20_Line"/>
      <text:h text:style-name="Heading_20_1" text:outline-level="1">3.8 Infrastructure Directories</text:h>
      <text:p text:style-name="Text_20_body">Infrastructure-related configuration is isolated from application logic.</text:p>
      <text:p text:style-name="Text_20_body">Examples:</text:p>
      <text:p text:style-name="Preformatted_20_Text"><text:span text:style-name="Source_20_Text">docker/</text:span></text:p>
      <text:p text:style-name="Preformatted_20_Text"><text:span text:style-name="Source_20_Text">.github/</text:span></text:p>
      <text:p text:style-name="Preformatted_20_Text"><text:span text:style-name="Source_20_Text">nginx/</text:span></text:p>
      <text:p text:style-name="Preformatted_20_Text"><text:span text:style-name="Source_20_Text">terraform/</text:span></text:p>
      <text:p text:style-name="P1"><text:span text:style-name="Source_20_Text">scripts/</text:span></text:p>
      <text:p text:style-name="Text_20_body">Responsibilities include:</text:p>
      <text:list text:style-name="L53">
        <text:list-item>
          <text:p text:style-name="P54">Containerization</text:p>
        </text:list-item>
        <text:list-item>
          <text:p text:style-name="P54">CI/CD</text:p>
        </text:list-item>
        <text:list-item>
          <text:p text:style-name="P54">Reverse proxy configuration</text:p>
        </text:list-item>
        <text:list-item>
          <text:p text:style-name="P54">Infrastructure provisioning</text:p>
        </text:list-item>
        <text:list-item>
          <text:p text:style-name="P54">Automation scripts</text:p>
        </text:list-item>
      </text:list>
      <text:p text:style-name="Text_20_body">This separation allows infrastructure to evolve independently of application code.</text:p>
      <text:p text:style-name="Horizontal_20_Line"/>
      <text:h text:style-name="Heading_20_1" text:outline-level="1">3.9 Dependency Rules</text:h>
      <text:p text:style-name="Text_20_body">To maintain a clean architecture, modules follow strict dependency guidelines.</text:p>
      <text:h text:style-name="Heading_20_3" text:outline-level="3">Frontend</text:h>
      <text:p text:style-name="Text_20_body">Components may depend on:</text:p>
      <text:list text:style-name="L54">
        <text:list-item>
          <text:p text:style-name="P55">Hooks</text:p>
        </text:list-item>
        <text:list-item>
          <text:p text:style-name="P55">Utilities</text:p>
        </text:list-item>
        <text:list-item>
          <text:p text:style-name="P55">Types</text:p>
        </text:list-item>
        <text:list-item>
          <text:p text:style-name="P55">Feature modules</text:p>
        </text:list-item>
      </text:list>
      <text:p text:style-name="Text_20_body">Components should not directly access backend-specific logic.</text:p>
      <text:p text:style-name="Horizontal_20_Line"/>
      <text:h text:style-name="Heading_20_3" text:outline-level="3">Services</text:h>
      <text:p text:style-name="Text_20_body">Services may depend on:</text:p>
      <text:list text:style-name="L55">
        <text:list-item>
          <text:p text:style-name="P56">Models</text:p>
        </text:list-item>
        <text:list-item>
          <text:p text:style-name="P56"><text:soft-page-break/>Utilities</text:p>
        </text:list-item>
        <text:list-item>
          <text:p text:style-name="P56">External APIs</text:p>
        </text:list-item>
      </text:list>
      <text:p text:style-name="Text_20_body">Services should remain independent of HTTP request objects whenever possible.</text:p>
      <text:p text:style-name="Horizontal_20_Line"/>
      <text:h text:style-name="Heading_20_3" text:outline-level="3">Controllers</text:h>
      <text:p text:style-name="Text_20_body">Controllers depend on:</text:p>
      <text:list text:style-name="L56">
        <text:list-item>
          <text:p text:style-name="P57">Services</text:p>
        </text:list-item>
        <text:list-item>
          <text:p text:style-name="P57">Validators</text:p>
        </text:list-item>
        <text:list-item>
          <text:p text:style-name="P57">Middleware outputs</text:p>
        </text:list-item>
      </text:list>
      <text:p text:style-name="Text_20_body">Controllers should avoid direct database access.</text:p>
      <text:p text:style-name="Horizontal_20_Line"/>
      <text:h text:style-name="Heading_20_3" text:outline-level="3">Models</text:h>
      <text:p text:style-name="Text_20_body">Models should not depend on:</text:p>
      <text:list text:style-name="L57">
        <text:list-item>
          <text:p text:style-name="P58">Controllers</text:p>
        </text:list-item>
        <text:list-item>
          <text:p text:style-name="P58">Routes</text:p>
        </text:list-item>
        <text:list-item>
          <text:p text:style-name="P58">UI</text:p>
        </text:list-item>
        <text:list-item>
          <text:p text:style-name="P58">Business services</text:p>
        </text:list-item>
      </text:list>
      <text:p text:style-name="Text_20_body">They represent the persistence layer only.</text:p>
      <text:p text:style-name="Horizontal_20_Line"/>
      <text:h text:style-name="Heading_20_1" text:outline-level="1">3.10 Import Direction</text:h>
      <text:p text:style-name="Text_20_body">Dependencies should flow in one direction.</text:p>
      <text:p text:style-name="Preformatted_20_Text"><text:span text:style-name="Source_20_Text">UI</text:span></text:p>
      <text:p text:style-name="Preformatted_20_Text"/>
      <text:p text:style-name="Preformatted_20_Text"><text:span text:style-name="Source_20_Text">↓</text:span></text:p>
      <text:p text:style-name="Preformatted_20_Text"/>
      <text:p text:style-name="Preformatted_20_Text"><text:span text:style-name="Source_20_Text">Hooks</text:span></text:p>
      <text:p text:style-name="Preformatted_20_Text"/>
      <text:p text:style-name="Preformatted_20_Text"><text:span text:style-name="Source_20_Text">↓</text:span></text:p>
      <text:p text:style-name="Preformatted_20_Text"/>
      <text:p text:style-name="Preformatted_20_Text"><text:span text:style-name="Source_20_Text">Services</text:span></text:p>
      <text:p text:style-name="Preformatted_20_Text"/>
      <text:p text:style-name="Preformatted_20_Text"><text:span text:style-name="Source_20_Text">↓</text:span></text:p>
      <text:p text:style-name="Preformatted_20_Text"/>
      <text:p text:style-name="Preformatted_20_Text"><text:span text:style-name="Source_20_Text">API</text:span></text:p>
      <text:p text:style-name="Preformatted_20_Text"/>
      <text:p text:style-name="Preformatted_20_Text"><text:span text:style-name="Source_20_Text">↓</text:span></text:p>
      <text:p text:style-name="Preformatted_20_Text"/>
      <text:p text:style-name="Preformatted_20_Text"><text:span text:style-name="Source_20_Text">Backend</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Services</text:span></text:p>
      <text:p text:style-name="Preformatted_20_Text"/>
      <text:p text:style-name="Preformatted_20_Text"><text:span text:style-name="Source_20_Text">↓</text:span></text:p>
      <text:p text:style-name="Preformatted_20_Text"/>
      <text:p text:style-name="Preformatted_20_Text"><text:span text:style-name="Source_20_Text">Models</text:span></text:p>
      <text:p text:style-name="Preformatted_20_Text"/>
      <text:p text:style-name="Preformatted_20_Text"><text:span text:style-name="Source_20_Text">↓</text:span></text:p>
      <text:p text:style-name="Preformatted_20_Text"/>
      <text:p text:style-name="P1"><text:span text:style-name="Source_20_Text">Database</text:span></text:p>
      <text:p text:style-name="Text_20_body">Reverse dependencies should be avoided to prevent tight coupling.</text:p>
      <text:p text:style-name="Horizontal_20_Line"/>
      <text:h text:style-name="Heading_20_1" text:outline-level="1">3.11 Module Boundaries</text:h>
      <text:p text:style-name="Text_20_body">Each feature defines a clear boundary.</text:p>
      <text:p text:style-name="Text_20_body">For example, the Search module owns:</text:p>
      <text:list text:style-name="L58">
        <text:list-item>
          <text:p text:style-name="P59">Search components</text:p>
        </text:list-item>
        <text:list-item>
          <text:p text:style-name="P59">Search hooks</text:p>
        </text:list-item>
        <text:list-item>
          <text:p text:style-name="P59">Search API calls</text:p>
        </text:list-item>
        <text:list-item>
          <text:p text:style-name="P59">Search state</text:p>
        </text:list-item>
        <text:list-item>
          <text:p text:style-name="P59">Search validation</text:p>
        </text:list-item>
        <text:list-item>
          <text:p text:style-name="P59">Search services</text:p>
        </text:list-item>
      </text:list>
      <text:p text:style-name="Text_20_body">Other modules should interact through public interfaces rather than accessing internal implementation details.</text:p>
      <text:p text:style-name="Horizontal_20_Line"/>
      <text:h text:style-name="Heading_20_1" text:outline-level="1">3.12 Scalability Strategy</text:h>
      <text:p text:style-name="Text_20_body">As the application grows, new functionality should be introduced by adding new modules rather than modifying unrelated directories.</text:p>
      <text:p text:style-name="Text_20_body">For example, adding a Notifications feature might involve:</text:p>
      <text:p text:style-name="Preformatted_20_Text"><text:span text:style-name="Source_20_Text">features/notifications/</text:span></text:p>
      <text:p text:style-name="Preformatted_20_Text"><text:span text:style-name="Source_20_Text">controllers/notifications/</text:span></text:p>
      <text:p text:style-name="Preformatted_20_Text"><text:span text:style-name="Source_20_Text">services/notifications/</text:span></text:p>
      <text:p text:style-name="Preformatted_20_Text"><text:span text:style-name="Source_20_Text">routes/notifications/</text:span></text:p>
      <text:p text:style-name="P1"><text:span text:style-name="Source_20_Text">models/Notification/</text:span></text:p>
      <text:p text:style-name="Text_20_body">This approach minimizes regression risk and preserves modularity.</text:p>
      <text:p text:style-name="Horizontal_20_Line"/>
      <text:h text:style-name="Heading_20_1" text:outline-level="1"><text:soft-page-break/>3.13 Common Organizational Mistakes</text:h>
      <text:p text:style-name="Text_20_body">Common issues in large projects include:</text:p>
      <text:list text:style-name="L59">
        <text:list-item>
          <text:p text:style-name="P60">Business logic inside UI components</text:p>
        </text:list-item>
        <text:list-item>
          <text:p text:style-name="P60">Database queries inside controllers</text:p>
        </text:list-item>
        <text:list-item>
          <text:p text:style-name="P60">Circular dependencies</text:p>
        </text:list-item>
        <text:list-item>
          <text:p text:style-name="P60">Duplicate utility functions</text:p>
        </text:list-item>
        <text:list-item>
          <text:p text:style-name="P60">Deep relative imports</text:p>
        </text:list-item>
        <text:list-item>
          <text:p text:style-name="P60">Inconsistent naming</text:p>
        </text:list-item>
        <text:list-item>
          <text:p text:style-name="P60">Mixing client and server concerns</text:p>
        </text:list-item>
      </text:list>
      <text:p text:style-name="Text_20_body">The current folder organization is designed to prevent these problems through clear ownership and dependency rules.</text:p>
      <text:p text:style-name="Horizontal_20_Line"/>
      <text:h text:style-name="Heading_20_1" text:outline-level="1">3.14 Benefits of the Structure</text:h>
      <text:p text:style-name="Text_20_body">The adopted organization provides several advantages:</text:p>
      <text:list text:style-name="L60">
        <text:list-item>
          <text:p text:style-name="P61">Improved readability</text:p>
        </text:list-item>
        <text:list-item>
          <text:p text:style-name="P61">Faster onboarding for new developers</text:p>
        </text:list-item>
        <text:list-item>
          <text:p text:style-name="P61">Easier debugging</text:p>
        </text:list-item>
        <text:list-item>
          <text:p text:style-name="P61">Clear responsibility boundaries</text:p>
        </text:list-item>
        <text:list-item>
          <text:p text:style-name="P61">Simplified testing</text:p>
        </text:list-item>
        <text:list-item>
          <text:p text:style-name="P61">Better code reuse</text:p>
        </text:list-item>
        <text:list-item>
          <text:p text:style-name="P61">Reduced coupling</text:p>
        </text:list-item>
        <text:list-item>
          <text:p text:style-name="P61">Enhanced scalability</text:p>
        </text:list-item>
        <text:list-item>
          <text:p text:style-name="P61">Predictable project navigation</text:p>
        </text:list-item>
      </text:list>
      <text:p text:style-name="Text_20_body">These benefits become increasingly valuable as the codebase expands.</text:p>
      <text:p text:style-name="Horizontal_20_Line"/>
      <text:h text:style-name="Heading_20_1" text:outline-level="1">3.15 Chapter Summary</text:h>
      <text:p text:style-name="Text_20_body">The folder structure reflects the architectural principles of the Search System. By organizing the codebase around clear responsibilities, layered dependencies, and feature isolation, the project remains maintainable and scalable as new functionality is introduced.</text:p>
      <text:p text:style-name="Text_20_body"><text:soft-page-break/>Rather than serving as a simple directory listing, the folder structure defines how developers interact with the codebase, where new functionality belongs, and how modules collaborate while preserving architectural integrity.</text:p>
      <text:p text:style-name="Text_20_body">The next chapter examines the internal workings of the authentication subsystem, following the complete lifecycle from user login and JWT generation to request authorization and session management.</text:p>
      <text:p text:style-name="Text_20_body">The next chapter is <text:span text:style-name="Strong_20_Emphasis">Chapter 4 – Authentication Internal Working</text:span>, where we'll trace the entire authentication flow end to end: user registration, login, password hashing, JWT creation, token storage, protected routes, middleware validation, token refresh strategy, logout, expiration handling, security considerations, and the runtime sequence for every authenticated request. This chapter will form the foundation for all security-related chapters later in the documentation.</text:p>
      <text:h text:style-name="Heading_20_3" text:outline-level="3">Volume 2 — Internal Working</text:h>
      <text:h text:style-name="Heading_20_2" text:outline-level="2">Chapter 4 — Authentication Internal Working</text:h>
      <text:h text:style-name="Heading_20_1" text:outline-level="1">Chapter 4 — Authentication Internal Working</text:h>
      <text:h text:style-name="Heading_20_2" text:outline-level="2">4.1 Purpose</text:h>
      <text:p text:style-name="Text_20_body">Authentication is the mechanism that verifies a user's identity before granting access to protected resources. It is one of the most critical runtime subsystems because nearly every request depends on it.</text:p>
      <text:p text:style-name="Text_20_body">This chapter explains how authentication operates internally within the Search System. Rather than focusing on implementation details, it describes the complete execution lifecycle—from the moment a user submits credentials to the authorization of subsequent API requests.</text:p>
      <text:p text:style-name="Text_20_body">The concepts presented here establish the foundation for later chapters covering request processing, authorization, API communication, and security.</text:p>
      <text:p text:style-name="Horizontal_20_Line"/>
      <text:h text:style-name="Heading_20_1" text:outline-level="1">4.2 Authentication Goals</text:h>
      <text:p text:style-name="Text_20_body">The authentication subsystem is designed to achieve several objectives:</text:p>
      <text:list text:style-name="L61">
        <text:list-item>
          <text:p text:style-name="P62">Verify user identity securely.</text:p>
        </text:list-item>
        <text:list-item>
          <text:p text:style-name="P62">Protect restricted application resources.</text:p>
        </text:list-item>
        <text:list-item>
          <text:p text:style-name="P62">Maintain authenticated sessions across requests.</text:p>
        </text:list-item>
        <text:list-item>
          <text:p text:style-name="P62">Prevent unauthorized access.</text:p>
        </text:list-item>
        <text:list-item>
          <text:p text:style-name="P62">Minimize sensitive data exposure.</text:p>
        </text:list-item>
        <text:list-item>
          <text:p text:style-name="P62">Provide a consistent authentication experience.</text:p>
        </text:list-item>
        <text:list-item>
          <text:p text:style-name="P62"><text:soft-page-break/>Support future enhancements such as refresh tokens, multi-factor authentication (MFA), and external identity providers.</text:p>
        </text:list-item>
      </text:list>
      <text:p text:style-name="Text_20_body">These goals guide the design of the authentication lifecycle.</text:p>
      <text:p text:style-name="Horizontal_20_Line"/>
      <text:h text:style-name="Heading_20_1" text:outline-level="1">4.3 Authentication Components</text:h>
      <text:p text:style-name="Text_20_body">The authentication process involves multiple cooperating components.</text:p>
      <text:h text:style-name="Heading_20_2" text:outline-level="2">Frontend Components</text:h>
      <text:p text:style-name="Text_20_body">The frontend is responsible for:</text:p>
      <text:list text:style-name="L62">
        <text:list-item>
          <text:p text:style-name="P63">Collecting user credentials.</text:p>
        </text:list-item>
        <text:list-item>
          <text:p text:style-name="P63">Performing client-side validation.</text:p>
        </text:list-item>
        <text:list-item>
          <text:p text:style-name="P63">Sending authentication requests.</text:p>
        </text:list-item>
        <text:list-item>
          <text:p text:style-name="P63">Managing authentication state.</text:p>
        </text:list-item>
        <text:list-item>
          <text:p text:style-name="P63">Updating the user interface.</text:p>
        </text:list-item>
        <text:list-item>
          <text:p text:style-name="P63">Redirecting users after login or logout.</text:p>
        </text:list-item>
      </text:list>
      <text:p text:style-name="Text_20_body">The frontend never validates credentials itself; all identity verification occurs on the backend.</text:p>
      <text:p text:style-name="Horizontal_20_Line"/>
      <text:h text:style-name="Heading_20_2" text:outline-level="2">API Layer</text:h>
      <text:p text:style-name="Text_20_body">The API layer transports authentication requests between the frontend and backend.</text:p>
      <text:p text:style-name="Text_20_body">Typical responsibilities include:</text:p>
      <text:list text:style-name="L63">
        <text:list-item>
          <text:p text:style-name="P64">Sending login requests.</text:p>
        </text:list-item>
        <text:list-item>
          <text:p text:style-name="P64">Attaching authentication headers.</text:p>
        </text:list-item>
        <text:list-item>
          <text:p text:style-name="P64">Handling authentication errors.</text:p>
        </text:list-item>
        <text:list-item>
          <text:p text:style-name="P64">Managing retry behavior where appropriate.</text:p>
        </text:list-item>
      </text:list>
      <text:p text:style-name="Text_20_body">The API layer does not implement authentication logic; it simply facilitates communication.</text:p>
      <text:p text:style-name="Horizontal_20_Line"/>
      <text:h text:style-name="Heading_20_2" text:outline-level="2">Authentication Middleware</text:h>
      <text:p text:style-name="Text_20_body">Middleware validates every protected request before it reaches the business logic.</text:p>
      <text:p text:style-name="Text_20_body">Responsibilities include:</text:p>
      <text:list text:style-name="L64">
        <text:list-item>
          <text:p text:style-name="P65">Reading authentication tokens.</text:p>
        </text:list-item>
        <text:list-item>
          <text:p text:style-name="P65"><text:soft-page-break/>Verifying token integrity.</text:p>
        </text:list-item>
        <text:list-item>
          <text:p text:style-name="P65">Checking token expiration.</text:p>
        </text:list-item>
        <text:list-item>
          <text:p text:style-name="P65">Identifying the authenticated user.</text:p>
        </text:list-item>
        <text:list-item>
          <text:p text:style-name="P65">Rejecting unauthorized requests.</text:p>
        </text:list-item>
      </text:list>
      <text:p text:style-name="Text_20_body">This centralized validation ensures consistent protection across all endpoints.</text:p>
      <text:p text:style-name="Horizontal_20_Line"/>
      <text:h text:style-name="Heading_20_2" text:outline-level="2">Authentication Service</text:h>
      <text:p text:style-name="Text_20_body">The authentication service contains the business logic for:</text:p>
      <text:list text:style-name="L65">
        <text:list-item>
          <text:p text:style-name="P66">User registration.</text:p>
        </text:list-item>
        <text:list-item>
          <text:p text:style-name="P66">Login.</text:p>
        </text:list-item>
        <text:list-item>
          <text:p text:style-name="P66">Password verification.</text:p>
        </text:list-item>
        <text:list-item>
          <text:p text:style-name="P66">JWT generation.</text:p>
        </text:list-item>
        <text:list-item>
          <text:p text:style-name="P66">Session termination.</text:p>
        </text:list-item>
        <text:list-item>
          <text:p text:style-name="P66">Password changes.</text:p>
        </text:list-item>
        <text:list-item>
          <text:p text:style-name="P66">Future token refresh workflows.</text:p>
        </text:list-item>
      </text:list>
      <text:p text:style-name="Text_20_body">Separating this logic from controllers improves maintainability and testability.</text:p>
      <text:p text:style-name="Horizontal_20_Line"/>
      <text:h text:style-name="Heading_20_2" text:outline-level="2">Database</text:h>
      <text:p text:style-name="Text_20_body">Persistent authentication data includes:</text:p>
      <text:list text:style-name="L66">
        <text:list-item>
          <text:p text:style-name="P67">User accounts.</text:p>
        </text:list-item>
        <text:list-item>
          <text:p text:style-name="P67">Password hashes.</text:p>
        </text:list-item>
        <text:list-item>
          <text:p text:style-name="P67">Roles.</text:p>
        </text:list-item>
        <text:list-item>
          <text:p text:style-name="P67">Account status.</text:p>
        </text:list-item>
        <text:list-item>
          <text:p text:style-name="P67">Creation timestamps.</text:p>
        </text:list-item>
        <text:list-item>
          <text:p text:style-name="P67">Login metadata (if recorded).</text:p>
        </text:list-item>
      </text:list>
      <text:p text:style-name="Text_20_body">Passwords are never stored in plaintext.</text:p>
      <text:p text:style-name="Horizontal_20_Line"/>
      <text:h text:style-name="Heading_20_1" text:outline-level="1">4.4 Authentication Lifecycle Overview</text:h>
      <text:p text:style-name="Text_20_body">The authentication lifecycle consists of several distinct stages:</text:p>
      <text:list text:style-name="L67">
        <text:list-item>
          <text:p text:style-name="P68">User submits credentials.</text:p>
        </text:list-item>
        <text:list-item>
          <text:p text:style-name="P68"><text:soft-page-break/>Frontend validates input.</text:p>
        </text:list-item>
        <text:list-item>
          <text:p text:style-name="P68">Credentials are sent to the backend.</text:p>
        </text:list-item>
        <text:list-item>
          <text:p text:style-name="P68">Backend validates the request.</text:p>
        </text:list-item>
        <text:list-item>
          <text:p text:style-name="P68">User record is retrieved.</text:p>
        </text:list-item>
        <text:list-item>
          <text:p text:style-name="P68">Password hash is verified.</text:p>
        </text:list-item>
        <text:list-item>
          <text:p text:style-name="P68">JWT is generated.</text:p>
        </text:list-item>
        <text:list-item>
          <text:p text:style-name="P68">Authentication response is returned.</text:p>
        </text:list-item>
        <text:list-item>
          <text:p text:style-name="P68">Frontend stores authentication state.</text:p>
        </text:list-item>
        <text:list-item>
          <text:p text:style-name="P68">Subsequent requests include the token.</text:p>
        </text:list-item>
        <text:list-item>
          <text:p text:style-name="P68">Middleware validates each request.</text:p>
        </text:list-item>
        <text:list-item>
          <text:p text:style-name="P68">Authorized business logic executes.</text:p>
        </text:list-item>
        <text:list-item>
          <text:p text:style-name="P68">Logout or token expiration ends the session.</text:p>
        </text:list-item>
      </text:list>
      <text:p text:style-name="Text_20_body">Each stage has a well-defined responsibility.</text:p>
      <text:p text:style-name="Horizontal_20_Line"/>
      <text:h text:style-name="Heading_20_1" text:outline-level="1">4.5 User Registration Flow</text:h>
      <text:p text:style-name="Text_20_body">When a new user registers:</text:p>
      <text:list text:style-name="L68">
        <text:list-item>
          <text:p text:style-name="P69">Registration form is completed.</text:p>
        </text:list-item>
        <text:list-item>
          <text:p text:style-name="P69">Client-side validation checks required fields.</text:p>
        </text:list-item>
        <text:list-item>
          <text:p text:style-name="P69">Registration request is sent.</text:p>
        </text:list-item>
        <text:list-item>
          <text:p text:style-name="P69">Backend validates request format.</text:p>
        </text:list-item>
        <text:list-item>
          <text:p text:style-name="P69">Existing account lookup is performed.</text:p>
        </text:list-item>
        <text:list-item>
          <text:p text:style-name="P69">Password is securely hashed.</text:p>
        </text:list-item>
        <text:list-item>
          <text:p text:style-name="P69">User document is created.</text:p>
        </text:list-item>
        <text:list-item>
          <text:p text:style-name="P69">Database stores the new account.</text:p>
        </text:list-item>
        <text:list-item>
          <text:p text:style-name="P69">Success response is returned.</text:p>
        </text:list-item>
        <text:list-item>
          <text:p text:style-name="P69">User proceeds to login or is automatically authenticated, depending on application policy.</text:p>
        </text:list-item>
      </text:list>
      <text:p text:style-name="Text_20_body">Registration establishes a new identity but does not inherently authorize future requests without valid authentication.</text:p>
      <text:p text:style-name="Horizontal_20_Line"/>
      <text:h text:style-name="Heading_20_1" text:outline-level="1"><text:soft-page-break/>4.6 Login Flow</text:h>
      <text:p text:style-name="Text_20_body">The login process verifies a user's identity.</text:p>
      <text:p text:style-name="Text_20_body">The execution sequence is:</text:p>
      <text:list text:style-name="L69">
        <text:list-item>
          <text:p text:style-name="P70">User enters email and password.</text:p>
        </text:list-item>
        <text:list-item>
          <text:p text:style-name="P70">Form validation executes.</text:p>
        </text:list-item>
        <text:list-item>
          <text:p text:style-name="P70">Credentials are transmitted using HTTPS.</text:p>
        </text:list-item>
        <text:list-item>
          <text:p text:style-name="P70">Backend validates request structure.</text:p>
        </text:list-item>
        <text:list-item>
          <text:p text:style-name="P70">User record is retrieved from MongoDB.</text:p>
        </text:list-item>
        <text:list-item>
          <text:p text:style-name="P70">Password hash comparison is performed.</text:p>
        </text:list-item>
        <text:list-item>
          <text:p text:style-name="P70">Account status is verified.</text:p>
        </text:list-item>
        <text:list-item>
          <text:p text:style-name="P70">JWT is generated upon successful authentication.</text:p>
        </text:list-item>
        <text:list-item>
          <text:p text:style-name="P70">Authentication response is returned.</text:p>
        </text:list-item>
        <text:list-item>
          <text:p text:style-name="P70">Frontend updates authentication state.</text:p>
        </text:list-item>
        <text:list-item>
          <text:p text:style-name="P70">User is redirected to the appropriate page.</text:p>
        </text:list-item>
      </text:list>
      <text:p text:style-name="Text_20_body">If any validation step fails, authentication is rejected.</text:p>
      <text:p text:style-name="Horizontal_20_Line"/>
      <text:h text:style-name="Heading_20_1" text:outline-level="1">4.7 Password Verification</text:h>
      <text:p text:style-name="Text_20_body">Passwords are handled using secure hashing algorithms.</text:p>
      <text:p text:style-name="Text_20_body">The verification process is:</text:p>
      <text:list text:style-name="L70">
        <text:list-item>
          <text:p text:style-name="P71">User submits a plaintext password.</text:p>
        </text:list-item>
        <text:list-item>
          <text:p text:style-name="P71">Backend retrieves the stored password hash.</text:p>
        </text:list-item>
        <text:list-item>
          <text:p text:style-name="P71">Secure comparison is performed using the hashing algorithm.</text:p>
        </text:list-item>
        <text:list-item>
          <text:p text:style-name="P71">Matching hashes confirm identity.</text:p>
        </text:list-item>
        <text:list-item>
          <text:p text:style-name="P71">Non-matching hashes result in authentication failure.</text:p>
        </text:list-item>
      </text:list>
      <text:p text:style-name="Text_20_body">At no point is the original password recoverable from the stored hash.</text:p>
      <text:p text:style-name="Horizontal_20_Line"/>
      <text:h text:style-name="Heading_20_1" text:outline-level="1">4.8 JWT Generation</text:h>
      <text:p text:style-name="Text_20_body">After successful authentication, the backend generates a JSON Web Token (JWT).</text:p>
      <text:p text:style-name="Text_20_body">The token typically contains:</text:p>
      <text:list text:style-name="L71">
        <text:list-item>
          <text:p text:style-name="P72"><text:soft-page-break/>User identifier.</text:p>
        </text:list-item>
        <text:list-item>
          <text:p text:style-name="P72">User role.</text:p>
        </text:list-item>
        <text:list-item>
          <text:p text:style-name="P72">Issued timestamp.</text:p>
        </text:list-item>
        <text:list-item>
          <text:p text:style-name="P72">Expiration timestamp.</text:p>
        </text:list-item>
      </text:list>
      <text:p text:style-name="Text_20_body">The token is digitally signed to prevent tampering. Clients can present the token on future requests, but they cannot modify its contents without invalidating the signature.</text:p>
      <text:p text:style-name="Horizontal_20_Line"/>
      <text:h text:style-name="Heading_20_1" text:outline-level="1">4.9 Authentication State</text:h>
      <text:p text:style-name="Text_20_body">Once authenticated, the frontend maintains authentication state.</text:p>
      <text:p text:style-name="Text_20_body">Typical information includes:</text:p>
      <text:list text:style-name="L72">
        <text:list-item>
          <text:p text:style-name="P73">Login status.</text:p>
        </text:list-item>
        <text:list-item>
          <text:p text:style-name="P73">Current user profile.</text:p>
        </text:list-item>
        <text:list-item>
          <text:p text:style-name="P73">User role.</text:p>
        </text:list-item>
        <text:list-item>
          <text:p text:style-name="P73">Session metadata.</text:p>
        </text:list-item>
        <text:list-item>
          <text:p text:style-name="P73">Token availability.</text:p>
        </text:list-item>
      </text:list>
      <text:p text:style-name="Text_20_body">UI components react to changes in this state to display protected content or redirect unauthenticated users.</text:p>
      <text:p text:style-name="Horizontal_20_Line"/>
      <text:h text:style-name="Heading_20_1" text:outline-level="1">4.10 Protected Request Flow</text:h>
      <text:p text:style-name="Text_20_body">Every protected API request follows a consistent sequence:</text:p>
      <text:list text:style-name="L73">
        <text:list-item>
          <text:p text:style-name="P74">Frontend prepares the request.</text:p>
        </text:list-item>
        <text:list-item>
          <text:p text:style-name="P74">Authentication token is attached.</text:p>
        </text:list-item>
        <text:list-item>
          <text:p text:style-name="P74">Request reaches Express.</text:p>
        </text:list-item>
        <text:list-item>
          <text:p text:style-name="P74">Authentication middleware executes.</text:p>
        </text:list-item>
        <text:list-item>
          <text:p text:style-name="P74">Token signature is verified.</text:p>
        </text:list-item>
        <text:list-item>
          <text:p text:style-name="P74">Expiration is checked.</text:p>
        </text:list-item>
        <text:list-item>
          <text:p text:style-name="P74">User identity is extracted.</text:p>
        </text:list-item>
        <text:list-item>
          <text:p text:style-name="P74">Request context is enriched with user information.</text:p>
        </text:list-item>
        <text:list-item>
          <text:p text:style-name="P74">Controller executes authorized logic.</text:p>
        </text:list-item>
        <text:list-item>
          <text:p text:style-name="P74">Response is returned to the client.</text:p>
        </text:list-item>
      </text:list>
      <text:p text:style-name="Text_20_body">This process occurs transparently for each protected endpoint.</text:p>
      <text:p text:style-name="Horizontal_20_Line"><text:soft-page-break/></text:p>
      <text:h text:style-name="Heading_20_1" text:outline-level="1">4.11 Authorization</text:h>
      <text:p text:style-name="Text_20_body">Authentication and authorization serve different purposes.</text:p>
      <text:p text:style-name="Text_20_body">Authentication answers:</text:p>
      <text:p text:style-name="Text_20_body">"Who is the user?"</text:p>
      <text:p text:style-name="Text_20_body">Authorization answers:</text:p>
      <text:p text:style-name="Text_20_body">"What is the user allowed to do?"</text:p>
      <text:p text:style-name="Text_20_body">After authentication succeeds, authorization determines whether the authenticated user has permission to perform the requested operation.</text:p>
      <text:p text:style-name="Text_20_body">Authorization decisions may consider:</text:p>
      <text:list text:style-name="L74">
        <text:list-item>
          <text:p text:style-name="P75">User role.</text:p>
        </text:list-item>
        <text:list-item>
          <text:p text:style-name="P75">Resource ownership.</text:p>
        </text:list-item>
        <text:list-item>
          <text:p text:style-name="P75">Application policies.</text:p>
        </text:list-item>
        <text:list-item>
          <text:p text:style-name="P75">Administrative privileges.</text:p>
        </text:list-item>
      </text:list>
      <text:p text:style-name="Text_20_body">Separating these concerns simplifies both security and maintainability.</text:p>
      <text:p text:style-name="Horizontal_20_Line"/>
      <text:h text:style-name="Heading_20_1" text:outline-level="1">4.12 Token Expiration</text:h>
      <text:p text:style-name="Text_20_body">Authentication tokens have a limited lifetime.</text:p>
      <text:p text:style-name="Text_20_body">When a token expires:</text:p>
      <text:list text:style-name="L75">
        <text:list-item>
          <text:p text:style-name="P76">Middleware detects expiration.</text:p>
        </text:list-item>
        <text:list-item>
          <text:p text:style-name="P76">Protected requests are rejected.</text:p>
        </text:list-item>
        <text:list-item>
          <text:p text:style-name="P76">Frontend receives an authentication error.</text:p>
        </text:list-item>
        <text:list-item>
          <text:p text:style-name="P76">User may be redirected to login or a refresh workflow may be initiated, depending on the application's design.</text:p>
        </text:list-item>
      </text:list>
      <text:p text:style-name="Text_20_body">Short-lived tokens reduce the impact of token compromise.</text:p>
      <text:p text:style-name="Horizontal_20_Line"/>
      <text:h text:style-name="Heading_20_1" text:outline-level="1">4.13 Logout Flow</text:h>
      <text:p text:style-name="Text_20_body">Logout terminates the authenticated session.</text:p>
      <text:p text:style-name="Text_20_body">Typical sequence:</text:p>
      <text:list text:style-name="L76">
        <text:list-item>
          <text:p text:style-name="P77">User initiates logout.</text:p>
        </text:list-item>
        <text:list-item>
          <text:p text:style-name="P77"><text:soft-page-break/>Frontend clears authentication state.</text:p>
        </text:list-item>
        <text:list-item>
          <text:p text:style-name="P77">Stored token is removed.</text:p>
        </text:list-item>
        <text:list-item>
          <text:p text:style-name="P77">Cached user-specific data is invalidated.</text:p>
        </text:list-item>
        <text:list-item>
          <text:p text:style-name="P77">Protected routes become inaccessible.</text:p>
        </text:list-item>
        <text:list-item>
          <text:p text:style-name="P77">User is redirected to the login page or public area.</text:p>
        </text:list-item>
      </text:list>
      <text:p text:style-name="Text_20_body">If server-side session invalidation is implemented in the future, the backend will also revoke active sessions.</text:p>
      <text:p text:style-name="Horizontal_20_Line"/>
      <text:h text:style-name="Heading_20_1" text:outline-level="1">4.14 Authentication Error Handling</text:h>
      <text:p text:style-name="Text_20_body">Common authentication failures include:</text:p>
      <text:list text:style-name="L77">
        <text:list-item>
          <text:p text:style-name="P78">Invalid credentials.</text:p>
        </text:list-item>
        <text:list-item>
          <text:p text:style-name="P78">Missing token.</text:p>
        </text:list-item>
        <text:list-item>
          <text:p text:style-name="P78">Expired token.</text:p>
        </text:list-item>
        <text:list-item>
          <text:p text:style-name="P78">Invalid token signature.</text:p>
        </text:list-item>
        <text:list-item>
          <text:p text:style-name="P78">Disabled account.</text:p>
        </text:list-item>
        <text:list-item>
          <text:p text:style-name="P78">Deleted account.</text:p>
        </text:list-item>
        <text:list-item>
          <text:p text:style-name="P78">Malformed request.</text:p>
        </text:list-item>
      </text:list>
      <text:p text:style-name="Text_20_body">Each failure results in an appropriate response without exposing sensitive implementation details.</text:p>
      <text:p text:style-name="Horizontal_20_Line"/>
      <text:h text:style-name="Heading_20_1" text:outline-level="1">4.15 Security Considerations</text:h>
      <text:p text:style-name="Text_20_body">The authentication subsystem incorporates several security practices:</text:p>
      <text:list text:style-name="L78">
        <text:list-item>
          <text:p text:style-name="P79">Password hashing.</text:p>
        </text:list-item>
        <text:list-item>
          <text:p text:style-name="P79">HTTPS transport.</text:p>
        </text:list-item>
        <text:list-item>
          <text:p text:style-name="P79">Digitally signed JWTs.</text:p>
        </text:list-item>
        <text:list-item>
          <text:p text:style-name="P79">Input validation.</text:p>
        </text:list-item>
        <text:list-item>
          <text:p text:style-name="P79">Consistent error responses.</text:p>
        </text:list-item>
        <text:list-item>
          <text:p text:style-name="P79">Minimal exposure of user information.</text:p>
        </text:list-item>
        <text:list-item>
          <text:p text:style-name="P79">Secure handling of authentication state.</text:p>
        </text:list-item>
      </text:list>
      <text:p text:style-name="Text_20_body">Future enhancements may include:</text:p>
      <text:list text:style-name="L79">
        <text:list-item>
          <text:p text:style-name="P80">Refresh tokens.</text:p>
        </text:list-item>
        <text:list-item>
          <text:p text:style-name="P80"><text:soft-page-break/>Multi-factor authentication.</text:p>
        </text:list-item>
        <text:list-item>
          <text:p text:style-name="P80">Device recognition.</text:p>
        </text:list-item>
        <text:list-item>
          <text:p text:style-name="P80">Session management.</text:p>
        </text:list-item>
        <text:list-item>
          <text:p text:style-name="P80">Account lockout policies.</text:p>
        </text:list-item>
      </text:list>
      <text:p text:style-name="Horizontal_20_Line"/>
      <text:h text:style-name="Heading_20_1" text:outline-level="1">4.16 Runtime Interaction with Other Modules</text:h>
      <text:p text:style-name="Text_20_body">Authentication interacts with multiple subsystems.</text:p>
      <text:list text:style-name="L80">
        <text:list-item>
          <text:p text:style-name="P81"><text:span text:style-name="Strong_20_Emphasis">Routing:</text:span> Determines access to protected pages.</text:p>
        </text:list-item>
        <text:list-item>
          <text:p text:style-name="P81"><text:span text:style-name="Strong_20_Emphasis">State Management:</text:span> Maintains login status and user information.</text:p>
        </text:list-item>
        <text:list-item>
          <text:p text:style-name="P81"><text:span text:style-name="Strong_20_Emphasis">TanStack Query:</text:span> Fetches authenticated server data.</text:p>
        </text:list-item>
        <text:list-item>
          <text:p text:style-name="P81"><text:span text:style-name="Strong_20_Emphasis">Controllers:</text:span> Receive authenticated user context.</text:p>
        </text:list-item>
        <text:list-item>
          <text:p text:style-name="P81"><text:span text:style-name="Strong_20_Emphasis">Services:</text:span> Apply authorization rules.</text:p>
        </text:list-item>
        <text:list-item>
          <text:p text:style-name="P81"><text:span text:style-name="Strong_20_Emphasis">Database:</text:span> Stores account information.</text:p>
        </text:list-item>
        <text:list-item>
          <text:p text:style-name="P81"><text:span text:style-name="Strong_20_Emphasis">Logging:</text:span> Records authentication events.</text:p>
        </text:list-item>
      </text:list>
      <text:p text:style-name="Text_20_body">Because authentication sits near the beginning of the request lifecycle, it influences nearly every protected operation within the application.</text:p>
      <text:p text:style-name="Horizontal_20_Line"/>
      <text:h text:style-name="Heading_20_1" text:outline-level="1">4.17 Common Failure Scenarios</text:h>
      <text:p text:style-name="Text_20_body">Typical runtime issues include:</text:p>
      <text:list text:style-name="L81">
        <text:list-item>
          <text:p text:style-name="P82">Token expiration during active use.</text:p>
        </text:list-item>
        <text:list-item>
          <text:p text:style-name="P82">Missing authentication headers.</text:p>
        </text:list-item>
        <text:list-item>
          <text:p text:style-name="P82">Incorrect password submission.</text:p>
        </text:list-item>
        <text:list-item>
          <text:p text:style-name="P82">Network interruption during login.</text:p>
        </text:list-item>
        <text:list-item>
          <text:p text:style-name="P82">Corrupted client-side authentication state.</text:p>
        </text:list-item>
        <text:list-item>
          <text:p text:style-name="P82">Revoked or disabled user accounts.</text:p>
        </text:list-item>
      </text:list>
      <text:p text:style-name="Text_20_body">The system should handle these scenarios predictably, providing meaningful feedback while preserving security.</text:p>
      <text:p text:style-name="Horizontal_20_Line"/>
      <text:h text:style-name="Heading_20_1" text:outline-level="1"><text:soft-page-break/>4.18 Future Evolution</text:h>
      <text:p text:style-name="Text_20_body">The authentication architecture is designed for future enhancements without requiring major structural changes.</text:p>
      <text:p text:style-name="Text_20_body">Potential additions include:</text:p>
      <text:list text:style-name="L82">
        <text:list-item>
          <text:p text:style-name="P83">Refresh token rotation.</text:p>
        </text:list-item>
        <text:list-item>
          <text:p text:style-name="P83">OAuth providers.</text:p>
        </text:list-item>
        <text:list-item>
          <text:p text:style-name="P83">Single Sign-On (SSO).</text:p>
        </text:list-item>
        <text:list-item>
          <text:p text:style-name="P83">Multi-factor authentication.</text:p>
        </text:list-item>
        <text:list-item>
          <text:p text:style-name="P83">Password reset workflows.</text:p>
        </text:list-item>
        <text:list-item>
          <text:p text:style-name="P83">Session revocation across devices.</text:p>
        </text:list-item>
        <text:list-item>
          <text:p text:style-name="P83">Fine-grained permission models.</text:p>
        </text:list-item>
        <text:list-item>
          <text:p text:style-name="P83">Audit trails for authentication events.</text:p>
        </text:list-item>
      </text:list>
      <text:p text:style-name="Text_20_body">These capabilities can be integrated while preserving the existing authentication lifecycle.</text:p>
      <text:p text:style-name="Horizontal_20_Line"/>
      <text:h text:style-name="Heading_20_1" text:outline-level="1">4.19 Chapter Summary</text:h>
      <text:p text:style-name="Text_20_body">Authentication is the entry point to all protected functionality within the Search System. It verifies user identity, establishes authenticated sessions, and enables secure access to application resources through JWT-based authentication and middleware validation.</text:p>
      <text:p text:style-name="Text_20_body">By separating authentication, authorization, request validation, and business logic into distinct responsibilities, the system remains secure, maintainable, and extensible. This runtime model serves as the basis for the request processing pipeline discussed in subsequent chapters.</text:p>
      <text:p text:style-name="Text_20_body">The next chapter examines the <text:span text:style-name="Strong_20_Emphasis">JWT Lifecycle</text:span>, tracing the complete journey of a token—from creation and transmission to validation, expiration, renewal strategies, and eventual invalidation—providing a deeper understanding of the mechanism that underpins authenticated communication throughout the application.</text:p>
      <text:h text:style-name="Heading_20_3" text:outline-level="3"><text:soft-page-break/>Volume 2 — Internal Working</text:h>
      <text:h text:style-name="Heading_20_2" text:outline-level="2">Chapter 5 — JWT Lifecycle</text:h>
      <text:h text:style-name="Heading_20_1" text:outline-level="1">Chapter 5 — JWT Lifecycle</text:h>
      <text:h text:style-name="Heading_20_2" text:outline-level="2">5.1 Purpose</text:h>
      <text:p text:style-name="Text_20_body">JSON Web Tokens (JWTs) are the foundation of authenticated communication within the Search System. They provide a secure and stateless mechanism for verifying user identity across multiple HTTP requests without requiring the server to maintain session state.</text:p>
      <text:p text:style-name="Text_20_body">While the previous chapter explained the complete authentication process, this chapter focuses specifically on the lifecycle of a JWT. It follows the token from its creation during login to its validation on every protected request, its expiration, and its eventual replacement or invalidation.</text:p>
      <text:p text:style-name="Text_20_body">Understanding this lifecycle is essential for debugging authentication issues, designing secure APIs, and implementing scalable authentication systems.</text:p>
      <text:p text:style-name="Horizontal_20_Line"/>
      <text:h text:style-name="Heading_20_1" text:outline-level="1">5.2 Why JWT is Used</text:h>
      <text:p text:style-name="Text_20_body">Traditional session-based authentication stores session information on the server.</text:p>
      <text:p text:style-name="Text_20_body">Example:</text:p>
      <text:p text:style-name="Preformatted_20_Text"><text:span text:style-name="Source_20_Text">Browser</text:span></text:p>
      <text:p text:style-name="Preformatted_20_Text"><text:span text:style-name="Source_20_Text"><text:s text:c="6"/>↓</text:span></text:p>
      <text:p text:style-name="Preformatted_20_Text"><text:span text:style-name="Source_20_Text">Session ID</text:span></text:p>
      <text:p text:style-name="Preformatted_20_Text"><text:span text:style-name="Source_20_Text"><text:s text:c="6"/>↓</text:span></text:p>
      <text:p text:style-name="Preformatted_20_Text"><text:span text:style-name="Source_20_Text">Server Session Store</text:span></text:p>
      <text:p text:style-name="Preformatted_20_Text"><text:span text:style-name="Source_20_Text"><text:s text:c="6"/>↓</text:span></text:p>
      <text:p text:style-name="P1"><text:span text:style-name="Source_20_Text">User Data</text:span></text:p>
      <text:p text:style-name="Text_20_body">In contrast, JWT authentication is stateless.</text:p>
      <text:p text:style-name="Text_20_body">Example:</text:p>
      <text:p text:style-name="Preformatted_20_Text"><text:span text:style-name="Source_20_Text">Browser</text:span></text:p>
      <text:p text:style-name="Preformatted_20_Text"><text:span text:style-name="Source_20_Text"><text:s text:c="6"/>↓</text:span></text:p>
      <text:p text:style-name="Preformatted_20_Text"><text:span text:style-name="Source_20_Text">JWT</text:span></text:p>
      <text:p text:style-name="Preformatted_20_Text"><text:span text:style-name="Source_20_Text"><text:s text:c="6"/>↓</text:span></text:p>
      <text:p text:style-name="Preformatted_20_Text"><text:span text:style-name="Source_20_Text">Backend</text:span></text:p>
      <text:p text:style-name="Preformatted_20_Text"><text:span text:style-name="Source_20_Text"><text:s text:c="6"/>↓</text:span></text:p>
      <text:p text:style-name="Preformatted_20_Text"><text:span text:style-name="Source_20_Text">Verify Signature</text:span></text:p>
      <text:p text:style-name="Preformatted_20_Text"><text:span text:style-name="Source_20_Text"><text:s text:c="6"/>↓</text:span></text:p>
      <text:p text:style-name="P1"><text:span text:style-name="Source_20_Text">User Identity</text:span></text:p>
      <text:p text:style-name="Text_20_body">Because the server does not maintain session data for every logged-in user, horizontal scaling becomes significantly simpler.</text:p>
      <text:p text:style-name="Horizontal_20_Line"/>
      <text:h text:style-name="Heading_20_1" text:outline-level="1"><text:soft-page-break/>5.3 JWT Structure</text:h>
      <text:p text:style-name="Text_20_body">A JWT consists of three encoded sections.</text:p>
      <text:p text:style-name="Preformatted_20_Text"><text:span text:style-name="Source_20_Text">Header</text:span></text:p>
      <text:p text:style-name="Preformatted_20_Text"><text:span text:style-name="Source_20_Text"><text:s text:c="6"/>.</text:span></text:p>
      <text:p text:style-name="Preformatted_20_Text"><text:span text:style-name="Source_20_Text">Payload</text:span></text:p>
      <text:p text:style-name="Preformatted_20_Text"><text:span text:style-name="Source_20_Text"><text:s text:c="6"/>.</text:span></text:p>
      <text:p text:style-name="P1"><text:span text:style-name="Source_20_Text">Signature</text:span></text:p>
      <text:p text:style-name="Text_20_body">These sections are concatenated using periods.</text:p>
      <text:p text:style-name="Text_20_body">Example format:</text:p>
      <text:p text:style-name="P1"><text:span text:style-name="Source_20_Text">xxxxx.yyyyy.zzzzz</text:span></text:p>
      <text:p text:style-name="Horizontal_20_Line"/>
      <text:h text:style-name="Heading_20_2" text:outline-level="2">Header</text:h>
      <text:p text:style-name="Text_20_body">The header contains metadata describing the token.</text:p>
      <text:p text:style-name="Text_20_body">Typical information includes:</text:p>
      <text:list text:style-name="L83">
        <text:list-item>
          <text:p text:style-name="P84">Token type</text:p>
        </text:list-item>
        <text:list-item>
          <text:p text:style-name="P84">Signing algorithm</text:p>
        </text:list-item>
      </text:list>
      <text:p text:style-name="Text_20_body">The header does <text:span text:style-name="Strong_20_Emphasis">not</text:span> contain user information.</text:p>
      <text:p text:style-name="Horizontal_20_Line"/>
      <text:h text:style-name="Heading_20_2" text:outline-level="2">Payload</text:h>
      <text:p text:style-name="Text_20_body">The payload stores claims.</text:p>
      <text:p text:style-name="Text_20_body">Typical claims include:</text:p>
      <text:list text:style-name="L84">
        <text:list-item>
          <text:p text:style-name="P85">User ID</text:p>
        </text:list-item>
        <text:list-item>
          <text:p text:style-name="P85">User role</text:p>
        </text:list-item>
        <text:list-item>
          <text:p text:style-name="P85">Issued time</text:p>
        </text:list-item>
        <text:list-item>
          <text:p text:style-name="P85">Expiration time</text:p>
        </text:list-item>
      </text:list>
      <text:p text:style-name="Text_20_body">Additional custom claims may also be included if required.</text:p>
      <text:p text:style-name="Text_20_body">The payload is <text:span text:style-name="Strong_20_Emphasis">encoded</text:span>, not encrypted. Therefore, sensitive information should never be placed inside it.</text:p>
      <text:p text:style-name="Horizontal_20_Line"/>
      <text:h text:style-name="Heading_20_2" text:outline-level="2">Signature</text:h>
      <text:p text:style-name="Text_20_body">The signature ensures that the token has not been modified.</text:p>
      <text:p text:style-name="Text_20_body">It is generated using:</text:p>
      <text:list text:style-name="L85">
        <text:list-item>
          <text:p text:style-name="P86"><text:soft-page-break/>Header</text:p>
        </text:list-item>
        <text:list-item>
          <text:p text:style-name="P86">Payload</text:p>
        </text:list-item>
        <text:list-item>
          <text:p text:style-name="P86">Server Secret Key</text:p>
        </text:list-item>
      </text:list>
      <text:p text:style-name="Text_20_body">If any part of the token changes, signature verification fails immediately.</text:p>
      <text:p text:style-name="Horizontal_20_Line"/>
      <text:h text:style-name="Heading_20_1" text:outline-level="1">5.4 JWT Creation Lifecycle</text:h>
      <text:p text:style-name="Text_20_body">The lifecycle begins after successful authentication.</text:p>
      <text:p text:style-name="Text_20_body">Execution sequence:</text:p>
      <text:list text:style-name="L86">
        <text:list-item>
          <text:p text:style-name="P87">User credentials are verified.</text:p>
        </text:list-item>
        <text:list-item>
          <text:p text:style-name="P87">Backend creates token payload.</text:p>
        </text:list-item>
        <text:list-item>
          <text:p text:style-name="P87">Signing algorithm is selected.</text:p>
        </text:list-item>
        <text:list-item>
          <text:p text:style-name="P87">Secret key signs the token.</text:p>
        </text:list-item>
        <text:list-item>
          <text:p text:style-name="P87">JWT is generated.</text:p>
        </text:list-item>
        <text:list-item>
          <text:p text:style-name="P87">JWT is returned in the authentication response.</text:p>
        </text:list-item>
      </text:list>
      <text:p text:style-name="Text_20_body">Only the backend can generate valid JWTs because only it possesses the signing secret.</text:p>
      <text:p text:style-name="Horizontal_20_Line"/>
      <text:h text:style-name="Heading_20_1" text:outline-level="1">5.5 JWT Delivery</text:h>
      <text:p text:style-name="Text_20_body">After generation, the token is delivered to the client.</text:p>
      <text:p text:style-name="Text_20_body">Typical delivery methods include:</text:p>
      <text:list text:style-name="L87">
        <text:list-item>
          <text:p text:style-name="P88">HTTP response body</text:p>
        </text:list-item>
        <text:list-item>
          <text:p text:style-name="P88">Secure cookies</text:p>
        </text:list-item>
        <text:list-item>
          <text:p text:style-name="P88">Authorization response headers</text:p>
        </text:list-item>
      </text:list>
      <text:p text:style-name="Text_20_body">The chosen method depends on the application's security model.</text:p>
      <text:p text:style-name="Text_20_body">Regardless of transport mechanism, the token becomes the client's proof of authentication.</text:p>
      <text:p text:style-name="Horizontal_20_Line"/>
      <text:h text:style-name="Heading_20_1" text:outline-level="1">5.6 Client Storage</text:h>
      <text:p text:style-name="Text_20_body">Once received, the client maintains the token for future requests.</text:p>
      <text:p text:style-name="Text_20_body">Possible storage strategies include:</text:p>
      <text:list text:style-name="L88">
        <text:list-item>
          <text:p text:style-name="P89">Secure HTTP-only cookies</text:p>
        </text:list-item>
        <text:list-item>
          <text:p text:style-name="P89"><text:soft-page-break/>Memory-only storage</text:p>
        </text:list-item>
        <text:list-item>
          <text:p text:style-name="P89">Browser storage (depending on application design)</text:p>
        </text:list-item>
      </text:list>
      <text:p text:style-name="Text_20_body">The chosen strategy should balance usability and security.</text:p>
      <text:p text:style-name="Text_20_body">The Search System architecture is designed so that storage implementation can evolve without changing the authentication workflow.</text:p>
      <text:p text:style-name="Horizontal_20_Line"/>
      <text:h text:style-name="Heading_20_1" text:outline-level="1">5.7 Request Attachment</text:h>
      <text:p text:style-name="Text_20_body">Every protected request includes the JWT.</text:p>
      <text:p text:style-name="Text_20_body">Typical sequence:</text:p>
      <text:list text:style-name="L89">
        <text:list-item>
          <text:p text:style-name="P90">User initiates API request.</text:p>
        </text:list-item>
        <text:list-item>
          <text:p text:style-name="P90">API layer retrieves token.</text:p>
        </text:list-item>
        <text:list-item>
          <text:p text:style-name="P90">Authorization header is constructed.</text:p>
        </text:list-item>
        <text:list-item>
          <text:p text:style-name="P90">HTTP request is transmitted.</text:p>
        </text:list-item>
      </text:list>
      <text:p text:style-name="Text_20_body">Example header format:</text:p>
      <text:p text:style-name="P1"><text:span text:style-name="Source_20_Text">Authorization: Bearer &lt;JWT&gt;</text:span></text:p>
      <text:p text:style-name="Text_20_body">The backend relies on this header to authenticate the request.</text:p>
      <text:p text:style-name="Horizontal_20_Line"/>
      <text:h text:style-name="Heading_20_1" text:outline-level="1">5.8 Token Validation</text:h>
      <text:p text:style-name="Text_20_body">When Express receives a protected request:</text:p>
      <text:list text:style-name="L90">
        <text:list-item>
          <text:p text:style-name="P91">Authentication middleware executes.</text:p>
        </text:list-item>
        <text:list-item>
          <text:p text:style-name="P91">Authorization header is inspected.</text:p>
        </text:list-item>
        <text:list-item>
          <text:p text:style-name="P91">Token is extracted.</text:p>
        </text:list-item>
        <text:list-item>
          <text:p text:style-name="P91">Signature verification begins.</text:p>
        </text:list-item>
        <text:list-item>
          <text:p text:style-name="P91">Expiration is checked.</text:p>
        </text:list-item>
        <text:list-item>
          <text:p text:style-name="P91">Payload claims are validated.</text:p>
        </text:list-item>
        <text:list-item>
          <text:p text:style-name="P91">User identity is reconstructed.</text:p>
        </text:list-item>
        <text:list-item>
          <text:p text:style-name="P91">Request proceeds if validation succeeds.</text:p>
        </text:list-item>
      </text:list>
      <text:p text:style-name="Text_20_body">If any validation step fails, request processing stops immediately.</text:p>
      <text:p text:style-name="Horizontal_20_Line"/>
      <text:h text:style-name="Heading_20_1" text:outline-level="1"><text:soft-page-break/>5.9 Signature Verification</text:h>
      <text:p text:style-name="Text_20_body">Signature validation guarantees authenticity.</text:p>
      <text:p text:style-name="Text_20_body">Verification confirms:</text:p>
      <text:list text:style-name="L91">
        <text:list-item>
          <text:p text:style-name="P92">Token was issued by this server.</text:p>
        </text:list-item>
        <text:list-item>
          <text:p text:style-name="P92">Payload has not been modified.</text:p>
        </text:list-item>
        <text:list-item>
          <text:p text:style-name="P92">Token structure remains valid.</text:p>
        </text:list-item>
      </text:list>
      <text:p text:style-name="Text_20_body">Even changing a single character invalidates the signature.</text:p>
      <text:p text:style-name="Text_20_body">Because the signing secret remains private, attackers cannot forge valid tokens.</text:p>
      <text:p text:style-name="Horizontal_20_Line"/>
      <text:h text:style-name="Heading_20_1" text:outline-level="1">5.10 Request Context</text:h>
      <text:p text:style-name="Text_20_body">After validation succeeds:</text:p>
      <text:p text:style-name="Text_20_body">Authenticated user information is attached to the request context.</text:p>
      <text:p text:style-name="Text_20_body">Typical data includes:</text:p>
      <text:list text:style-name="L92">
        <text:list-item>
          <text:p text:style-name="P93">User ID</text:p>
        </text:list-item>
        <text:list-item>
          <text:p text:style-name="P93">User role</text:p>
        </text:list-item>
        <text:list-item>
          <text:p text:style-name="P93">Authentication status</text:p>
        </text:list-item>
      </text:list>
      <text:p text:style-name="Text_20_body">Controllers and services can now access authenticated user information without re-validating the token.</text:p>
      <text:p text:style-name="Text_20_body">This avoids duplicate authentication logic throughout the application.</text:p>
      <text:p text:style-name="Horizontal_20_Line"/>
      <text:h text:style-name="Heading_20_1" text:outline-level="1">5.11 Authorization Decisions</text:h>
      <text:p text:style-name="Text_20_body">JWT proves identity.</text:p>
      <text:p text:style-name="Text_20_body">Authorization determines permissions.</text:p>
      <text:p text:style-name="Text_20_body">Examples:</text:p>
      <text:p text:style-name="Text_20_body">Authenticated User</text:p>
      <text:p text:style-name="Text_20_body">↓</text:p>
      <text:p text:style-name="Text_20_body">Role Check</text:p>
      <text:p text:style-name="Text_20_body">↓</text:p>
      <text:p text:style-name="Text_20_body">Permission Evaluation</text:p>
      <text:p text:style-name="Text_20_body">↓</text:p>
      <text:p text:style-name="Text_20_body"><text:soft-page-break/>Resource Access</text:p>
      <text:p text:style-name="Text_20_body">↓</text:p>
      <text:p text:style-name="Text_20_body">Controller Execution</text:p>
      <text:p text:style-name="Text_20_body">A valid JWT alone does not guarantee permission to perform every operation.</text:p>
      <text:p text:style-name="Horizontal_20_Line"/>
      <text:h text:style-name="Heading_20_1" text:outline-level="1">5.12 Token Expiration</text:h>
      <text:p text:style-name="Text_20_body">Every JWT includes an expiration timestamp.</text:p>
      <text:p text:style-name="Text_20_body">Reasons include:</text:p>
      <text:list text:style-name="L93">
        <text:list-item>
          <text:p text:style-name="P94">Limiting exposure after compromise.</text:p>
        </text:list-item>
        <text:list-item>
          <text:p text:style-name="P94">Encouraging periodic re-authentication.</text:p>
        </text:list-item>
        <text:list-item>
          <text:p text:style-name="P94">Improving overall security.</text:p>
        </text:list-item>
      </text:list>
      <text:p text:style-name="Text_20_body">When expiration time passes:</text:p>
      <text:list text:style-name="L94">
        <text:list-item>
          <text:p text:style-name="P95">Validation fails.</text:p>
        </text:list-item>
        <text:list-item>
          <text:p text:style-name="P95">Middleware rejects the request.</text:p>
        </text:list-item>
        <text:list-item>
          <text:p text:style-name="P95">Authentication error is returned.</text:p>
        </text:list-item>
      </text:list>
      <text:p text:style-name="Text_20_body">Expired tokens cannot be reused.</text:p>
      <text:p text:style-name="Horizontal_20_Line"/>
      <text:h text:style-name="Heading_20_1" text:outline-level="1">5.13 Expiration Handling</text:h>
      <text:p text:style-name="Text_20_body">When the frontend receives an expiration response:</text:p>
      <text:p text:style-name="Text_20_body">Possible actions include:</text:p>
      <text:list text:style-name="L95">
        <text:list-item>
          <text:p text:style-name="P96">Redirect to login.</text:p>
        </text:list-item>
        <text:list-item>
          <text:p text:style-name="P96">Initiate refresh workflow.</text:p>
        </text:list-item>
        <text:list-item>
          <text:p text:style-name="P96">Clear authentication state.</text:p>
        </text:list-item>
        <text:list-item>
          <text:p text:style-name="P96">Notify the user.</text:p>
        </text:list-item>
      </text:list>
      <text:p text:style-name="Text_20_body">The exact behavior depends on the application's authentication policy.</text:p>
      <text:p text:style-name="Horizontal_20_Line"/>
      <text:h text:style-name="Heading_20_1" text:outline-level="1">5.14 Token Refresh Strategy</text:h>
      <text:p text:style-name="Text_20_body">Although the current implementation may use a simple login-based lifecycle, the architecture supports refresh tokens.</text:p>
      <text:p text:style-name="Text_20_body"><text:soft-page-break/>Future execution:</text:p>
      <text:p text:style-name="Preformatted_20_Text"><text:span text:style-name="Source_20_Text">Access Token</text:span></text:p>
      <text:p text:style-name="Preformatted_20_Text"/>
      <text:p text:style-name="Preformatted_20_Text"><text:span text:style-name="Source_20_Text">↓</text:span></text:p>
      <text:p text:style-name="Preformatted_20_Text"/>
      <text:p text:style-name="Preformatted_20_Text"><text:span text:style-name="Source_20_Text">Expires</text:span></text:p>
      <text:p text:style-name="Preformatted_20_Text"/>
      <text:p text:style-name="Preformatted_20_Text"><text:span text:style-name="Source_20_Text">↓</text:span></text:p>
      <text:p text:style-name="Preformatted_20_Text"/>
      <text:p text:style-name="Preformatted_20_Text"><text:span text:style-name="Source_20_Text">Refresh Token</text:span></text:p>
      <text:p text:style-name="Preformatted_20_Text"/>
      <text:p text:style-name="Preformatted_20_Text"><text:span text:style-name="Source_20_Text">↓</text:span></text:p>
      <text:p text:style-name="Preformatted_20_Text"/>
      <text:p text:style-name="Preformatted_20_Text"><text:span text:style-name="Source_20_Text">New Access Token</text:span></text:p>
      <text:p text:style-name="Preformatted_20_Text"/>
      <text:p text:style-name="Preformatted_20_Text"><text:span text:style-name="Source_20_Text">↓</text:span></text:p>
      <text:p text:style-name="Preformatted_20_Text"/>
      <text:p text:style-name="P1"><text:span text:style-name="Source_20_Text">Continue Session</text:span></text:p>
      <text:p text:style-name="Text_20_body">Advantages include:</text:p>
      <text:list text:style-name="L96">
        <text:list-item>
          <text:p text:style-name="P97">Short-lived access tokens.</text:p>
        </text:list-item>
        <text:list-item>
          <text:p text:style-name="P97">Longer user sessions.</text:p>
        </text:list-item>
        <text:list-item>
          <text:p text:style-name="P97">Improved security.</text:p>
        </text:list-item>
        <text:list-item>
          <text:p text:style-name="P97">Reduced login frequency.</text:p>
        </text:list-item>
      </text:list>
      <text:p text:style-name="Horizontal_20_Line"/>
      <text:h text:style-name="Heading_20_1" text:outline-level="1">5.15 Token Revocation</text:h>
      <text:p text:style-name="Text_20_body">Stateless authentication introduces revocation challenges.</text:p>
      <text:p text:style-name="Text_20_body">Possible revocation strategies include:</text:p>
      <text:list text:style-name="L97">
        <text:list-item>
          <text:p text:style-name="P98">Refresh token invalidation.</text:p>
        </text:list-item>
        <text:list-item>
          <text:p text:style-name="P98">Server-side token blacklist.</text:p>
        </text:list-item>
        <text:list-item>
          <text:p text:style-name="P98">Version-based user tokens.</text:p>
        </text:list-item>
        <text:list-item>
          <text:p text:style-name="P98">Account deactivation.</text:p>
        </text:list-item>
        <text:list-item>
          <text:p text:style-name="P98">Secret rotation.</text:p>
        </text:list-item>
      </text:list>
      <text:p text:style-name="Text_20_body">The chosen strategy depends on system requirements.</text:p>
      <text:p text:style-name="Horizontal_20_Line"/>
      <text:h text:style-name="Heading_20_1" text:outline-level="1">5.16 Invalid Token Scenarios</text:h>
      <text:p text:style-name="Text_20_body">Validation may fail because of:</text:p>
      <text:list text:style-name="L98">
        <text:list-item>
          <text:p text:style-name="P99">Missing token.</text:p>
        </text:list-item>
        <text:list-item>
          <text:p text:style-name="P99">Malformed token.</text:p>
        </text:list-item>
        <text:list-item>
          <text:p text:style-name="P99"><text:soft-page-break/>Invalid signature.</text:p>
        </text:list-item>
        <text:list-item>
          <text:p text:style-name="P99">Expired token.</text:p>
        </text:list-item>
        <text:list-item>
          <text:p text:style-name="P99">Unsupported algorithm.</text:p>
        </text:list-item>
        <text:list-item>
          <text:p text:style-name="P99">Incorrect issuer.</text:p>
        </text:list-item>
        <text:list-item>
          <text:p text:style-name="P99">Corrupted payload.</text:p>
        </text:list-item>
      </text:list>
      <text:p text:style-name="Text_20_body">Each failure results in an authentication error without exposing implementation details.</text:p>
      <text:p text:style-name="Horizontal_20_Line"/>
      <text:h text:style-name="Heading_20_1" text:outline-level="1">5.17 Runtime Sequence</text:h>
      <text:p text:style-name="Text_20_body">Complete JWT lifecycle:</text:p>
      <text:p text:style-name="Text_20_body">User Login</text:p>
      <text:p text:style-name="Text_20_body">↓</text:p>
      <text:p text:style-name="Text_20_body">Credential Verification</text:p>
      <text:p text:style-name="Text_20_body">↓</text:p>
      <text:p text:style-name="Text_20_body">JWT Generation</text:p>
      <text:p text:style-name="Text_20_body">↓</text:p>
      <text:p text:style-name="Text_20_body">Client Receives Token</text:p>
      <text:p text:style-name="Text_20_body">↓</text:p>
      <text:p text:style-name="Text_20_body">Token Storage</text:p>
      <text:p text:style-name="Text_20_body">↓</text:p>
      <text:p text:style-name="Text_20_body">API Request</text:p>
      <text:p text:style-name="Text_20_body">↓</text:p>
      <text:p text:style-name="Text_20_body">Authorization Header</text:p>
      <text:p text:style-name="Text_20_body">↓</text:p>
      <text:p text:style-name="Text_20_body">Middleware</text:p>
      <text:p text:style-name="Text_20_body">↓</text:p>
      <text:p text:style-name="Text_20_body">Signature Verification</text:p>
      <text:p text:style-name="Text_20_body">↓</text:p>
      <text:p text:style-name="Text_20_body">Expiration Check</text:p>
      <text:p text:style-name="Text_20_body">↓</text:p>
      <text:p text:style-name="Text_20_body">User Context</text:p>
      <text:p text:style-name="Text_20_body">↓</text:p>
      <text:p text:style-name="Text_20_body"><text:soft-page-break/>Controller</text:p>
      <text:p text:style-name="Text_20_body">↓</text:p>
      <text:p text:style-name="Text_20_body">Service</text:p>
      <text:p text:style-name="Text_20_body">↓</text:p>
      <text:p text:style-name="Text_20_body">Response</text:p>
      <text:p text:style-name="Text_20_body">↓</text:p>
      <text:p text:style-name="Text_20_body">Next Request</text:p>
      <text:p text:style-name="Text_20_body">↓</text:p>
      <text:p text:style-name="Text_20_body">Repeat Until Expiration</text:p>
      <text:p text:style-name="Text_20_body">This lifecycle repeats for every authenticated request.</text:p>
      <text:p text:style-name="Horizontal_20_Line"/>
      <text:h text:style-name="Heading_20_1" text:outline-level="1">5.18 Security Considerations</text:h>
      <text:p text:style-name="Text_20_body">JWT implementation follows several security principles.</text:p>
      <text:h text:style-name="Heading_20_3" text:outline-level="3">Minimal Payload</text:h>
      <text:p text:style-name="Text_20_body">Only essential claims should be included.</text:p>
      <text:p text:style-name="Text_20_body">Avoid storing:</text:p>
      <text:list text:style-name="L99">
        <text:list-item>
          <text:p text:style-name="P100">Passwords</text:p>
        </text:list-item>
        <text:list-item>
          <text:p text:style-name="P100">Sensitive personal information</text:p>
        </text:list-item>
        <text:list-item>
          <text:p text:style-name="P100">Secrets</text:p>
        </text:list-item>
        <text:list-item>
          <text:p text:style-name="P100">Internal configuration</text:p>
        </text:list-item>
      </text:list>
      <text:p text:style-name="Horizontal_20_Line"/>
      <text:h text:style-name="Heading_20_3" text:outline-level="3">HTTPS</text:h>
      <text:p text:style-name="Text_20_body">JWTs should only be transmitted over encrypted HTTPS connections.</text:p>
      <text:p text:style-name="Text_20_body">This prevents interception during transport.</text:p>
      <text:p text:style-name="Horizontal_20_Line"/>
      <text:h text:style-name="Heading_20_3" text:outline-level="3">Strong Signing Secret</text:h>
      <text:p text:style-name="Text_20_body">The signing secret must:</text:p>
      <text:list text:style-name="L100">
        <text:list-item>
          <text:p text:style-name="P101">Remain confidential.</text:p>
        </text:list-item>
        <text:list-item>
          <text:p text:style-name="P101">Be sufficiently random.</text:p>
        </text:list-item>
        <text:list-item>
          <text:p text:style-name="P101">Be rotated periodically when necessary.</text:p>
        </text:list-item>
      </text:list>
      <text:p text:style-name="Text_20_body"><text:soft-page-break/>Compromise of the signing secret compromises the authentication system.</text:p>
      <text:p text:style-name="Horizontal_20_Line"/>
      <text:h text:style-name="Heading_20_3" text:outline-level="3">Short Token Lifetime</text:h>
      <text:p text:style-name="Text_20_body">Short expiration periods reduce risk.</text:p>
      <text:p text:style-name="Text_20_body">If a token is compromised, its usefulness remains limited.</text:p>
      <text:p text:style-name="Horizontal_20_Line"/>
      <text:h text:style-name="Heading_20_3" text:outline-level="3">Input Validation</text:h>
      <text:p text:style-name="Text_20_body">Authentication middleware validates:</text:p>
      <text:list text:style-name="L101">
        <text:list-item>
          <text:p text:style-name="P102">Structure</text:p>
        </text:list-item>
        <text:list-item>
          <text:p text:style-name="P102">Signature</text:p>
        </text:list-item>
        <text:list-item>
          <text:p text:style-name="P102">Expiration</text:p>
        </text:list-item>
        <text:list-item>
          <text:p text:style-name="P102">Claims</text:p>
        </text:list-item>
      </text:list>
      <text:p text:style-name="Text_20_body">before any protected business logic executes.</text:p>
      <text:p text:style-name="Horizontal_20_Line"/>
      <text:h text:style-name="Heading_20_1" text:outline-level="1">5.19 Interaction with Other Subsystems</text:h>
      <text:p text:style-name="Text_20_body">JWT interacts closely with multiple runtime modules.</text:p>
      <text:p text:style-name="Text_20_body">Frontend</text:p>
      <text:list text:style-name="L102">
        <text:list-item>
          <text:p text:style-name="P103">Login pages</text:p>
        </text:list-item>
        <text:list-item>
          <text:p text:style-name="P103">Route protection</text:p>
        </text:list-item>
        <text:list-item>
          <text:p text:style-name="P103">Authentication state</text:p>
        </text:list-item>
      </text:list>
      <text:p text:style-name="Text_20_body">Backend</text:p>
      <text:list text:style-name="L103">
        <text:list-item>
          <text:p text:style-name="P104">Middleware</text:p>
        </text:list-item>
        <text:list-item>
          <text:p text:style-name="P104">Controllers</text:p>
        </text:list-item>
        <text:list-item>
          <text:p text:style-name="P104">Authorization services</text:p>
        </text:list-item>
      </text:list>
      <text:p text:style-name="Text_20_body">Infrastructure</text:p>
      <text:list text:style-name="L104">
        <text:list-item>
          <text:p text:style-name="P105">HTTPS</text:p>
        </text:list-item>
        <text:list-item>
          <text:p text:style-name="P105">Reverse proxy</text:p>
        </text:list-item>
        <text:list-item>
          <text:p text:style-name="P105">API gateway</text:p>
        </text:list-item>
        <text:list-item>
          <text:p text:style-name="P105">Load balancer</text:p>
        </text:list-item>
      </text:list>
      <text:p text:style-name="Text_20_body">Database</text:p>
      <text:list text:style-name="L105">
        <text:list-item>
          <text:p text:style-name="P106"><text:soft-page-break/>User lookup</text:p>
        </text:list-item>
        <text:list-item>
          <text:p text:style-name="P106">Role information</text:p>
        </text:list-item>
        <text:list-item>
          <text:p text:style-name="P106">Account status</text:p>
        </text:list-item>
      </text:list>
      <text:p text:style-name="Text_20_body">Because JWT sits at the boundary between client identity and server authorization, it is central to nearly every protected request.</text:p>
      <text:p text:style-name="Horizontal_20_Line"/>
      <text:h text:style-name="Heading_20_1" text:outline-level="1">5.20 Common Debugging Scenarios</text:h>
      <text:p text:style-name="Text_20_body">Typical issues include:</text:p>
      <text:list text:style-name="L106">
        <text:list-item>
          <text:p text:style-name="P107">Expired token after inactivity.</text:p>
        </text:list-item>
        <text:list-item>
          <text:p text:style-name="P107">Missing Authorization header.</text:p>
        </text:list-item>
        <text:list-item>
          <text:p text:style-name="P107">Incorrect signing secret across environments.</text:p>
        </text:list-item>
        <text:list-item>
          <text:p text:style-name="P107">Client sending outdated token.</text:p>
        </text:list-item>
        <text:list-item>
          <text:p text:style-name="P107">Server clock synchronization issues.</text:p>
        </text:list-item>
        <text:list-item>
          <text:p text:style-name="P107">Corrupted token during transmission.</text:p>
        </text:list-item>
      </text:list>
      <text:p text:style-name="Text_20_body">Understanding the JWT lifecycle allows developers to quickly identify where authentication failures occur.</text:p>
      <text:p text:style-name="Horizontal_20_Line"/>
      <text:h text:style-name="Heading_20_1" text:outline-level="1">5.21 Future Enhancements</text:h>
      <text:p text:style-name="Text_20_body">The architecture supports future JWT improvements, including:</text:p>
      <text:list text:style-name="L107">
        <text:list-item>
          <text:p text:style-name="P108">Refresh token rotation.</text:p>
        </text:list-item>
        <text:list-item>
          <text:p text:style-name="P108">Device-specific sessions.</text:p>
        </text:list-item>
        <text:list-item>
          <text:p text:style-name="P108">Token revocation lists.</text:p>
        </text:list-item>
        <text:list-item>
          <text:p text:style-name="P108">Distributed authentication services.</text:p>
        </text:list-item>
        <text:list-item>
          <text:p text:style-name="P108">OAuth integration.</text:p>
        </text:list-item>
        <text:list-item>
          <text:p text:style-name="P108">Single Sign-On (SSO).</text:p>
        </text:list-item>
        <text:list-item>
          <text:p text:style-name="P108">Multi-factor authentication (MFA).</text:p>
        </text:list-item>
        <text:list-item>
          <text:p text:style-name="P108">Fine-grained permission claims.</text:p>
        </text:list-item>
      </text:list>
      <text:p text:style-name="Text_20_body">These enhancements can be introduced without fundamentally changing the authentication pipeline.</text:p>
      <text:p text:style-name="Horizontal_20_Line"/>
      <text:h text:style-name="Heading_20_1" text:outline-level="1"><text:soft-page-break/>5.22 Chapter Summary</text:h>
      <text:p text:style-name="Text_20_body">The JWT lifecycle enables secure, stateless authentication throughout the Search System. From generation during login to validation on every protected request, JWTs provide an efficient mechanism for proving user identity while supporting scalable backend infrastructure.</text:p>
      <text:p text:style-name="Text_20_body">By separating token creation, transport, validation, authorization, and expiration into distinct stages, the system achieves a balance between security, maintainability, and scalability.</text:p>
      <text:p text:style-name="Text_20_body">The next chapter examines the <text:span text:style-name="Strong_20_Emphasis">Next.js Request Lifecycle</text:span>, following a request from the browser through routing, layouts, server components, client components, hydration, rendering, navigation, and response generation. This chapter marks the beginning of the frontend runtime deep dive.</text:p>
      <text:h text:style-name="Heading_20_3" text:outline-level="3">Volume 2 — Internal Working</text:h>
      <text:h text:style-name="Heading_20_2" text:outline-level="2">Chapter 6 — Next.js Request Lifecycle</text:h>
      <text:h text:style-name="Heading_20_1" text:outline-level="1">Chapter 6 — Next.js Request Lifecycle</text:h>
      <text:h text:style-name="Heading_20_2" text:outline-level="2">6.1 Purpose</text:h>
      <text:p text:style-name="Text_20_body">Next.js is the entry point of the frontend application. Every page request, navigation event, and route transition passes through the Next.js runtime before React begins rendering the user interface.</text:p>
      <text:p text:style-name="Text_20_body">This chapter explains the complete lifecycle of a request within the Next.js application. It traces a request from the moment a user enters a URL or clicks a navigation link until the fully interactive page is displayed in the browser.</text:p>
      <text:p text:style-name="Text_20_body">The goal is to understand how Next.js coordinates routing, layouts, rendering, hydration, and navigation while working alongside React, Zustand, and TanStack Query.</text:p>
      <text:p text:style-name="Horizontal_20_Line"/>
      <text:h text:style-name="Heading_20_1" text:outline-level="1">6.2 Role of Next.js in the System</text:h>
      <text:p text:style-name="Text_20_body">Within the Search System, Next.js is responsible for the application's frontend runtime infrastructure.</text:p>
      <text:p text:style-name="Text_20_body">Its responsibilities include:</text:p>
      <text:list text:style-name="L108">
        <text:list-item>
          <text:p text:style-name="P109">Route resolution.</text:p>
        </text:list-item>
        <text:list-item>
          <text:p text:style-name="P109">Layout composition.</text:p>
        </text:list-item>
        <text:list-item>
          <text:p text:style-name="P109">Page rendering.</text:p>
        </text:list-item>
        <text:list-item>
          <text:p text:style-name="P109">Static asset delivery.</text:p>
        </text:list-item>
        <text:list-item>
          <text:p text:style-name="P109">Navigation management.</text:p>
        </text:list-item>
        <text:list-item>
          <text:p text:style-name="P109">Metadata generation.</text:p>
        </text:list-item>
        <text:list-item>
          <text:p text:style-name="P109"><text:soft-page-break/>Server Component execution (where applicable).</text:p>
        </text:list-item>
        <text:list-item>
          <text:p text:style-name="P109">Client Component hydration.</text:p>
        </text:list-item>
        <text:list-item>
          <text:p text:style-name="P109">Error boundaries.</text:p>
        </text:list-item>
        <text:list-item>
          <text:p text:style-name="P109">Loading states.</text:p>
        </text:list-item>
      </text:list>
      <text:p text:style-name="Text_20_body">React focuses on rendering components, while Next.js orchestrates how those components are delivered and displayed.</text:p>
      <text:p text:style-name="Horizontal_20_Line"/>
      <text:h text:style-name="Heading_20_1" text:outline-level="1">6.3 Request Sources</text:h>
      <text:p text:style-name="Text_20_body">A Next.js request may originate from several sources.</text:p>
      <text:h text:style-name="Heading_20_3" text:outline-level="3">Direct URL Access</text:h>
      <text:p text:style-name="Text_20_body">Example:</text:p>
      <text:p text:style-name="P1"><text:span text:style-name="Source_20_Text">https://example.com/dashboard</text:span></text:p>
      <text:p text:style-name="Text_20_body">The browser sends an HTTP request to the application.</text:p>
      <text:p text:style-name="Horizontal_20_Line"/>
      <text:h text:style-name="Heading_20_3" text:outline-level="3">Internal Navigation</text:h>
      <text:p text:style-name="Text_20_body">The user clicks a navigation link within the application.</text:p>
      <text:p text:style-name="Text_20_body">Instead of performing a full page reload, Next.js performs client-side navigation.</text:p>
      <text:p text:style-name="Horizontal_20_Line"/>
      <text:h text:style-name="Heading_20_3" text:outline-level="3">Browser History</text:h>
      <text:p text:style-name="Text_20_body">Users press:</text:p>
      <text:list text:style-name="L109">
        <text:list-item>
          <text:p text:style-name="P110">Back</text:p>
        </text:list-item>
        <text:list-item>
          <text:p text:style-name="P110">Forward</text:p>
        </text:list-item>
      </text:list>
      <text:p text:style-name="Text_20_body">Next.js restores the appropriate route without rebuilding the entire application.</text:p>
      <text:p text:style-name="Horizontal_20_Line"/>
      <text:h text:style-name="Heading_20_3" text:outline-level="3">Programmatic Navigation</text:h>
      <text:p text:style-name="Text_20_body">Application code performs navigation after events such as:</text:p>
      <text:list text:style-name="L110">
        <text:list-item>
          <text:p text:style-name="P111">Login</text:p>
        </text:list-item>
        <text:list-item>
          <text:p text:style-name="P111">Logout</text:p>
        </text:list-item>
        <text:list-item>
          <text:p text:style-name="P111">Form submission</text:p>
        </text:list-item>
        <text:list-item>
          <text:p text:style-name="P111">Permission changes</text:p>
        </text:list-item>
      </text:list>
      <text:p text:style-name="Horizontal_20_Line"><text:soft-page-break/></text:p>
      <text:h text:style-name="Heading_20_1" text:outline-level="1">6.4 Initial Request Lifecycle</text:h>
      <text:p text:style-name="Text_20_body">The first visit to the application follows this sequence.</text:p>
      <text:list text:style-name="L111">
        <text:list-item>
          <text:p text:style-name="P112">Browser requests a URL.</text:p>
        </text:list-item>
        <text:list-item>
          <text:p text:style-name="P112">Next.js receives the request.</text:p>
        </text:list-item>
        <text:list-item>
          <text:p text:style-name="P112">Route is resolved.</text:p>
        </text:list-item>
        <text:list-item>
          <text:p text:style-name="P112">Matching layout hierarchy is identified.</text:p>
        </text:list-item>
        <text:list-item>
          <text:p text:style-name="P112">Required Server Components execute.</text:p>
        </text:list-item>
        <text:list-item>
          <text:p text:style-name="P112">HTML is generated.</text:p>
        </text:list-item>
        <text:list-item>
          <text:p text:style-name="P112">JavaScript bundles are prepared.</text:p>
        </text:list-item>
        <text:list-item>
          <text:p text:style-name="P112">Response is returned.</text:p>
        </text:list-item>
        <text:list-item>
          <text:p text:style-name="P112">Browser begins rendering.</text:p>
        </text:list-item>
      </text:list>
      <text:p text:style-name="Text_20_body">This is known as the <text:span text:style-name="Strong_20_Emphasis">initial page load</text:span>.</text:p>
      <text:p text:style-name="Horizontal_20_Line"/>
      <text:h text:style-name="Heading_20_1" text:outline-level="1">6.5 Route Resolution</text:h>
      <text:p text:style-name="Text_20_body">The App Router determines which page corresponds to the requested URL.</text:p>
      <text:p text:style-name="Text_20_body">Example structure:</text:p>
      <text:p text:style-name="Preformatted_20_Text"><text:span text:style-name="Source_20_Text">app/</text:span></text:p>
      <text:p text:style-name="Preformatted_20_Text"/>
      <text:p text:style-name="Preformatted_20_Text"><text:span text:style-name="Source_20_Text">layout.tsx</text:span></text:p>
      <text:p text:style-name="Preformatted_20_Text"><text:span text:style-name="Source_20_Text">page.tsx</text:span></text:p>
      <text:p text:style-name="Preformatted_20_Text"/>
      <text:p text:style-name="Preformatted_20_Text"><text:span text:style-name="Source_20_Text">dashboard/</text:span></text:p>
      <text:p text:style-name="Preformatted_20_Text"><text:span text:style-name="Source_20_Text">page.tsx</text:span></text:p>
      <text:p text:style-name="Preformatted_20_Text"/>
      <text:p text:style-name="Preformatted_20_Text"><text:span text:style-name="Source_20_Text">search/</text:span></text:p>
      <text:p text:style-name="Preformatted_20_Text"><text:span text:style-name="Source_20_Text">page.tsx</text:span></text:p>
      <text:p text:style-name="Preformatted_20_Text"/>
      <text:p text:style-name="Preformatted_20_Text"><text:span text:style-name="Source_20_Text">projects/</text:span></text:p>
      <text:p text:style-name="Preformatted_20_Text"><text:span text:style-name="Source_20_Text">[id]/</text:span></text:p>
      <text:p text:style-name="P1"><text:span text:style-name="Source_20_Text">page.tsx</text:span></text:p>
      <text:p text:style-name="Text_20_body">Each directory represents a segment of the application's routing hierarchy.</text:p>
      <text:p text:style-name="Text_20_body">Dynamic routes allow pages to be generated based on URL parameters.</text:p>
      <text:p text:style-name="Horizontal_20_Line"/>
      <text:h text:style-name="Heading_20_1" text:outline-level="1"><text:soft-page-break/>6.6 Layout Resolution</text:h>
      <text:p text:style-name="Text_20_body">Before rendering the requested page, Next.js builds the layout hierarchy.</text:p>
      <text:p text:style-name="Text_20_body">Example:</text:p>
      <text:p text:style-name="Preformatted_20_Text"><text:span text:style-name="Source_20_Text">Root Layout</text:span></text:p>
      <text:p text:style-name="Preformatted_20_Text"/>
      <text:p text:style-name="Preformatted_20_Text"><text:span text:style-name="Source_20_Text">↓</text:span></text:p>
      <text:p text:style-name="Preformatted_20_Text"/>
      <text:p text:style-name="Preformatted_20_Text"><text:span text:style-name="Source_20_Text">Dashboard Layout</text:span></text:p>
      <text:p text:style-name="Preformatted_20_Text"/>
      <text:p text:style-name="Preformatted_20_Text"><text:span text:style-name="Source_20_Text">↓</text:span></text:p>
      <text:p text:style-name="Preformatted_20_Text"/>
      <text:p text:style-name="Preformatted_20_Text"><text:span text:style-name="Source_20_Text">Project Layout</text:span></text:p>
      <text:p text:style-name="Preformatted_20_Text"/>
      <text:p text:style-name="Preformatted_20_Text"><text:span text:style-name="Source_20_Text">↓</text:span></text:p>
      <text:p text:style-name="Preformatted_20_Text"/>
      <text:p text:style-name="P1"><text:span text:style-name="Source_20_Text">Requested Page</text:span></text:p>
      <text:p text:style-name="Text_20_body">Each layout contributes shared UI elements such as:</text:p>
      <text:list text:style-name="L112">
        <text:list-item>
          <text:p text:style-name="P113">Navigation bar.</text:p>
        </text:list-item>
        <text:list-item>
          <text:p text:style-name="P113">Sidebar.</text:p>
        </text:list-item>
        <text:list-item>
          <text:p text:style-name="P113">Footer.</text:p>
        </text:list-item>
        <text:list-item>
          <text:p text:style-name="P113">Theme provider.</text:p>
        </text:list-item>
        <text:list-item>
          <text:p text:style-name="P113">Authentication provider.</text:p>
        </text:list-item>
      </text:list>
      <text:p text:style-name="Text_20_body">Layouts persist during navigation whenever possible, reducing unnecessary rendering.</text:p>
      <text:p text:style-name="Horizontal_20_Line"/>
      <text:h text:style-name="Heading_20_1" text:outline-level="1">6.7 Server Component Execution</text:h>
      <text:p text:style-name="Text_20_body">Server Components execute on the server before content reaches the browser.</text:p>
      <text:p text:style-name="Text_20_body">Typical responsibilities include:</text:p>
      <text:list text:style-name="L113">
        <text:list-item>
          <text:p text:style-name="P114">Preparing initial data.</text:p>
        </text:list-item>
        <text:list-item>
          <text:p text:style-name="P114">Reading server-side configuration.</text:p>
        </text:list-item>
        <text:list-item>
          <text:p text:style-name="P114">Performing secure operations.</text:p>
        </text:list-item>
        <text:list-item>
          <text:p text:style-name="P114">Reducing client-side JavaScript.</text:p>
        </text:list-item>
      </text:list>
      <text:p text:style-name="Text_20_body">Because they execute on the server, Server Components can access resources unavailable to browser code.</text:p>
      <text:p text:style-name="Horizontal_20_Line"/>
      <text:h text:style-name="Heading_20_1" text:outline-level="1">6.8 Client Component Identification</text:h>
      <text:p text:style-name="Text_20_body">Interactive parts of the application are marked as Client Components.</text:p>
      <text:p text:style-name="Text_20_body"><text:soft-page-break/>Examples include:</text:p>
      <text:list text:style-name="L114">
        <text:list-item>
          <text:p text:style-name="P115">Forms.</text:p>
        </text:list-item>
        <text:list-item>
          <text:p text:style-name="P115">Search inputs.</text:p>
        </text:list-item>
        <text:list-item>
          <text:p text:style-name="P115">Charts.</text:p>
        </text:list-item>
        <text:list-item>
          <text:p text:style-name="P115">Buttons.</text:p>
        </text:list-item>
        <text:list-item>
          <text:p text:style-name="P115">Modals.</text:p>
        </text:list-item>
        <text:list-item>
          <text:p text:style-name="P115">Interactive dashboards.</text:p>
        </text:list-item>
      </text:list>
      <text:p text:style-name="Text_20_body">These components require browser-side JavaScript for user interaction.</text:p>
      <text:p text:style-name="Horizontal_20_Line"/>
      <text:h text:style-name="Heading_20_1" text:outline-level="1">6.9 HTML Generation</text:h>
      <text:p text:style-name="Text_20_body">Once layouts and components are resolved:</text:p>
      <text:p text:style-name="Text_20_body">Next.js generates HTML representing the initial application state.</text:p>
      <text:p text:style-name="Text_20_body">The generated HTML includes:</text:p>
      <text:list text:style-name="L115">
        <text:list-item>
          <text:p text:style-name="P116">Static content.</text:p>
        </text:list-item>
        <text:list-item>
          <text:p text:style-name="P116">Component placeholders.</text:p>
        </text:list-item>
        <text:list-item>
          <text:p text:style-name="P116">Metadata.</text:p>
        </text:list-item>
        <text:list-item>
          <text:p text:style-name="P116">Asset references.</text:p>
        </text:list-item>
      </text:list>
      <text:p text:style-name="Text_20_body">At this stage, the page is visible but not yet interactive.</text:p>
      <text:p text:style-name="Horizontal_20_Line"/>
      <text:h text:style-name="Heading_20_1" text:outline-level="1">6.10 JavaScript Bundle Delivery</text:h>
      <text:p text:style-name="Text_20_body">Alongside HTML, Next.js delivers JavaScript bundles.</text:p>
      <text:p text:style-name="Text_20_body">Bundles include:</text:p>
      <text:list text:style-name="L116">
        <text:list-item>
          <text:p text:style-name="P117">React runtime.</text:p>
        </text:list-item>
        <text:list-item>
          <text:p text:style-name="P117">Client Components.</text:p>
        </text:list-item>
        <text:list-item>
          <text:p text:style-name="P117">Routing logic.</text:p>
        </text:list-item>
        <text:list-item>
          <text:p text:style-name="P117">State management.</text:p>
        </text:list-item>
        <text:list-item>
          <text:p text:style-name="P117">Event handlers.</text:p>
        </text:list-item>
      </text:list>
      <text:p text:style-name="Text_20_body">Only the required code for the requested route is downloaded, improving performance.</text:p>
      <text:p text:style-name="Horizontal_20_Line"/>
      <text:h text:style-name="Heading_20_1" text:outline-level="1"><text:soft-page-break/>6.11 Hydration</text:h>
      <text:p text:style-name="Text_20_body">Hydration transforms static HTML into an interactive React application.</text:p>
      <text:p text:style-name="Text_20_body">Execution sequence:</text:p>
      <text:list text:style-name="L117">
        <text:list-item>
          <text:p text:style-name="P118">Browser loads HTML.</text:p>
        </text:list-item>
        <text:list-item>
          <text:p text:style-name="P118">JavaScript bundles execute.</text:p>
        </text:list-item>
        <text:list-item>
          <text:p text:style-name="P118">React reconstructs the component tree.</text:p>
        </text:list-item>
        <text:list-item>
          <text:p text:style-name="P118">Event listeners attach.</text:p>
        </text:list-item>
        <text:list-item>
          <text:p text:style-name="P118">State stores initialize.</text:p>
        </text:list-item>
        <text:list-item>
          <text:p text:style-name="P118">Components become interactive.</text:p>
        </text:list-item>
      </text:list>
      <text:p text:style-name="Text_20_body">Hydration is the transition from static markup to a fully functioning application.</text:p>
      <text:p text:style-name="Horizontal_20_Line"/>
      <text:h text:style-name="Heading_20_1" text:outline-level="1">6.12 Global Provider Initialization</text:h>
      <text:p text:style-name="Text_20_body">After hydration, application-wide providers are initialized.</text:p>
      <text:p text:style-name="Text_20_body">Typical providers include:</text:p>
      <text:list text:style-name="L118">
        <text:list-item>
          <text:p text:style-name="P119">Zustand store provider.</text:p>
        </text:list-item>
        <text:list-item>
          <text:p text:style-name="P119">TanStack Query provider.</text:p>
        </text:list-item>
        <text:list-item>
          <text:p text:style-name="P119">Theme provider.</text:p>
        </text:list-item>
        <text:list-item>
          <text:p text:style-name="P119">Authentication provider.</text:p>
        </text:list-item>
      </text:list>
      <text:p text:style-name="Text_20_body">These providers establish shared runtime state used across all pages.</text:p>
      <text:p text:style-name="Horizontal_20_Line"/>
      <text:h text:style-name="Heading_20_1" text:outline-level="1">6.13 Authentication Check</text:h>
      <text:p text:style-name="Text_20_body">Once providers initialize:</text:p>
      <text:p text:style-name="Text_20_body">Authentication status is restored.</text:p>
      <text:p text:style-name="Text_20_body">Possible outcomes include:</text:p>
      <text:p text:style-name="Text_20_body">Authenticated User</text:p>
      <text:p text:style-name="Text_20_body">↓</text:p>
      <text:p text:style-name="Text_20_body">Protected Content</text:p>
      <text:p text:style-name="Text_20_body">or</text:p>
      <text:p text:style-name="Text_20_body">Unauthenticated User</text:p>
      <text:p text:style-name="Text_20_body"><text:soft-page-break/>↓</text:p>
      <text:p text:style-name="Text_20_body">Redirect to Login</text:p>
      <text:p text:style-name="Text_20_body">This check occurs before protected pages become fully usable.</text:p>
      <text:p text:style-name="Horizontal_20_Line"/>
      <text:h text:style-name="Heading_20_1" text:outline-level="1">6.14 Initial Data Fetching</text:h>
      <text:p text:style-name="Text_20_body">After authentication:</text:p>
      <text:p text:style-name="Text_20_body">TanStack Query begins loading server data.</text:p>
      <text:p text:style-name="Text_20_body">Examples include:</text:p>
      <text:list text:style-name="L119">
        <text:list-item>
          <text:p text:style-name="P120">User profile.</text:p>
        </text:list-item>
        <text:list-item>
          <text:p text:style-name="P120">Dashboard analytics.</text:p>
        </text:list-item>
        <text:list-item>
          <text:p text:style-name="P120">Projects.</text:p>
        </text:list-item>
        <text:list-item>
          <text:p text:style-name="P120">Search history.</text:p>
        </text:list-item>
        <text:list-item>
          <text:p text:style-name="P120">Notifications.</text:p>
        </text:list-item>
      </text:list>
      <text:p text:style-name="Text_20_body">Loading indicators remain visible until required data becomes available.</text:p>
      <text:p text:style-name="Horizontal_20_Line"/>
      <text:h text:style-name="Heading_20_1" text:outline-level="1">6.15 React Rendering</text:h>
      <text:p text:style-name="Text_20_body">React renders the component hierarchy.</text:p>
      <text:p text:style-name="Text_20_body">Rendering occurs using:</text:p>
      <text:list text:style-name="L120">
        <text:list-item>
          <text:p text:style-name="P121">Component state.</text:p>
        </text:list-item>
        <text:list-item>
          <text:p text:style-name="P121">Zustand state.</text:p>
        </text:list-item>
        <text:list-item>
          <text:p text:style-name="P121">Query cache.</text:p>
        </text:list-item>
        <text:list-item>
          <text:p text:style-name="P121">Props.</text:p>
        </text:list-item>
      </text:list>
      <text:p text:style-name="Text_20_body">React calculates the minimal DOM updates required to display the current application state.</text:p>
      <text:p text:style-name="Horizontal_20_Line"/>
      <text:h text:style-name="Heading_20_1" text:outline-level="1">6.16 Client-Side Navigation</text:h>
      <text:p text:style-name="Text_20_body">Subsequent navigation differs from the initial request.</text:p>
      <text:p text:style-name="Text_20_body">Instead of requesting an entirely new application:</text:p>
      <text:list text:style-name="L121">
        <text:list-item>
          <text:p text:style-name="P122">User clicks a link.</text:p>
        </text:list-item>
        <text:list-item>
          <text:p text:style-name="P122">Next.js intercepts navigation.</text:p>
        </text:list-item>
        <text:list-item>
          <text:p text:style-name="P122"><text:soft-page-break/>Required route data is loaded.</text:p>
        </text:list-item>
        <text:list-item>
          <text:p text:style-name="P122">Shared layouts remain mounted.</text:p>
        </text:list-item>
        <text:list-item>
          <text:p text:style-name="P122">Only affected components update.</text:p>
        </text:list-item>
      </text:list>
      <text:p text:style-name="Text_20_body">This provides a significantly faster user experience.</text:p>
      <text:p text:style-name="Horizontal_20_Line"/>
      <text:h text:style-name="Heading_20_1" text:outline-level="1">6.17 Dynamic Route Processing</text:h>
      <text:p text:style-name="Text_20_body">Dynamic routes receive parameters from the URL.</text:p>
      <text:p text:style-name="Text_20_body">Example:</text:p>
      <text:p text:style-name="P1"><text:span text:style-name="Source_20_Text">/projects/42</text:span></text:p>
      <text:p text:style-name="Text_20_body">Runtime flow:</text:p>
      <text:p text:style-name="Text_20_body">URL</text:p>
      <text:p text:style-name="Text_20_body">↓</text:p>
      <text:p text:style-name="Text_20_body">Route Parameter</text:p>
      <text:p text:style-name="Text_20_body">↓</text:p>
      <text:p text:style-name="Text_20_body">Page Component</text:p>
      <text:p text:style-name="Text_20_body">↓</text:p>
      <text:p text:style-name="Text_20_body">API Request</text:p>
      <text:p text:style-name="Text_20_body">↓</text:p>
      <text:p text:style-name="Text_20_body">Database Query</text:p>
      <text:p text:style-name="Text_20_body">↓</text:p>
      <text:p text:style-name="Text_20_body">Project Details</text:p>
      <text:p text:style-name="Text_20_body">↓</text:p>
      <text:p text:style-name="Text_20_body">Rendered UI</text:p>
      <text:p text:style-name="Text_20_body">Dynamic routing allows a single page definition to serve multiple resources.</text:p>
      <text:p text:style-name="Horizontal_20_Line"/>
      <text:h text:style-name="Heading_20_1" text:outline-level="1">6.18 Error Handling</text:h>
      <text:p text:style-name="Text_20_body">Errors may occur during any stage.</text:p>
      <text:p text:style-name="Text_20_body">Examples include:</text:p>
      <text:list text:style-name="L122">
        <text:list-item>
          <text:p text:style-name="P123">Route not found.</text:p>
        </text:list-item>
        <text:list-item>
          <text:p text:style-name="P123">Data fetch failure.</text:p>
        </text:list-item>
        <text:list-item>
          <text:p text:style-name="P123"><text:soft-page-break/>Rendering exception.</text:p>
        </text:list-item>
        <text:list-item>
          <text:p text:style-name="P123">Authentication failure.</text:p>
        </text:list-item>
        <text:list-item>
          <text:p text:style-name="P123">Unexpected runtime error.</text:p>
        </text:list-item>
      </text:list>
      <text:p text:style-name="Text_20_body">Next.js provides dedicated boundaries for:</text:p>
      <text:list text:style-name="L123">
        <text:list-item>
          <text:p text:style-name="P124">Not Found pages.</text:p>
        </text:list-item>
        <text:list-item>
          <text:p text:style-name="P124">Error pages.</text:p>
        </text:list-item>
        <text:list-item>
          <text:p text:style-name="P124">Loading states.</text:p>
        </text:list-item>
      </text:list>
      <text:p text:style-name="Text_20_body">These mechanisms improve resilience and user experience.</text:p>
      <text:p text:style-name="Horizontal_20_Line"/>
      <text:h text:style-name="Heading_20_1" text:outline-level="1">6.19 Loading States</text:h>
      <text:p text:style-name="Text_20_body">While asynchronous work is occurring:</text:p>
      <text:p text:style-name="Text_20_body">Loading UI communicates application progress.</text:p>
      <text:p text:style-name="Text_20_body">Examples:</text:p>
      <text:list text:style-name="L124">
        <text:list-item>
          <text:p text:style-name="P125">Dashboard skeleton.</text:p>
        </text:list-item>
        <text:list-item>
          <text:p text:style-name="P125">Chart placeholders.</text:p>
        </text:list-item>
        <text:list-item>
          <text:p text:style-name="P125">Search spinner.</text:p>
        </text:list-item>
        <text:list-item>
          <text:p text:style-name="P125">Table loading rows.</text:p>
        </text:list-item>
      </text:list>
      <text:p text:style-name="Text_20_body">Meaningful loading indicators improve perceived performance.</text:p>
      <text:p text:style-name="Horizontal_20_Line"/>
      <text:h text:style-name="Heading_20_1" text:outline-level="1">6.20 Performance Optimizations</text:h>
      <text:p text:style-name="Text_20_body">Next.js incorporates multiple runtime optimizations.</text:p>
      <text:h text:style-name="Heading_20_3" text:outline-level="3">Code Splitting</text:h>
      <text:p text:style-name="Text_20_body">Only route-specific JavaScript is downloaded.</text:p>
      <text:p text:style-name="Horizontal_20_Line"/>
      <text:h text:style-name="Heading_20_3" text:outline-level="3">Lazy Loading</text:h>
      <text:p text:style-name="Text_20_body">Components load only when required.</text:p>
      <text:p text:style-name="Horizontal_20_Line"/>
      <text:h text:style-name="Heading_20_3" text:outline-level="3">Layout Persistence</text:h>
      <text:p text:style-name="Text_20_body">Shared layouts remain mounted during navigation.</text:p>
      <text:p text:style-name="Horizontal_20_Line"/>
      <text:h text:style-name="Heading_20_3" text:outline-level="3"><text:soft-page-break/>Asset Optimization</text:h>
      <text:p text:style-name="Text_20_body">Images, fonts, and static assets are optimized automatically where supported.</text:p>
      <text:p text:style-name="Horizontal_20_Line"/>
      <text:h text:style-name="Heading_20_3" text:outline-level="3">Prefetching</text:h>
      <text:p text:style-name="Text_20_body">Navigation links may prefetch future routes before users click them.</text:p>
      <text:p text:style-name="Text_20_body">These optimizations reduce network traffic and improve responsiveness.</text:p>
      <text:p text:style-name="Horizontal_20_Line"/>
      <text:h text:style-name="Heading_20_1" text:outline-level="1">6.21 Runtime Interaction with Other Systems</text:h>
      <text:p text:style-name="Text_20_body">Next.js coordinates with several runtime modules.</text:p>
      <text:h text:style-name="Heading_20_3" text:outline-level="3">React</text:h>
      <text:p text:style-name="Text_20_body">Responsible for rendering components.</text:p>
      <text:p text:style-name="Horizontal_20_Line"/>
      <text:h text:style-name="Heading_20_3" text:outline-level="3">Zustand</text:h>
      <text:p text:style-name="Text_20_body">Provides client-owned application state.</text:p>
      <text:p text:style-name="Horizontal_20_Line"/>
      <text:h text:style-name="Heading_20_3" text:outline-level="3">TanStack Query</text:h>
      <text:p text:style-name="Text_20_body">Manages server data fetching and caching.</text:p>
      <text:p text:style-name="Horizontal_20_Line"/>
      <text:h text:style-name="Heading_20_3" text:outline-level="3">Express Backend</text:h>
      <text:p text:style-name="Text_20_body">Supplies application data through API endpoints.</text:p>
      <text:p text:style-name="Horizontal_20_Line"/>
      <text:h text:style-name="Heading_20_3" text:outline-level="3">MongoDB</text:h>
      <text:p text:style-name="Text_20_body">Stores persistent application data retrieved via backend services.</text:p>
      <text:p text:style-name="Text_20_body">Together, these systems create a seamless runtime experience.</text:p>
      <text:p text:style-name="Horizontal_20_Line"/>
      <text:h text:style-name="Heading_20_1" text:outline-level="1">6.22 Complete Request Timeline</text:h>
      <text:p text:style-name="Text_20_body">A typical request follows this sequence:</text:p>
      <text:p text:style-name="Text_20_body">Browser</text:p>
      <text:p text:style-name="Text_20_body">↓</text:p>
      <text:p text:style-name="Text_20_body"><text:soft-page-break/>Next.js</text:p>
      <text:p text:style-name="Text_20_body">↓</text:p>
      <text:p text:style-name="Text_20_body">Route Resolution</text:p>
      <text:p text:style-name="Text_20_body">↓</text:p>
      <text:p text:style-name="Text_20_body">Layout Resolution</text:p>
      <text:p text:style-name="Text_20_body">↓</text:p>
      <text:p text:style-name="Text_20_body">Server Components</text:p>
      <text:p text:style-name="Text_20_body">↓</text:p>
      <text:p text:style-name="Text_20_body">HTML Generation</text:p>
      <text:p text:style-name="Text_20_body">↓</text:p>
      <text:p text:style-name="Text_20_body">JavaScript Bundles</text:p>
      <text:p text:style-name="Text_20_body">↓</text:p>
      <text:p text:style-name="Text_20_body">Browser Rendering</text:p>
      <text:p text:style-name="Text_20_body">↓</text:p>
      <text:p text:style-name="Text_20_body">Hydration</text:p>
      <text:p text:style-name="Text_20_body">↓</text:p>
      <text:p text:style-name="Text_20_body">Provider Initialization</text:p>
      <text:p text:style-name="Text_20_body">↓</text:p>
      <text:p text:style-name="Text_20_body">Authentication Check</text:p>
      <text:p text:style-name="Text_20_body">↓</text:p>
      <text:p text:style-name="Text_20_body">API Requests</text:p>
      <text:p text:style-name="Text_20_body">↓</text:p>
      <text:p text:style-name="Text_20_body">TanStack Query Cache</text:p>
      <text:p text:style-name="Text_20_body">↓</text:p>
      <text:p text:style-name="Text_20_body">React Rendering</text:p>
      <text:p text:style-name="Text_20_body">↓</text:p>
      <text:p text:style-name="Text_20_body">Interactive User Interface</text:p>
      <text:p text:style-name="Text_20_body">This sequence forms the foundation of every page within the Search System.</text:p>
      <text:p text:style-name="Horizontal_20_Line"/>
      <text:h text:style-name="Heading_20_1" text:outline-level="1">6.23 Common Debugging Scenarios</text:h>
      <text:p text:style-name="Text_20_body">Typical issues include:</text:p>
      <text:list text:style-name="L125">
        <text:list-item>
          <text:p text:style-name="P126"><text:soft-page-break/>Hydration mismatch warnings.</text:p>
        </text:list-item>
        <text:list-item>
          <text:p text:style-name="P126">Missing route parameters.</text:p>
        </text:list-item>
        <text:list-item>
          <text:p text:style-name="P126">Incorrect layout nesting.</text:p>
        </text:list-item>
        <text:list-item>
          <text:p text:style-name="P126">Navigation failures.</text:p>
        </text:list-item>
        <text:list-item>
          <text:p text:style-name="P126">Authentication redirects.</text:p>
        </text:list-item>
        <text:list-item>
          <text:p text:style-name="P126">Slow initial page load.</text:p>
        </text:list-item>
        <text:list-item>
          <text:p text:style-name="P126">Missing client component directives.</text:p>
        </text:list-item>
        <text:list-item>
          <text:p text:style-name="P126">Incorrect provider initialization order.</text:p>
        </text:list-item>
      </text:list>
      <text:p text:style-name="Text_20_body">Understanding the request lifecycle helps developers quickly identify the stage where problems originate.</text:p>
      <text:p text:style-name="Horizontal_20_Line"/>
      <text:h text:style-name="Heading_20_1" text:outline-level="1">6.24 Future Evolution</text:h>
      <text:p text:style-name="Text_20_body">The runtime architecture is designed to support future Next.js capabilities, including:</text:p>
      <text:list text:style-name="L126">
        <text:list-item>
          <text:p text:style-name="P127">Expanded Server Component usage.</text:p>
        </text:list-item>
        <text:list-item>
          <text:p text:style-name="P127">Partial Prerendering (PPR).</text:p>
        </text:list-item>
        <text:list-item>
          <text:p text:style-name="P127">Streaming rendering.</text:p>
        </text:list-item>
        <text:list-item>
          <text:p text:style-name="P127">Advanced route interception.</text:p>
        </text:list-item>
        <text:list-item>
          <text:p text:style-name="P127">Edge Runtime deployment.</text:p>
        </text:list-item>
        <text:list-item>
          <text:p text:style-name="P127">Improved caching strategies.</text:p>
        </text:list-item>
        <text:list-item>
          <text:p text:style-name="P127">Incremental Static Regeneration where appropriate.</text:p>
        </text:list-item>
      </text:list>
      <text:p text:style-name="Text_20_body">These enhancements can improve scalability and performance while preserving the overall request lifecycle.</text:p>
      <text:p text:style-name="Horizontal_20_Line"/>
      <text:h text:style-name="Heading_20_1" text:outline-level="1">6.25 Chapter Summary</text:h>
      <text:p text:style-name="Text_20_body">The Next.js request lifecycle governs how the frontend application responds to user requests. From route resolution and layout composition to hydration, client-side navigation, and data loading, Next.js provides the execution framework that enables React to render an interactive user interface.</text:p>
      <text:p text:style-name="Text_20_body">Understanding this lifecycle clarifies how requests move through the frontend before interacting with backend services and establishes the foundation for the React rendering lifecycle explored in the next chapter.</text:p>
      <text:p text:style-name="Text_20_body"><text:soft-page-break/>The next chapter, <text:span text:style-name="Strong_20_Emphasis">Chapter 7 – React Rendering Lifecycle</text:span>, will examine how React creates components, manages state, performs reconciliation, schedules updates, handles re-renders, and efficiently synchronizes the Virtual DOM with the browser DOM.</text:p>
      <text:p text:style-name="Text_20_body">At this point, <text:span text:style-name="Strong_20_Emphasis">Volume 2 has transitioned from framework-level runtime (Next.js) to library-level runtime (React)</text:span>. The next few chapters (React, Zustand, TanStack Query) will explain the internal execution of the frontend in increasing detail before moving to the backend pipeline (Express, middleware, controllers, services, MongoDB, etc.), mirroring how a real request flows through the syste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21:36:41.029033723</meta:creation-date>
    <dc:date>2026-07-09T22:04:34.110473966</dc:date>
    <meta:editing-duration>PT17M35S</meta:editing-duration>
    <meta:editing-cycles>1</meta:editing-cycles>
    <meta:document-statistic meta:table-count="0" meta:image-count="0" meta:object-count="0" meta:page-count="66" meta:paragraph-count="1688" meta:word-count="8149" meta:character-count="56887" meta:non-whitespace-character-count="51084"/>
    <meta:generator>LibreOffice/24.2.7.2$Linux_X86_64 LibreOffice_project/420$Build-2</meta:generator>
  </office:meta>
</office:document-meta>
</file>